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Sans" svg:font-family="NimbusSan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dedfdf" loext:decorative="false"/>
    </style:style>
    <style:style style:name="gr3" style:family="graphic" style:parent-style-name="standard">
      <style:graphic-properties draw:stroke="none" draw:fill="solid" draw:fill-color="#e7e8e8" loext:decorative="false"/>
    </style:style>
    <style:style style:name="gr4" style:family="graphic" style:parent-style-name="standard">
      <style:graphic-properties draw:stroke="none" draw:fill="solid" draw:fill-color="#000000" loext:decorative="false"/>
    </style:style>
    <style:style style:name="gr5" style:family="graphic" style:parent-style-name="standard">
      <style:graphic-properties draw:stroke="solid" svg:stroke-width="0.047cm" svg:stroke-color="#000000" draw:stroke-linejoin="miter" svg:stroke-linecap="butt" draw:fill="solid" draw:fill-color="#ffffff" fo:padding-top="0.023cm" fo:padding-bottom="0.023cm" fo:padding-left="0.023cm" fo:padding-right="0.023cm" loext:decorative="false"/>
    </style:style>
    <style:style style:name="gr6" style:family="graphic" style:parent-style-name="standard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 loext:decorative="false"/>
    </style:style>
    <style:style style:name="gr7" style:family="graphic" style:parent-style-name="standard">
      <style:graphic-properties draw:stroke="solid" svg:stroke-width="0.047cm" svg:stroke-color="#000000" draw:stroke-linejoin="miter" svg:stroke-linecap="butt" draw:fill="solid" draw:fill-color="#c3c4c6" fo:padding-top="0.023cm" fo:padding-bottom="0.023cm" fo:padding-left="0.023cm" fo:padding-right="0.023cm" loext:decorative="false"/>
    </style:style>
    <style:style style:name="gr8" style:family="graphic" style:parent-style-name="standard">
      <style:graphic-properties draw:stroke="solid" svg:stroke-width="0.043cm" svg:stroke-color="#000000" draw:stroke-linejoin="miter" svg:stroke-linecap="butt" draw:fill="solid" draw:fill-color="#ffffff" fo:padding-top="0.021cm" fo:padding-bottom="0.021cm" fo:padding-left="0.021cm" fo:padding-right="0.021cm" loext:decorative="false"/>
    </style:style>
    <style:style style:name="gr9" style:family="graphic" style:parent-style-name="standard">
      <style:graphic-properties draw:stroke="solid" svg:stroke-width="0.043cm" svg:stroke-color="#000000" draw:stroke-linejoin="miter" svg:stroke-linecap="butt" draw:fill="none" fo:padding-top="0.021cm" fo:padding-bottom="0.021cm" fo:padding-left="0.021cm" fo:padding-right="0.021cm" loext:decorative="false"/>
    </style:style>
    <style:style style:name="gr10" style:family="graphic" style:parent-style-name="standard">
      <style:graphic-properties draw:stroke="solid" svg:stroke-width="0.007cm" svg:stroke-color="#b5b6b6" draw:stroke-linejoin="miter" svg:stroke-linecap="butt" draw:fill="none" fo:padding-top="0.003cm" fo:padding-bottom="0.003cm" fo:padding-left="0.003cm" fo:padding-right="0.003cm" loext:decorative="fals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66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886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725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305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776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517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45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10.556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solid" svg:stroke-width="0.016cm" svg:stroke-color="#000000" draw:stroke-linejoin="miter" svg:stroke-linecap="butt" draw:fill="none" fo:padding-top="0.008cm" fo:padding-bottom="0.008cm" fo:padding-left="0.008cm" fo:padding-right="0.008cm" loext:decorative="fals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246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077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149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492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437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984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166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69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52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48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81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3.296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526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4.849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452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614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228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051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737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467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699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009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471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543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229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195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81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442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026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322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089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586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653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641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7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429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87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95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72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616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204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976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726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739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701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174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959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823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771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16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357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84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411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382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424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932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822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12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solid" draw:fill-color="#242122" loext:decorative="false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374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203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492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883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419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568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436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.966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327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182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53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1.391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438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696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0.929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0.908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324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175cm" fo:min-width="0.201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0.688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.103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0.616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175cm" fo:min-width="0.172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166cm" fo:min-width="0.14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281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1.179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38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4.472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289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5.027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2.559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5.395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534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1.278cm" fo:min-width="5.133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453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4.564cm" fo:min-width="5.844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369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703cm" fo:min-width="5.76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solid" svg:stroke-width="0.047cm" svg:stroke-color="#000000" draw:stroke-linejoin="miter" svg:stroke-linecap="butt" draw:fill="none" fo:padding-top="0.023cm" fo:padding-bottom="0.023cm" fo:padding-left="0.023cm" fo:padding-right="0.023cm" loext:decorative="false"/>
    </style:style>
    <style:style style:name="gr117" style:family="graphic" style:parent-style-name="standard">
      <style:graphic-properties draw:stroke="solid" svg:stroke-width="0.02cm" svg:stroke-color="#000000" draw:stroke-linejoin="miter" svg:stroke-linecap="butt" draw:fill="none" fo:padding-top="0.01cm" fo:padding-bottom="0.01cm" fo:padding-left="0.01cm" fo:padding-right="0.01cm" loext:decorative="false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62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518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997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942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599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574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194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359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4.286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38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073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4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595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2.491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822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solid" draw:fill-color="#e0e1e1" loext:decorative="false"/>
    </style:style>
    <style:style style:name="gr134" style:family="graphic" style:parent-style-name="standard">
      <style:graphic-properties draw:stroke="solid" svg:stroke-width="0.034cm" svg:stroke-color="#dedfdf" draw:stroke-linejoin="miter" svg:stroke-linecap="butt" draw:fill="solid" draw:fill-color="#ffffff" fo:padding-top="0.017cm" fo:padding-bottom="0.017cm" fo:padding-left="0.017cm" fo:padding-right="0.017cm" loext:decorative="false"/>
    </style:style>
    <style:style style:name="gr135" style:family="graphic" style:parent-style-name="standard">
      <style:graphic-properties draw:stroke="solid" svg:stroke-width="0.043cm" svg:stroke-color="#000000" draw:stroke-linejoin="miter" svg:stroke-linecap="butt" draw:fill="solid" draw:fill-color="#e0e1e1" fo:padding-top="0.021cm" fo:padding-bottom="0.021cm" fo:padding-left="0.021cm" fo:padding-right="0.021cm" loext:decorative="false"/>
    </style:style>
    <style:style style:name="gr136" style:family="graphic" style:parent-style-name="standard">
      <style:graphic-properties draw:stroke="solid" svg:stroke-width="0.007cm" svg:stroke-color="#000000" draw:stroke-linejoin="miter" svg:stroke-linecap="butt" draw:fill="none" fo:padding-top="0.003cm" fo:padding-bottom="0.003cm" fo:padding-left="0.003cm" fo:padding-right="0.003cm" loext:decorative="false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822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789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598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615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187cm" fo:min-width="0.158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607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624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831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382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916cm" fo:padding-top="0cm" fo:padding-bottom="0cm" fo:padding-left="0cm" fo:padding-right="0cm" loext:decorative="false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899cm" fo:padding-top="0cm" fo:padding-bottom="0cm" fo:padding-left="0cm" fo:padding-right="0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78cm" fo:padding-top="0cm" fo:padding-bottom="0cm" fo:padding-left="0cm" fo:padding-right="0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883cm" fo:padding-top="0cm" fo:padding-bottom="0cm" fo:padding-left="0cm" fo:padding-right="0cm" loext:decorative="false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395cm" fo:padding-top="0cm" fo:padding-bottom="0cm" fo:padding-left="0cm" fo:padding-right="0cm" loext:decorative="false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148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dedfdf"/>
    </style:style>
    <style:style style:name="P3" style:family="paragraph">
      <loext:graphic-properties draw:fill="solid" draw:fill-color="#e7e8e8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</style:style>
    <style:style style:name="P6" style:family="paragraph">
      <loext:graphic-properties draw:fill="solid" draw:fill-color="#c3c4c6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/>
      <style:text-properties fo:font-size="5.5pt" style:font-size-asian="5.5pt" style:font-size-complex="5.5pt"/>
    </style:style>
    <style:style style:name="P10" style:family="paragraph">
      <loext:graphic-properties draw:fill="none"/>
      <style:text-properties fo:font-size="5.80000019073486pt" style:font-size-asian="5.80000019073486pt" style:font-size-complex="5.80000019073486pt"/>
    </style:style>
    <style:style style:name="P11" style:family="paragraph">
      <loext:graphic-properties draw:fill="none"/>
      <style:text-properties fo:font-size="6.5pt" style:font-size-asian="6.5pt" style:font-size-complex="6.5pt"/>
    </style:style>
    <style:style style:name="P12" style:family="paragraph">
      <loext:graphic-properties draw:fill="solid" draw:fill-color="#242122"/>
    </style:style>
    <style:style style:name="P13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14" style:family="paragraph">
      <loext:graphic-properties draw:fill="none"/>
      <style:text-properties fo:font-size="14pt" style:font-size-asian="14pt" style:font-size-complex="14pt"/>
    </style:style>
    <style:style style:name="P15" style:family="paragraph">
      <loext:graphic-properties draw:fill="none"/>
      <style:text-properties fo:font-size="17.5pt" style:font-size-asian="17.5pt" style:font-size-complex="17.5pt"/>
    </style:style>
    <style:style style:name="P16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P17" style:family="paragraph">
      <loext:graphic-properties draw:fill="none"/>
      <style:text-properties fo:font-size="17.7000007629395pt" style:font-size-asian="17.7000007629395pt" style:font-size-complex="17.7000007629395pt"/>
    </style:style>
    <style:style style:name="P18" style:family="paragraph">
      <loext:graphic-properties draw:fill="none"/>
      <style:text-properties fo:font-size="23pt" style:font-size-asian="23pt" style:font-size-complex="23pt"/>
    </style:style>
    <style:style style:name="P19" style:family="paragraph">
      <loext:graphic-properties draw:fill="none"/>
      <style:text-properties fo:font-size="8pt" style:font-size-asian="8pt" style:font-size-complex="8pt"/>
    </style:style>
    <style:style style:name="P20" style:family="paragraph">
      <loext:graphic-properties draw:fill="none"/>
      <style:text-properties fo:font-size="4.90000009536743pt" style:font-size-asian="4.90000009536743pt" style:font-size-complex="4.90000009536743pt"/>
    </style:style>
    <style:style style:name="P21" style:family="paragraph">
      <loext:graphic-properties draw:fill="none"/>
      <style:text-properties fo:font-size="4pt" style:font-size-asian="4pt" style:font-size-complex="4pt"/>
    </style:style>
    <style:style style:name="P22" style:family="paragraph">
      <loext:graphic-properties draw:fill="none"/>
      <style:text-properties fo:font-size="30pt" style:font-size-asian="30pt" style:font-size-complex="30pt"/>
    </style:style>
    <style:style style:name="P23" style:family="paragraph">
      <loext:graphic-properties draw:fill="none"/>
      <style:text-properties fo:font-size="11.8000001907349pt" style:font-size-asian="11.8000001907349pt" style:font-size-complex="11.8000001907349pt"/>
    </style:style>
    <style:style style:name="P24" style:family="paragraph">
      <loext:graphic-properties draw:fill="none"/>
      <style:text-properties fo:font-size="12pt" style:font-size-asian="12pt" style:font-size-complex="12pt"/>
    </style:style>
    <style:style style:name="P25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26" style:family="paragraph">
      <loext:graphic-properties draw:fill="none"/>
      <style:text-properties fo:font-size="10pt" style:font-size-asian="10pt" style:font-size-complex="10pt"/>
    </style:style>
    <style:style style:name="P27" style:family="paragraph">
      <loext:graphic-properties draw:fill="solid" draw:fill-color="#e0e1e1"/>
    </style:style>
    <style:style style:name="P28" style:family="paragraph">
      <loext:graphic-properties draw:fill="none"/>
      <style:text-properties fo:font-size="4.5pt" style:font-size-asian="4.5pt" style:font-size-complex="4.5pt"/>
    </style:style>
    <style:style style:name="T1" style:family="text">
      <style:text-properties fo:color="#000000" loext:opacity="100%" style:font-name="DejaVuSans" fo:font-size="7pt" fo:font-weight="normal" style:font-size-asian="7pt" style:font-weight-asian="normal" style:font-name-complex="DejaVuSans" style:font-size-complex="7pt" style:font-weight-complex="normal"/>
    </style:style>
    <style:style style:name="T2" style:family="text">
      <style:text-properties fo:color="#c9cacb" loext:opacity="100%" style:font-name="DejaVuSans" fo:font-size="5.5pt" fo:font-weight="normal" style:font-size-asian="5.5pt" style:font-weight-asian="normal" style:font-name-complex="DejaVuSans" style:font-size-complex="5.5pt" style:font-weight-complex="normal"/>
    </style:style>
    <style:style style:name="T3" style:family="text">
      <style:text-properties fo:color="#969797" loext:opacity="100%" style:font-name="DejaVuSans" fo:font-size="5.80000019073486pt" fo:font-weight="normal" style:font-size-asian="5.80000019073486pt" style:font-weight-asian="normal" style:font-name-complex="DejaVuSans" style:font-size-complex="5.80000019073486pt" style:font-weight-complex="normal"/>
    </style:style>
    <style:style style:name="T4" style:family="text">
      <style:text-properties fo:color="#000000" loext:opacity="100%" style:font-name="DejaVuSans" fo:font-size="5.80000019073486pt" fo:font-weight="normal" style:font-size-asian="5.80000019073486pt" style:font-weight-asian="normal" style:font-name-complex="DejaVuSans" style:font-size-complex="5.80000019073486pt" style:font-weight-complex="normal"/>
    </style:style>
    <style:style style:name="T5" style:family="text">
      <style:text-properties fo:color="#000000" loext:opacity="100%" style:font-name="DejaVuSans" fo:font-size="6.5pt" fo:font-weight="bold" style:font-size-asian="6.5pt" style:font-weight-asian="bold" style:font-name-complex="DejaVuSans" style:font-size-complex="6.5pt" style:font-weight-complex="bold"/>
    </style:style>
    <style:style style:name="T6" style:family="text">
      <style:text-properties fo:color="#000000" loext:opacity="100%" style:font-name="DejaVuSans" fo:font-size="6.5pt" fo:font-weight="normal" style:font-size-asian="6.5pt" style:font-weight-asian="normal" style:font-name-complex="DejaVuSans" style:font-size-complex="6.5pt" style:font-weight-complex="normal"/>
    </style:style>
    <style:style style:name="T7" style:family="text">
      <style:text-properties fo:color="#a0a2a2" loext:opacity="100%" style:font-name="DejaVuSans" fo:font-size="7pt" fo:font-weight="normal" style:font-size-asian="7pt" style:font-weight-asian="normal" style:font-name-complex="DejaVuSans" style:font-size-complex="7pt" style:font-weight-complex="normal"/>
    </style:style>
    <style:style style:name="T8" style:family="text">
      <style:text-properties fo:color="#969797" loext:opacity="100%" style:font-name="DejaVuSans" fo:font-size="7pt" fo:font-weight="normal" style:font-size-asian="7pt" style:font-weight-asian="normal" style:font-name-complex="DejaVuSans" style:font-size-complex="7pt" style:font-weight-complex="normal"/>
    </style:style>
    <style:style style:name="T9" style:family="text">
      <style:text-properties fo:color="#000000" loext:opacity="100%" style:font-name="DejaVuSans" fo:font-size="5.80000019073486pt" fo:font-weight="bold" style:font-size-asian="5.80000019073486pt" style:font-weight-asian="bold" style:font-name-complex="DejaVuSans" style:font-size-complex="5.80000019073486pt" style:font-weight-complex="bold"/>
    </style:style>
    <style:style style:name="T10" style:family="text">
      <style:text-properties fo:color="#000000" loext:opacity="100%" style:font-name="NimbusSans" fo:font-size="10.1000003814697pt" fo:font-weight="normal" style:font-size-asian="10.1000003814697pt" style:font-weight-asian="normal" style:font-name-complex="NimbusSans" style:font-size-complex="10.1000003814697pt" style:font-weight-complex="normal"/>
    </style:style>
    <style:style style:name="T11" style:family="text">
      <style:text-properties fo:color="#000000" loext:opacity="100%" style:font-name="NimbusSans" fo:font-size="14pt" fo:font-weight="normal" style:font-size-asian="14pt" style:font-weight-asian="normal" style:font-name-complex="NimbusSans" style:font-size-complex="14pt" style:font-weight-complex="normal"/>
    </style:style>
    <style:style style:name="T12" style:family="text">
      <style:text-properties fo:color="#000000" loext:opacity="100%" style:font-name="NimbusSans" fo:font-size="17.5pt" fo:font-weight="normal" style:font-size-asian="17.5pt" style:font-weight-asian="normal" style:font-name-complex="NimbusSans" style:font-size-complex="17.5pt" style:font-weight-complex="normal"/>
    </style:style>
    <style:style style:name="T13" style:family="text">
      <style:text-properties fo:color="#000000" loext:opacity="100%" style:font-name="NimbusSans" fo:font-size="10.8000001907349pt" fo:font-weight="normal" style:font-size-asian="10.8000001907349pt" style:font-weight-asian="normal" style:font-name-complex="NimbusSans" style:font-size-complex="10.8000001907349pt" style:font-weight-complex="normal"/>
    </style:style>
    <style:style style:name="T14" style:family="text">
      <style:text-properties fo:color="#000000" loext:opacity="100%" style:font-name="NimbusSans" fo:font-size="17.7000007629395pt" fo:font-weight="normal" style:font-size-asian="17.7000007629395pt" style:font-weight-asian="normal" style:font-name-complex="NimbusSans" style:font-size-complex="17.7000007629395pt" style:font-weight-complex="normal"/>
    </style:style>
    <style:style style:name="T15" style:family="text">
      <style:text-properties fo:color="#000000" loext:opacity="100%" style:font-name="NimbusSans" fo:font-size="23pt" fo:font-weight="normal" style:font-size-asian="23pt" style:font-weight-asian="normal" style:font-name-complex="NimbusSans" style:font-size-complex="23pt" style:font-weight-complex="normal"/>
    </style:style>
    <style:style style:name="T16" style:family="text">
      <style:text-properties fo:color="#000000" loext:opacity="100%" style:font-name="NimbusSans" fo:font-size="8pt" fo:font-weight="normal" style:font-size-asian="8pt" style:font-weight-asian="normal" style:font-name-complex="NimbusSans" style:font-size-complex="8pt" style:font-weight-complex="normal"/>
    </style:style>
    <style:style style:name="T17" style:family="text">
      <style:text-properties fo:color="#000000" loext:opacity="100%" style:font-name="NimbusSans" fo:font-size="4.90000009536743pt" fo:font-weight="normal" style:font-size-asian="4.90000009536743pt" style:font-weight-asian="normal" style:font-name-complex="NimbusSans" style:font-size-complex="4.90000009536743pt" style:font-weight-complex="normal"/>
    </style:style>
    <style:style style:name="T18" style:family="text">
      <style:text-properties fo:color="#000000" loext:opacity="100%" style:font-name="DejaVuSans" fo:font-size="4pt" fo:font-weight="normal" style:font-size-asian="4pt" style:font-weight-asian="normal" style:font-name-complex="DejaVuSans" style:font-size-complex="4pt" style:font-weight-complex="normal"/>
    </style:style>
    <style:style style:name="T19" style:family="text">
      <style:text-properties fo:color="#000000" loext:opacity="100%" style:font-name="NimbusSans" fo:font-size="30pt" fo:font-weight="normal" style:font-size-asian="30pt" style:font-weight-asian="normal" style:font-name-complex="NimbusSans" style:font-size-complex="30pt" style:font-weight-complex="normal"/>
    </style:style>
    <style:style style:name="T20" style:family="text">
      <style:text-properties fo:color="#000000" loext:opacity="100%" style:font-name="NimbusSans" fo:font-size="11.8000001907349pt" fo:font-weight="normal" style:font-size-asian="11.8000001907349pt" style:font-weight-asian="normal" style:font-name-complex="NimbusSans" style:font-size-complex="11.8000001907349pt" style:font-weight-complex="normal"/>
    </style:style>
    <style:style style:name="T21" style:family="text">
      <style:text-properties fo:color="#000000" loext:opacity="100%" style:font-name="NimbusSans" fo:font-size="12pt" fo:font-weight="normal" style:font-size-asian="12pt" style:font-weight-asian="normal" style:font-name-complex="NimbusSans" style:font-size-complex="12pt" style:font-weight-complex="normal"/>
    </style:style>
    <style:style style:name="T22" style:family="text">
      <style:text-properties fo:color="#000000" loext:opacity="100%" style:font-name="NimbusSans" fo:font-size="10pt" fo:font-weight="normal" style:font-size-asian="10pt" style:font-weight-asian="normal" style:font-name-complex="NimbusSans" style:font-size-complex="10pt" style:font-weight-complex="normal"/>
    </style:style>
    <style:style style:name="T23" style:family="text">
      <style:text-properties fo:color="#000000" loext:opacity="100%" style:font-name="NimbusSans" fo:font-size="10pt" fo:font-style="normal" fo:font-weight="normal" style:font-name-asian="NimbusSans" style:font-size-asian="10pt" style:font-style-asian="normal" style:font-weight-asian="normal" style:font-name-complex="NimbusSans" style:font-size-complex="10pt" style:font-style-complex="normal" style:font-weight-complex="normal"/>
    </style:style>
    <style:style style:name="T24" style:family="text">
      <style:text-properties fo:color="#ffffff" loext:opacity="100%" style:font-name="DejaVuSans" fo:font-size="6.5pt" fo:font-weight="bold" style:font-size-asian="6.5pt" style:font-weight-asian="bold" style:font-name-complex="DejaVuSans" style:font-size-complex="6.5pt" style:font-weight-complex="bold"/>
    </style:style>
    <style:style style:name="T25" style:family="text">
      <style:text-properties fo:color="#bfbfbf" loext:opacity="100%" style:font-name="DejaVuSans" fo:font-size="5.5pt" fo:font-weight="normal" style:font-size-asian="5.5pt" style:font-weight-asian="normal" style:font-name-complex="DejaVuSans" style:font-size-complex="5.5pt" style:font-weight-complex="normal"/>
    </style:style>
    <style:style style:name="T26" style:family="text">
      <style:text-properties fo:color="#c5c6c7" loext:opacity="100%" style:font-name="DejaVuSans" fo:font-size="6.5pt" fo:font-weight="bold" style:font-size-asian="6.5pt" style:font-weight-asian="bold" style:font-name-complex="DejaVuSans" style:font-size-complex="6.5pt" style:font-weight-complex="bold"/>
    </style:style>
    <style:style style:name="T27" style:family="text">
      <style:text-properties fo:color="#c5c6c7" loext:opacity="100%" style:font-name="DejaVuSans" fo:font-size="4.5pt" fo:font-weight="bold" style:font-size-asian="4.5pt" style:font-weight-asian="bold" style:font-name-complex="DejaVuSans" style:font-size-complex="4.5pt" style:font-weight-complex="bold"/>
    </style:style>
    <style:style style:name="T28" style:family="text">
      <style:text-properties fo:color="#000000" loext:opacity="100%" style:font-name="DejaVuSans" fo:font-size="12pt" fo:font-weight="bold" style:font-size-asian="12pt" style:font-weight-asian="bold" style:font-name-complex="DejaVuSans" style:font-size-complex="12pt" style:font-weight-complex="bold"/>
    </style:style>
    <style:style style:name="T29" style:family="text">
      <style:text-properties fo:color="#000000" loext:opacity="100%" style:font-name="DejaVuSans" fo:font-size="7pt" fo:font-weight="bold" style:font-size-asian="7pt" style:font-weight-asian="bold" style:font-name-complex="DejaVuSans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ath draw:style-name="gr2" draw:text-style-name="P2" draw:layer="layout" svg:width="2.13cm" svg:height="15.981cm" svg:x="0.952cm" svg:y="4.419cm" svg:viewBox="0 0 2131 15982" svg:d="M278 288c38-11 78-20 121-20h156c21 21 43 40 67 58-82-26-217-56-344-38zM31 473c-13 15-22 31-31 44v328l40-155c-26-85-19-168-9-217zM2073 687c32-107 12-209 3-245-31-35-71-73-118-105-171-83-422-3-496 23-116 76-252 119-396 119-142 0-279-43-395-119-73-26-326-106-497-23-48 32-87 70-119 105-9 36-29 138 3 245l2 2-2 3-58 220v14158l60 222-2 3c-32 105-12 208-3 243 32 37 73 75 119 106 173 82 424 4 497-23 116-77 253-118 395-118 144 0 280 41 396 118 74 27 326 107 496 23 49-31 87-69 118-106 9-35 29-138-3-243l-2-3 2-2 58-220v-14158l-60-223zM1756 144h112l-25-34h-286c-8 0-15-1-24-1v1h-175c12 11 25 22 35 34h296c217 49 373 187 442 262v64c-69-96-201-228-398-228h-438c-4-9-12-14-24-14-14 0-28 12-28 28 0 15 14 27 28 27 12 0 20-6 24-15h242c-128 118-295 184-471 184s-341-66-470-184h242c5 9 12 15 23 15 15 0 29-12 29-27 0-16-14-28-29-28-11 0-18 5-23 14h-439c-196 0-330 133-399 228v-64c69-75 226-213 445-262h295c11-12 23-23 35-34h-174v-1c-9 0-17 1-26 1h-285l-26 34h112c-176 57-309 167-376 237v-90c0 0 131-77 163-147h69l46-60h257c98-12 225-35 285-76 0 0 41-26 41 15 0 26-96 49-171 61h96c3-4 9-6 14-6 3 0 7 2 10 5 74-52 161-81 256-81s184 29 257 81c3-3 6-5 11-5 4 0 9 2 14 6h96c-75-12-173-35-173-61 0-41 43-15 43-15 60 41 185 64 284 76h258l45 60h69c32 70 161 147 161 147v90c-67-70-197-180-375-237zM1340 118c-3 0-5 0-6 0-11 0-20-9-20-20-71-49-156-78-248-78s-176 29-246 78c0 11-10 20-20 20-2 0-5 0-6 0-11 8-20 17-31 26h32c72-64 167-104 271-104s199 40 271 104h32c-9-9-20-18-29-26zM2091 690l40 153v-326c-9-13-18-29-31-44 10 49 17 132-9 217zM1733 268h-156c-20 21-43 40-66 58 83-26 218-56 343-38-37-11-77-20-121-20zM1733 15713c44 0 84-8 121-19-125 19-260-12-343-38 23 17 46 37 66 57zM2100 15509c13-17 22-32 31-44v-328l-40 155c26 85 19 167 9 217zM2131 15511v64c-69 75-223 214-442 261h-296c-10 13-23 23-35 34h175v2c9 0 16-2 24-2h286l25-34h-112c178-56 308-165 375-235v90c0 0-129 75-161 145h-69l-45 60h-258c-99 14-224 37-284 78 0 0-43 26-43-17 0-24 98-47 173-61h-96c-5 5-10 6-14 6-5 0-8 0-11-3-73 51-162 80-257 80s-182-29-256-80c-3 3-7 3-10 3-5 0-11-1-14-6h-96c75 14 171 37 171 61 0 43-41 17-41 17-60-41-187-64-285-78h-257l-46-60h-69c-32-70-163-145-163-145v-90c67 70 200 179 376 235h-112l26 34h285c9 0 17 2 24 2v-2h176c-12-11-24-21-35-34h-295c-219-47-376-186-445-261v-63c69 95 203 228 399 228h439c5 8 12 14 23 14 15 0 29-12 29-29 0-14-14-26-29-26-11 0-18 6-23 14h-242c129-118 294-184 470-184s343 66 471 184h-242c-4-8-12-14-24-14-14 0-28 12-28 26 0 17 14 29 28 29 12 0 20-6 24-14h438c197 0 329-133 398-229zM1369 15836h-32c-72 65-167 105-271 105s-199-40-271-105h-32c11 11 20 19 31 28 1 0 4-2 6-2 10 0 20 10 20 20v2c70 49 154 78 246 78s177-29 248-78v-2c0-10 9-20 20-20 1 0 3 2 6 2 9-9 20-17 29-28zM40 15292l-40-155v328c9 12 18 27 31 42-10-48-17-130 9-215zM555 15713c21-20 43-40 67-57-82 24-217 57-344 38 38 11 78 19 121 19z">
          <text:p/>
        </draw:path>
        <draw:path draw:style-name="gr2" draw:text-style-name="P2" draw:layer="layout" svg:width="6.35cm" svg:height="8.73cm" svg:x="7.622cm" svg:y="4.428cm" svg:viewBox="0 0 6351 8731" svg:d="M6314 8404c9-49 17-132-9-216l46-176v338c-9 17-22 34-37 54zM6351 718v-340c-9-15-22-33-37-53 9 49 17 131-9 217zM0 378v340l47-176c-26-86-20-168-12-217-14 20-26 38-35 53zM5947 8635h-2194c-5 9-14 15-25 15-15 0-27-12-27-29 0-15 12-26 27-26 11 0 20 6 25 14h2194c159 0 272-90 344-175 8-35 29-137-4-244l-2-2 2-3 64-242v-7158l-66-243 2-3c33-107 12-210 4-245-72-82-185-174-344-174h-2194c-5 9-14 15-25 15-15 0-27-12-27-27 0-16 12-28 27-28 11 0 20 6 25 14h2194c203 0 336 139 404 237v-67c-64-71-216-210-432-264h-5488c-215 54-367 193-431 264v67c67-98 200-237 402-237h2198c5-8 14-14 25-14 15 0 27 12 27 28 0 15-12 27-27 27-11 0-20-6-25-15h-2198c-156 0-269 92-341 174-9 35-31 138 3 245l2 3-2 2-64 241v7158l66 245-2 2c-34 107-12 209-3 244 72 83 185 175 341 175h2198c5-8 14-14 25-14 15 0 27 11 27 26 0 17-12 29-27 29-11 0-20-6-25-15h-2198c-202 0-335-139-402-236v66c64 70 216 212 431 266h5488c216-54 368-196 432-266v-66c-68 97-201 236-404 236zM0 8012v338c9 17 21 34 35 54-8-49-14-132 12-216zM0 8491v90c0 0 128 77 160 150h209c-176-60-305-173-369-240zM6351 239v-92c0 0-129-76-161-147h-208c176 60 305 170 369 239zM5982 8731h208c32-73 161-150 161-150v-90c-64 67-193 180-369 240zM367 0h-207c-32 71-160 147-160 147v92c64-69 193-179 367-239z">
          <text:p/>
        </draw:path>
        <draw:path draw:style-name="gr2" draw:text-style-name="P2" draw:layer="layout" svg:width="6.35cm" svg:height="8.73cm" svg:x="14.281cm" svg:y="4.428cm" svg:viewBox="0 0 6351 8731" svg:d="M6316 8404c9-49 15-132-11-216l46-176v338c-9 17-22 34-35 54zM6351 718v-340c-8-15-22-33-35-53 9 49 15 131-11 217zM0 378v340l47-176c-27-86-20-168-10-217-16 20-28 38-37 53zM5948 8635h-2195c-5 9-14 15-25 15-15 0-27-12-27-29 0-15 12-26 27-26 11 0 20 6 25 14h2195c158 0 271-90 343-175 8-35 29-137-4-244v-2-3l64-242v-7158l-64-243v-3c33-107 12-210 4-245-72-82-185-174-343-174h-2195c-5 9-14 15-25 15-15 0-27-12-27-27 0-16 12-28 27-28 11 0 20 6 25 14h2195c202 0 336 139 403 237v-67c-63-71-216-210-432-264h-5488c-215 54-367 193-431 264v67c69-98 202-237 404-237h2197c4-8 13-14 24-14 15 0 28 12 28 28 0 15-13 27-28 27-11 0-20-6-23-15h-2198c-158 0-271 92-343 174-9 35-29 138 3 245l2 3-2 2-64 241v7158l66 245-2 2c-32 107-12 209-3 244 72 83 185 175 343 175h2197c4-8 13-14 24-14 15 0 28 11 28 26 0 17-13 29-28 29-11 0-20-6-23-15h-2198c-202 0-335-139-404-236v66c64 70 216 212 433 266h5486c218-54 369-196 432-266v-66c-67 97-201 236-403 236zM0 8012v338c9 17 21 34 37 54-10-49-17-132 10-216zM0 8491v90c0 0 128 77 162 150h207c-176-60-305-173-369-240zM6351 239v-92c0 0-127-76-161-147h-206c176 60 303 170 367 239zM5984 8731h206c34-73 161-150 161-150v-90c-64 67-191 180-367 240zM369 0h-207c-34 71-162 147-162 147v92c64-69 193-179 369-239z">
          <text:p/>
        </draw:path>
        <draw:polygon draw:style-name="gr3" draw:text-style-name="P3" draw:layer="layout" svg:width="2.257cm" svg:height="0.56cm" svg:x="7.862cm" svg:y="13.833cm" svg:viewBox="0 0 2258 561" draw:points="2258,478 2258,0 85,0 0,82 0,561 2175,561">
          <text:p/>
        </draw:polygon>
        <draw:polygon draw:style-name="gr3" draw:text-style-name="P3" draw:layer="layout" svg:width="1.101cm" svg:height="0.56cm" svg:x="10.277cm" svg:y="13.833cm" svg:viewBox="0 0 1102 561" draw:points="1102,478 1102,0 84,0 0,82 0,561 1018,561">
          <text:p/>
        </draw:polygon>
        <draw:polygon draw:style-name="gr3" draw:text-style-name="P3" draw:layer="layout" svg:width="2.193cm" svg:height="0.56cm" svg:x="11.534cm" svg:y="13.833cm" svg:viewBox="0 0 2194 561" draw:points="2194,478 2194,0 84,0 0,82 0,561 2110,561">
          <text:p/>
        </draw:polygon>
        <draw:path draw:style-name="gr1" draw:text-style-name="P1" draw:layer="layout" svg:width="5.785cm" svg:height="1.72cm" svg:x="14.575cm" svg:y="7.242cm" svg:viewBox="0 0 5786 1721" svg:d="M5694 0c0 0-76 140-316 0h-4973c-240 140-315 0-315 0h-90v204 1517h90c0 0 75-141 315 0h4973c240-141 316 0 316 0h92v-1517-204z">
          <text:p/>
        </draw:path>
        <draw:path draw:style-name="gr1" draw:text-style-name="P1" draw:layer="layout" svg:width="5.785cm" svg:height="1.72cm" svg:x="14.575cm" svg:y="9.207cm" svg:viewBox="0 0 5786 1721" svg:d="M5694 0c0 0-76 139-316 0h-4973c-240 139-315 0-315 0h-90v204 1517h90c0 0 75-141 315 0h4973c240-141 316 0 316 0h92v-1517-204z">
          <text:p/>
        </draw:path>
        <draw:path draw:style-name="gr1" draw:text-style-name="P1" draw:layer="layout" svg:width="5.784cm" svg:height="1.718cm" svg:x="14.57cm" svg:y="11.141cm" svg:viewBox="0 0 5785 1719" svg:d="M156 1719h5470c0-88 159-137 159-137v-1582h-90c0 0-78 140-317 0h-4974c-239 140-314 0-314 0h-90v1582c0 0 156 49 156 137z">
          <text:p/>
        </draw:path>
        <draw:path draw:style-name="gr1" draw:text-style-name="P1" draw:layer="layout" svg:width="5.784cm" svg:height="2.22cm" svg:x="14.57cm" svg:y="4.797cm" svg:viewBox="0 0 5785 2221" svg:d="M5626 0h-5470c0 89-156 138-156 138v2083h90c0 0 75-139 314 0h4974c239-139 317 0 317 0h90v-2083c0 0-159-49-159-138z">
          <text:p/>
        </draw:path>
        <draw:path draw:style-name="gr2" draw:text-style-name="P2" draw:layer="layout" svg:width="13.727cm" svg:height="1.741cm" svg:x="0.3cm" svg:y="0.591cm" svg:viewBox="0 0 13728 1742" svg:d="M2975 1450l820 61-820 61-820-61zM7886 1681l822 61 820-61-820-63zM11918 1081l788-60-970-71 1484-112-1322-98 1830-138-3117-232 839-63-1529-116-1359 104-612-82 1500-112-1201-89-837 61-975-73-907 69 923 69-1018 76-1016-76 589-45-705-52-2251 169 799 59-2531 191 1490 112-786 58 970 73-1483 110 1319 100-1830 136 2516 188-1151 86 1215 92 315-23 914 67 1358-101 611 80-1584 117 2173 164 477-37-856-64 1223-90 855 64 562-43 797 60 2251-168-797-60 2529-188z">
          <text:p/>
        </draw:path>
        <draw:path draw:style-name="gr2" draw:text-style-name="P2" draw:layer="layout" svg:width="11.15cm" svg:height="1.412cm" svg:x="4.341cm" svg:y="2.637cm" svg:viewBox="0 0 11151 1413" svg:d="M2419 1177l665 51-665 49-667-49zM6406 1364l667 49 666-49-666-49zM9682 875l638-48-786-59 1204-89-1073-81 1486-110-2531-190 680-52-1241-92-1103 83-498-66 1218-90-976-74-679 51-790-58-737 55 749 56-826 62-826-62 479-35-572-44-1829 138 649 47-2058 154 1213 91-642 47 791 60-1207 90 1075 80-1490 110 2045 155-937 71 989 73 256-18 742 55 1105-83 494 65-1285 96 1766 132 385-28-695-52 992-75 696 52 456-35 647 49 1829-136-647-48 2055-154z">
          <text:p/>
        </draw:path>
        <draw:path draw:style-name="gr2" draw:text-style-name="P2" draw:layer="layout" svg:width="9.196cm" svg:height="1.164cm" svg:x="11.83cm" svg:y="1.168cm" svg:viewBox="0 0 9197 1165" svg:d="M1993 971l551 41-551 40-552-40zM5284 1124l548 41 551-41-551-40zM7985 723l526-40-650-47 994-78-884-66 1226-90-2089-157 562-42-1024-76-910 67-409-52 1004-75-805-61-562 41-650-47-609 44 618 48-681 50-682-50 396-31-471-35-1511 113 535 40-1695 127 997 75-526 38 649 49-993 75 884 68-1225 92 1684 126-771 58 814 59 210-15 616 46 909-69 410 55-1062 78 1457 109 318-23-574-43 820-61 572 43 377-28 534 40 1509-113-536-40 1695-127z">
          <text:p/>
        </draw:path>
        <draw:path draw:style-name="gr4" draw:text-style-name="P4" draw:layer="layout" svg:width="1.901cm" svg:height="1.851cm" svg:x="1.785cm" svg:y="0.623cm" svg:viewBox="0 0 1902 1852" svg:d="M1288 111c-15 98 8 226 8 226 0 0-72-56-152-99-47-27-88-87-112-130-17-29-28-52-28-52-110 118-38 258-38 258-171-39-279 8-279 8 325 211 152 228-35 318-186 87-200 197-200 197 223-73 312 22 312 22-121 115-12 294-12 294 116 223 408 318 666 358 256 40 484 24 484 24l-591 182-532 135c0 0-526-57-719-502s144-797 110-820c-32-22-73 27-76 32 147-422 589-417 606-462 18-44-88-47-88-47 447-147 676 58 676 58z">
          <text:p/>
        </draw:path>
        <draw:path draw:style-name="gr5" draw:text-style-name="P1" draw:layer="layout" svg:width="0.668cm" svg:height="1.437cm" svg:x="20.258cm" svg:y="1.844cm" svg:viewBox="0 0 669 1438" svg:d="M0 90v1348c516-3 582 0 669-115v-1323c-164 86-333 89-669 90z">
          <text:p/>
        </draw:path>
        <draw:path draw:style-name="gr6" draw:text-style-name="P5" draw:layer="layout" svg:width="0.676cm" svg:height="0.08cm" svg:x="20.236cm" svg:y="1.954cm" svg:viewBox="0 0 677 81" svg:d="M0 81c573-2 624-42 677-81">
          <text:p/>
        </draw:path>
        <draw:path draw:style-name="gr6" draw:text-style-name="P5" draw:layer="layout" svg:width="0.664cm" svg:height="0.151cm" svg:x="20.258cm" svg:y="3.038cm" svg:viewBox="0 0 665 152" svg:d="M0 134c692 80 634-128 665-134">
          <text:p/>
        </draw:path>
        <draw:path draw:style-name="gr1" draw:text-style-name="P1" draw:layer="layout" svg:width="0.949cm" svg:height="0.316cm" svg:x="6.968cm" svg:y="3.025cm" svg:viewBox="0 0 950 317" svg:d="M2 0c0 2 0 2 0 2-3 12-2 23 5 32 7 12 193 283 434 283 53 0 105-14 157-43 20-15 40-27 58-41 126-77 250-190 294-233z">
          <text:p/>
        </draw:path>
        <draw:polygon draw:style-name="gr5" draw:text-style-name="P1" draw:layer="layout" svg:width="1.255cm" svg:height="1.487cm" svg:x="1.071cm" svg:y="2.008cm" svg:viewBox="0 0 1256 1488" draw:points="0,164 0,1488 1256,1324 1256,0">
          <text:p/>
        </draw:polygon>
        <draw:line draw:style-name="gr6" draw:text-style-name="P5" draw:layer="layout" svg:x1="1.099cm" svg:y1="3.398cm" svg:x2="2.327cm" svg:y2="3.223cm">
          <text:p/>
        </draw:line>
        <draw:line draw:style-name="gr6" draw:text-style-name="P5" draw:layer="layout" svg:x1="1.099cm" svg:y1="2.261cm" svg:x2="2.327cm" svg:y2="2.104cm">
          <text:p/>
        </draw:line>
        <draw:polygon draw:style-name="gr7" draw:text-style-name="P6" draw:layer="layout" svg:width="0.857cm" svg:height="1.45cm" svg:x="1.469cm" svg:y="1.881cm" svg:viewBox="0 0 858 1451" draw:points="858,127 0,0 0,1324 858,1451">
          <text:p/>
        </draw:polygon>
        <draw:path draw:style-name="gr5" draw:text-style-name="P1" draw:layer="layout" svg:width="7.729cm" svg:height="1.552cm" svg:x="1.469cm" svg:y="1.773cm" svg:viewBox="0 0 7730 1553" svg:d="M7730 1438c-2179 398-5551-396-7730 0v-1324c2179-396 5551 396 7730 0z">
          <text:p/>
        </draw:path>
        <draw:path draw:style-name="gr6" draw:text-style-name="P5" draw:layer="layout" svg:width="7.745cm" svg:height="0.226cm" svg:x="1.483cm" svg:y="2.992cm" svg:viewBox="0 0 7746 227" svg:d="M7746 87c0 0-722 307-4045 11-2347-208-3519-25-3701 6">
          <text:p/>
        </draw:path>
        <draw:path draw:style-name="gr6" draw:text-style-name="P5" draw:layer="layout" svg:width="7.724cm" svg:height="0.231cm" svg:x="1.474cm" svg:y="1.877cm" svg:viewBox="0 0 7725 232" svg:d="M7725 109c0 0-701 285-4023-11-2348-207-3520-25-3702 6">
          <text:p/>
        </draw:path>
        <draw:polygon draw:style-name="gr8" draw:text-style-name="P1" draw:layer="layout" svg:width="11.075cm" svg:height="2.14cm" svg:x="9.193cm" svg:y="1.474cm" svg:viewBox="0 0 11076 2141" draw:points="11076,2141 0,2141 0,0 11076,0">
          <text:p/>
        </draw:polygon>
        <draw:path draw:style-name="gr8" draw:text-style-name="P1" draw:layer="layout" svg:width="0.075cm" svg:height="2.584cm" svg:x="9.12cm" svg:y="1.252cm" svg:viewBox="0 0 76 2585" svg:d="M0 0v2585c38-87 76-125 76-125v-2332c0 0-38-37-76-128z">
          <text:p/>
        </draw:path>
        <draw:path draw:style-name="gr9" draw:text-style-name="P5" draw:layer="layout" svg:width="1.798cm" svg:height="0.364cm" svg:x="9.193cm" svg:y="1.388cm" svg:viewBox="0 0 1799 365" svg:d="M0 365c0 0 38-365 297-365h778c0 0 253 86 724 86">
          <text:p/>
        </draw:path>
        <draw:path draw:style-name="gr9" draw:text-style-name="P5" draw:layer="layout" svg:width="1.798cm" svg:height="0.364cm" svg:x="9.193cm" svg:y="3.336cm" svg:viewBox="0 0 1799 365" svg:d="M0 0c0 0 38 365 297 365h778c0 0 253-86 724-86">
          <text:p/>
        </draw:path>
        <draw:path draw:style-name="gr8" draw:text-style-name="P1" draw:layer="layout" svg:width="0.075cm" svg:height="2.584cm" svg:x="20.268cm" svg:y="1.252cm" svg:viewBox="0 0 76 2585" svg:d="M76 0v2585c-38-87-76-125-76-125v-2332c0 0 38-37 76-128z">
          <text:p/>
        </draw:path>
        <draw:path draw:style-name="gr9" draw:text-style-name="P5" draw:layer="layout" svg:width="1.796cm" svg:height="0.364cm" svg:x="18.472cm" svg:y="1.388cm" svg:viewBox="0 0 1797 365" svg:d="M1797 365c0 0-38-365-297-365h-775c0 0-253 86-725 86">
          <text:p/>
        </draw:path>
        <draw:path draw:style-name="gr9" draw:text-style-name="P5" draw:layer="layout" svg:width="1.796cm" svg:height="0.364cm" svg:x="18.472cm" svg:y="3.336cm" svg:viewBox="0 0 1797 365" svg:d="M1797 0c0 0-38 365-297 365h-775c0 0-253-86-725-86">
          <text:p/>
        </draw:path>
        <draw:path draw:style-name="gr6" draw:text-style-name="P5" draw:layer="layout" svg:width="9.53cm" svg:height="0.069cm" svg:x="9.966cm" svg:y="1.474cm" svg:viewBox="0 0 9531 70" svg:d="M9531 0c-184 32-404 70-608 70h-8316c-203 0-423-38-607-70">
          <text:p/>
        </draw:path>
        <draw:path draw:style-name="gr6" draw:text-style-name="P5" draw:layer="layout" svg:width="9.53cm" svg:height="0.067cm" svg:x="9.966cm" svg:y="3.547cm" svg:viewBox="0 0 9531 68" svg:d="M0 68c184-33 404-68 607-68h8316c204 0 424 35 608 68">
          <text:p/>
        </draw:path>
        <draw:path draw:style-name="gr1" draw:text-style-name="P1" draw:layer="layout" svg:width="0.153cm" svg:height="0.164cm" svg:x="3.516cm" svg:y="1.293cm" svg:viewBox="0 0 154 165" svg:d="M0 0c122 48 154 165 154 165-101-3-132-82-154-165z">
          <text:p/>
        </draw:path>
        <draw:path draw:style-name="gr4" draw:text-style-name="P4" draw:layer="layout" svg:width="2.424cm" svg:height="0.903cm" svg:x="6.609cm" svg:y="2.692cm" svg:viewBox="0 0 2425 904" svg:d="M2425 691c-23-123-109-324-277-430-138-87-259-67-259-110-2-55 153-38 153-38-168-96-408 20-443-34-20-32 112-79 112-79-204-8-444 98-541 193 244-82 585-34 745 99-68-37-140-61-215-77-276-56-583 28-767 103-209 72-369 177-369 177-137 81-391 156-564 83 0 0 269 449 601 293 26-13 49-27 71-41 180-98 362-263 362-263 64-43 259-172 494-243 54-17 106-20 157-12 131 18 247 101 285 204 101-18 358 68 455 175z">
          <text:p/>
        </draw:path>
        <draw:path draw:style-name="gr4" draw:text-style-name="P4" draw:layer="layout" svg:width="1.113cm" svg:height="1.523cm" svg:x="2.941cm" svg:y="0.557cm" svg:viewBox="0 0 1114 1524" svg:d="M727 901c0 0-32-115-152-164 22 84 51 161 152 164zM341 1213c-27-151-234-176-341-107 37-101 141-190 222-219-46-18-101-32-159-46 69-52 237-92 323-84-17-4-34-9-51-11l16-98c-10-82-83-174-172-232-44-124-1-355 60-416-31 330 431 534 522 774-51-205-265-341-366-467-32-84 0-221 38-267-18 221 214 400 337 527 145 149 186 279 160 383 35 9 80 43 70 96 48-9 98-62 112-96 17 165-84 335-194 382 0 0 31-76-17-137-47-60-183-66-231-65 0 0 60-82 39-125-26-54-296-38-418 2 41-5 139 10 171 24-20 29-73 145-38 182 29 32 72-15 77-21-5 10-45 128-17 159 29 30 95 12 95 12-45 99-202 164-313 161 40-11 108-78 118-120-29 14-104 20-133 14 35-15 110-102 90-205z">
          <text:p/>
        </draw:path>
        <draw:path draw:style-name="gr4" draw:text-style-name="P4" draw:layer="layout" svg:width="0.976cm" svg:height="0.953cm" svg:x="2.317cm" svg:y="0.735cm" svg:viewBox="0 0 977 954" svg:d="M391 416c17-63-106-176-153-199 176-2 260 35 260 35-43-70-55-173-26-252 89 229 427 278 505 468l-17 98c-133-17-330 23-430 136 34 1 124 19 158 33-150 22-358 155-419 219 18-87 44-159 26-211-26-76-115-110-295-79 125-116 373-182 391-248z">
          <text:p/>
        </draw:path>
        <draw:path draw:style-name="gr4" draw:text-style-name="P4" draw:layer="layout" svg:width="0.164cm" svg:height="0.301cm" svg:x="1.591cm" svg:y="1.711cm" svg:viewBox="0 0 165 302" svg:d="M131 23l34 78c-49 9-104 201-104 201-125-74-20-302-20-302z">
          <text:p/>
        </draw:path>
        <draw:path draw:style-name="gr4" draw:text-style-name="P4" draw:layer="layout" svg:width="0.176cm" svg:height="0.41cm" svg:x="1.428cm" svg:y="1.647cm" svg:viewBox="0 0 177 411" svg:d="M20 55c0 0 67-46 100-55l57 50-29 8c0 0-54 178-32 252l35 101c0 0-117-22-136-66 0 0-37-200 5-290z">
          <text:p/>
        </draw:path>
        <draw:path draw:style-name="gr4" draw:text-style-name="P4" draw:layer="layout" svg:width="0.188cm" svg:height="0.361cm" svg:x="1.315cm" svg:y="1.777cm" svg:viewBox="0 0 189 362" svg:d="M68 0c0 0 8 227 32 247l86 37 3 78c0 0-154-49-168-107-12-61-21-205-21-205 0 0 24-38 68-50z">
          <text:p/>
        </draw:path>
        <draw:path draw:style-name="gr1" draw:text-style-name="P1" draw:layer="layout" svg:width="5.785cm" svg:height="1.726cm" svg:x="7.902cm" svg:y="9.109cm" svg:viewBox="0 0 5786 1727" svg:d="M157 1727h5472c0-90 157-139 157-139v-1588h-92c0 0-73 139-313 0h-4976c-240 139-313 0-313 0h-92v1588c0 0 157 49 157 139z">
          <text:p/>
        </draw:path>
        <draw:path draw:style-name="gr4" draw:text-style-name="P4" draw:layer="layout" svg:width="5.819cm" svg:height="1.76cm" svg:x="7.885cm" svg:y="9.092cm" svg:viewBox="0 0 5820 1761" svg:d="M12 1622c40 12 144 58 144 122v17h5508v-17c0-64 104-110 144-122l12-5v-1617h-118l-6 8c0 3-24 43-87 52-6-8-15-14-26-14s-20 5-26 12c-43-6-95-24-150-56l-5-2h-4984l-5 2c-55 32-107 50-150 56-6-7-15-12-26-12s-20 6-26 14c-63-9-87-49-87-52l-6-8h-118v1617zM69 1441c-19-34-31-58-34-67v-906c23 165 34 312 34 441zM191 1726c-15-75-119-121-156-133v-141c45 81 132 211 256 274zM5629 1726h-100c124-63 211-193 256-274v141c-37 12-141 58-156 133zM5785 1374c-3 9-15 33-34 67v-532c0-129 11-276 34-441zM98 34c14 18 47 52 112 61 4 9 15 17 27 17s23-9 29-18c49-7 103-25 161-60h4966c58 35 112 53 161 60 6 9 17 18 29 18s23-8 27-17c65-9 98-43 112-61h63v318c-34 208-52 397-52 557v561c-64 106-185 256-346 256h-4954c-161 0-282-150-346-256v-561c0-160-18-349-52-557v-318z">
          <text:p/>
        </draw:path>
        <draw:path draw:style-name="gr1" draw:text-style-name="P1" draw:layer="layout" svg:width="5.785cm" svg:height="2.146cm" svg:x="7.902cm" svg:y="6.822cm" svg:viewBox="0 0 5786 2147" svg:d="M5629 0h-5472c0 90-157 137-157 137v2010h92c0 0 73-139 313 0h4976c240-139 313 0 313 0h92v-2010c0 0-157-47-157-137z">
          <text:p/>
        </draw:path>
        <draw:path draw:style-name="gr4" draw:text-style-name="P4" draw:layer="layout" svg:width="5.819cm" svg:height="2.184cm" svg:x="7.885cm" svg:y="6.803cm" svg:viewBox="0 0 5820 2185" svg:d="M5808 139c-40-12-144-58-144-120v-19h-5508v19c0 62-104 108-144 120l-12 5v2041h118l6-10c0-1 24-42 87-50 6 8 15 12 26 12s20-4 26-12c43 6 95 24 150 57l5 3h4984l5-3c55-33 107-51 150-57 6 8 15 12 26 12s20-4 26-12c63 8 87 49 87 50l6 10h118v-2041zM5751 320c19 34 31 58 34 66v1329c-23-162-34-309-34-438zM5629 37c15 75 119 119 156 133v139c-45-81-132-211-256-272zM191 37h100c-124 61-211 191-256 272v-139c37-14 141-58 156-133zM35 386c3-8 15-32 34-66v957c0 129-11 276-34 438zM5722 2149c-14-18-47-53-112-61-4-9-15-15-27-15s-23 6-29 17c-49 6-103 26-161 59h-4966c-58-33-112-53-161-59-6-11-17-17-29-17s-23 6-27 15c-65 8-98 43-112 61h-63v-318c34-208 52-395 52-554v-986c64-104 185-254 346-254h4954c161 0 282 150 346 254v986c0 159 18 346 52 554v318z">
          <text:p/>
        </draw:path>
        <draw:polygon draw:style-name="gr1" draw:text-style-name="P1" draw:layer="layout" svg:width="1.789cm" svg:height="1.675cm" svg:x="9.825cm" svg:y="4.808cm" svg:viewBox="0 0 1790 1676" draw:points="1790,148 1790,1528 1643,1676 151,1676 0,1528 0,148 151,0 1643,0">
          <text:p/>
        </draw:polygon>
        <draw:polygon draw:style-name="gr1" draw:text-style-name="P1" draw:layer="layout" svg:width="1.789cm" svg:height="1.675cm" svg:x="11.886cm" svg:y="4.808cm" svg:viewBox="0 0 1790 1676" draw:points="1790,148 1790,1528 1642,1676 147,1676 0,1528 0,148 147,0 1642,0">
          <text:p/>
        </draw:polygon>
        <draw:path draw:style-name="gr4" draw:text-style-name="P4" draw:layer="layout" svg:width="1.844cm" svg:height="1.741cm" svg:x="9.793cm" svg:y="4.779cm" svg:viewBox="0 0 1845 1742" svg:d="M1667 0h-1491l-176 177v1388l176 177h1491l178-177v-1388zM1796 197v138c-14-43-34-89-63-133v-3h-1c-42-60-100-115-179-150h94zM1484 1693h-1122c-94-23-169-73-224-151v-1342c49-67 119-125 224-151h1123c92 23 166 73 222 151v1340c-49 69-119 127-223 153zM49 414c9-50 29-111 63-171v1256c-6-9-13-20-17-31-23-49-38-98-46-139zM1733 242c6 10 11 21 17 32 23 49 38 98 46 139v914c-11 51-29 112-63 172zM196 49h96c-81 35-137 90-179 150h-1v3c-28 44-49 90-63 133v-138zM49 1545v-138c14 43 35 89 63 133v3h1c42 60 98 115 179 150h-96zM1647 1693h-94c79-35 137-90 179-150h1v-3c29-44 49-90 63-133v138z">
          <text:p/>
        </draw:path>
        <draw:path draw:style-name="gr4" draw:text-style-name="P4" draw:layer="layout" svg:width="1.844cm" svg:height="1.741cm" svg:x="11.86cm" svg:y="4.779cm" svg:viewBox="0 0 1845 1742" svg:d="M1669 0h-1489l-180 177v1388l180 177h1489l176-177v-1388zM1796 197v138c-14-43-34-89-63-133v-3h-1c-40-60-98-115-179-150h96zM1484 1693h-1122c-91-23-165-73-222-151v-1342c49-67 120-125 224-151h1121c92 23 167 73 221 151v1340c-48 69-118 127-222 153zM49 414c11-50 29-111 64-171v1256c-7-9-12-20-18-31-23-49-38-98-46-139zM1733 242c6 10 13 21 17 32 25 49 38 98 46 139v914c-9 51-29 112-63 172zM200 49h95c-81 35-139 90-180 150h-2v3c-30 44-50 90-64 133v-138zM49 1545v-138c14 43 34 89 64 133v3h2c41 60 99 115 180 150h-95zM1649 1693h-96c81-35 139-90 179-150h1v-3c29-44 49-90 63-133v138z">
          <text:p/>
        </draw:path>
        <draw:path draw:style-name="gr1" draw:text-style-name="P1" draw:layer="layout" svg:width="1.642cm" svg:height="1.89cm" svg:x="7.911cm" svg:y="4.704cm" svg:viewBox="0 0 1643 1891" svg:d="M1412 183l-592-183-589 183c0 0-23 306-231 349v418c0 0 194 774 820 941 628-167 823-941 823-941v-418c-207-43-231-349-231-349z">
          <text:p/>
        </draw:path>
        <draw:path draw:style-name="gr4" draw:text-style-name="P4" draw:layer="layout" svg:width="1.694cm" svg:height="1.943cm" svg:x="7.885cm" svg:y="4.678cm" svg:viewBox="0 0 1695 1944" svg:d="M1675 532c-187-38-211-323-213-326v-17l-616-189-612 189-3 17c0 3-24 288-211 326l-20 3v441 6c3 7 207 792 840 961l6 1 6-1c636-169 840-954 843-961v-447zM1643 971c-14 53-217 759-797 918-578-159-780-865-794-918v-392c179-53 220-283 230-350l564-174 565 174c9 67 53 297 232 350zM1359 287l-2-9-473-145c-1-21-18-37-38-37s-37 16-38 37l-471 145-2 9c-15 69-58 229-184 314-7-6-15-11-24-11-21 0-40 18-40 41 0 17 11 31 26 37v292 5c20 70 207 673 695 846 0 21 18 38 38 38 22 0 38-18 40-38 199-72 370-219 509-442 118-181 173-355 187-404v-297c15-6 24-20 24-37 0-23-17-41-38-41-9 0-17 5-25 11-126-85-172-245-184-314zM877 1783c-8-9-19-15-31-15s-23 6-29 15c-470-166-653-748-676-824v-291c15-6 26-20 26-37 0-3-2-3-2-6 130-86 179-246 196-324l456-140c6 9 17 15 29 15s23-6 31-15l456 140c15 78 64 238 197 324 0 3-2 3-2 6 0 17 11 31 26 37v291c-23 76-209 658-677 824z">
          <text:p/>
        </draw:path>
        <draw:path draw:style-name="gr4" draw:text-style-name="P4" draw:layer="layout" svg:width="5.821cm" svg:height="1.755cm" svg:x="14.556cm" svg:y="7.224cm" svg:viewBox="0 0 5822 1756" svg:d="M5700 0l-5 9c-1 3-24 43-87 52-6-9-15-14-26-14s-18 5-24 13c-46-5-97-25-152-57l-4-3h-4982l-5 3c-57 32-107 52-152 57-6-8-15-13-24-13-12 0-20 5-26 14-63-9-87-49-87-52l-5-9h-121v1756h121l5-9c0-3 24-43 87-52 6 9 14 14 26 14 9 0 18-5 24-13 45 6 95 25 152 57l5 3h4982l4-3c55-32 106-51 152-57 6 8 13 13 24 13s20-5 26-14c63 9 86 49 87 52l5 9h122v-1756zM37 470c21 162 34 310 34 440v-61c0 128-13 275-34 437zM5784 1721h-64c-12-17-46-54-109-60-6-11-17-18-29-18s-23 9-29 18c-47 6-101 26-161 60h-4963c-60-34-113-54-162-60-5-9-16-18-28-18s-23 7-29 18c-63 6-98 43-110 60h-63v-317c34-210 52-396 52-555v61c0-159-18-347-52-557v-318h63c12 17 47 54 110 61 6 10 17 17 29 17s23-7 28-18c49-6 102-26 162-60h4963c60 34 114 54 161 60 6 11 17 18 29 18s23-7 29-17c63-7 97-44 109-61h64v318c-34 210-52 398-52 557v-61c0 159 18 345 52 555zM5784 1286c-23-162-34-309-34-437v61c0-130 11-278 34-440z">
          <text:p/>
        </draw:path>
        <draw:path draw:style-name="gr4" draw:text-style-name="P4" draw:layer="layout" svg:width="5.821cm" svg:height="1.754cm" svg:x="14.556cm" svg:y="9.19cm" svg:viewBox="0 0 5822 1755" svg:d="M5700 0l-5 8c-1 3-24 44-87 52-6-8-15-14-26-14s-18 6-24 12c-46-4-97-24-152-56l-4-2h-4982l-5 2c-57 32-107 52-152 56-6-6-15-12-24-12-12 0-20 6-26 14-63-8-87-49-87-52l-5-8h-121v1755h121l5-9c0-2 24-42 87-51 6 8 14 12 26 12 9 0 18-4 24-12 45 6 95 24 152 58l5 2h4982l4-2c55-34 106-52 152-58 6 8 13 12 24 12s20-4 26-12c63 9 86 49 87 51l5 9h122v-1755zM37 471c21 162 34 309 34 438v-62c0 129-13 276-34 438zM5784 1719h-64c-12-16-46-53-109-59-6-11-17-17-29-17s-23 6-29 17c-47 6-101 26-161 59h-4963c-60-33-113-53-162-59-5-11-16-17-28-17s-23 6-29 17c-63 6-98 43-110 59h-63v-316c34-210 52-397 52-556v62c0-160-18-345-52-557v-318h63c12 18 47 53 110 61 6 9 17 17 29 17s23-8 28-18c49-7 102-25 162-60h4963c60 35 114 53 161 60 6 10 17 18 29 18s23-8 29-17c63-8 97-43 109-61h64v318c-34 212-52 397-52 557v-62c0 159 18 346 52 556zM5784 1285c-23-162-34-309-34-438v62c0-129 11-276 34-438z">
          <text:p/>
        </draw:path>
        <draw:path draw:style-name="gr4" draw:text-style-name="P4" draw:layer="layout" svg:width="5.818cm" svg:height="1.755cm" svg:x="14.553cm" svg:y="11.123cm" svg:viewBox="0 0 5819 1756" svg:d="M11 1617c41 12 145 58 145 120v19h5504v-19c0-62 106-108 146-120l13-5v-1612l-121 1-4 8c-2 3-26 43-87 52-7-8-16-14-26-14-11 0-19 5-25 12-46-6-95-24-153-56l-3-3h-4982l-5 3c-56 32-107 50-151 56-6-7-15-12-26-12s-20 6-26 14c-61-9-86-49-86-52l-6-9h-118v1612zM69 1436c-20-34-31-58-35-66v-900c23 164 35 311 35 440zM190 1719c-14-75-118-118-156-133v-138c46 80 133 210 257 271zM5628 1719h-101c124-61 211-191 256-271v138c-37 15-141 58-155 133zM5783 1370c-5 8-16 32-34 66v-526c0-129 11-276 34-440zM98 35c12 18 46 52 110 61 6 9 17 15 28 15 14 0 23-7 29-16 49-7 102-26 162-60h4964c58 34 113 53 162 60 5 9 15 16 28 16 12 0 21-6 27-15 64-9 98-43 110-61h65v319c-34 210-52 396-52 556v555c-66 104-187 254-346 254h-4952c-160 0-281-150-347-254v-555c0-160-17-346-52-556v-319z">
          <text:p/>
        </draw:path>
        <draw:path draw:style-name="gr4" draw:text-style-name="P4" draw:layer="layout" svg:width="5.818cm" svg:height="2.255cm" svg:x="14.553cm" svg:y="4.779cm" svg:viewBox="0 0 5819 2256" svg:d="M5806 139c-40-12-146-58-146-121v-18h-5504v18c0 63-104 109-145 121l-11 5v2112h118l6-9c0-1 25-43 86-50 6 7 15 12 26 12s20-5 26-11c44 6 95 23 151 57l5 1h4982l3-1c58-34 107-51 153-57 6 6 14 11 25 11 10 0 19-5 26-12 61 7 85 49 87 50l4 9h121v-2112zM5749 321c18 32 29 57 34 66v1401c-23-162-34-309-34-439zM5628 35c14 77 118 121 155 135v139c-45-81-132-211-256-274zM190 35h101c-124 63-211 193-257 274v-139c37-14 142-58 156-135zM34 387c4-9 15-34 35-66v1028c0 130-12 277-35 439zM5718 2221c-12-17-46-52-110-60-6-9-15-16-27-16-14 0-23 7-29 18-48 6-103 24-161 58h-4964c-60-34-113-52-162-58-6-11-15-18-29-18-11 0-22 7-28 16-64 8-98 43-110 60h-64v-317c35-209 52-396 52-555v-1058c66-104 187-256 347-256h4952c159 0 280 152 346 257v1057c0 159 18 346 52 555v317z">
          <text:p/>
        </draw:path>
        <draw:polygon draw:style-name="gr1" draw:text-style-name="P1" draw:layer="layout" svg:width="2.728cm" svg:height="1.675cm" svg:x="10.916cm" svg:y="11.143cm" svg:viewBox="0 0 2729 1676" draw:points="2729,148 2729,1529 2581,1676 150,1676 0,1529 0,148 150,0 2581,0">
          <text:p/>
        </draw:polygon>
        <draw:path draw:style-name="gr4" draw:text-style-name="P4" draw:layer="layout" svg:width="2.789cm" svg:height="1.741cm" svg:x="10.886cm" svg:y="11.109cm" svg:viewBox="0 0 2790 1742" svg:d="M2612 0h-2435l-177 177v1389l177 176h2435l178-176v-1389zM2741 199v137c-14-43-35-89-63-133v-3h-3c-40-61-98-116-177-151h95zM2429 1695h-2070c-92-23-165-74-220-152v-1340c47-70 119-128 222-154h2068c93 23 167 73 223 154v1339c-50 67-119 127-223 153zM49 417c10-50 29-113 62-173v1258c-6-12-12-21-17-32-23-49-38-98-45-139zM2678 244c5 11 11 20 17 31 23 49 37 98 46 139v915c-11 49-29 112-63 171zM197 49h95c-80 35-138 90-179 151h-2v3c-27 44-49 90-62 133v-137zM49 1545v-135c13 43 35 89 62 132v3h2c41 60 99 116 179 150h-95zM2593 1695h-95c79-34 137-90 177-150h3v-3c28-43 49-89 63-132v135z">
          <text:p/>
        </draw:path>
        <draw:polygon draw:style-name="gr1" draw:text-style-name="P1" draw:layer="layout" svg:width="2.728cm" svg:height="1.675cm" svg:x="7.916cm" svg:y="11.143cm" svg:viewBox="0 0 2729 1676" draw:points="2729,148 2729,1529 2579,1676 148,1676 0,1529 0,148 148,0 2579,0">
          <text:p/>
        </draw:polygon>
        <draw:path draw:style-name="gr4" draw:text-style-name="P4" draw:layer="layout" svg:width="2.788cm" svg:height="1.741cm" svg:x="7.885cm" svg:y="11.109cm" svg:viewBox="0 0 2789 1742" svg:d="M2613 0h-2437l-176 177v1389l176 176h2437l176-176v-1389zM2740 199v137c-14-43-34-89-63-133v-3h-1c-40-61-98-116-178-151h95zM2428 1695h-2068c-92-23-167-74-221-152v-1340c48-70 118-128 222-154h2068c92 23 167 73 222 154v1339c-49 67-119 127-223 153zM49 417c9-50 29-113 63-173v1258c-6-12-13-21-17-32-25-49-38-98-46-139zM2677 244c6 11 12 20 17 31 24 49 38 98 46 139v915c-9 49-29 112-63 171zM196 49h96c-81 35-139 90-179 151h-1v3c-29 44-49 90-63 133v-137zM49 1545v-135c14 43 34 89 63 132v3h1c40 60 98 116 179 150h-96zM2593 1695h-95c80-34 138-90 178-150h1v-3c29-43 49-89 63-132v135z">
          <text:p/>
        </draw:path>
        <draw:path draw:style-name="gr4" draw:text-style-name="P4" draw:layer="layout" svg:width="1.24cm" svg:height="0.332cm" svg:x="12.198cm" svg:y="11.363cm" svg:viewBox="0 0 1241 333" svg:d="M1076 0c-86 0-157 68-164 151h-128c-9-83-78-151-164-151-87 0-156 68-164 151h-127c-7-83-78-151-163-151-92 0-166 76-166 168 0 90 74 165 166 165 72 0 131-46 154-110h144c23 64 84 110 156 110s132-46 155-110h146c23 64 83 110 155 110 90 0 165-75 165-165 0-92-75-168-165-168zM166 301c-74 0-133-60-133-133 0-75 59-134 133-134 73 0 133 59 133 134 0 73-60 133-133 133zM325 208c3-8 3-16 4-25h127c0 9 2 17 3 25zM620 301c-73 0-133-60-133-133 0-75 60-134 133-134 74 0 133 59 133 134 0 73-59 133-133 133zM779 208c2-8 3-16 5-25h128c0 9 1 17 3 25zM1076 301c-74 0-135-60-135-133 0-75 61-134 135-134 73 0 133 59 133 134 0 73-60 133-133 133z">
          <text:p/>
        </draw:path>
        <draw:path draw:style-name="gr4" draw:text-style-name="P4" draw:layer="layout" svg:width="1.24cm" svg:height="0.331cm" svg:x="12.198cm" svg:y="11.892cm" svg:viewBox="0 0 1241 332" svg:d="M1076 0c-86 0-157 66-164 149h-128c-9-83-78-149-164-149-87 0-156 66-164 149h-127c-7-83-78-149-163-149-92 0-166 74-166 167 0 91 74 165 166 165 72 0 131-46 154-109h144c23 63 84 109 156 109s132-46 155-109h146c23 63 83 109 155 109 90 0 165-74 165-165 0-93-75-167-165-167zM166 301c-74 0-133-59-133-134s59-135 133-135c73 0 133 60 133 135s-60 134-133 134zM325 208c3-9 3-17 4-26h127c0 9 2 17 3 26zM620 301c-73 0-133-59-133-134s60-135 133-135c74 0 133 60 133 135s-59 134-133 134zM779 208c2-9 3-17 5-26h128c0 9 1 17 3 26zM1076 301c-74 0-135-59-135-134s61-135 135-135c73 0 133 60 133 135s-60 134-133 134z">
          <text:p/>
        </draw:path>
        <draw:path draw:style-name="gr4" draw:text-style-name="P4" draw:layer="layout" svg:width="4.053cm" svg:height="3.605cm" svg:x="3.249cm" svg:y="7.048cm" svg:viewBox="0 0 4054 3606" svg:d="M3971 2181v-614c13-182 39-689 80-823l3-11-9-6c0 0-26-15-52-43 9-49 20-95 33-136l2-5-35-399-17-5c-35-10-139-56-139-115v-24h-3620v24c0 59-101 103-141 115l-15 5-35 399 1 5c14 41 26 87 34 136-26 26-52 43-54 43l-7 6 3 11c41 133 67 641 78 823v613c-11 182-37 549-78 684l-3 9 7 6c2 0 28 17 54 45-8 48-20 94-34 134l-1 5 35 399 15 6c40 11 141 55 141 115v23h3620v-23c0-60 101-104 139-115l17-6 35-399-2-5c-13-40-24-86-33-134 26-28 52-45 52-45l9-6-3-9c-41-135-67-502-80-683zM3916 3080c0 0 8 15 16 36 3 34 6 101-19 176-44 124-148 216-303 267h-3168c-332-109-329-366-320-441 8-23 15-40 15-40 14-55-4-102-30-139 49-268 24-608 23-623v-1023c1-17 26-358-23-626 26-37 44-84 30-139-1 0-7-15-15-37-3-33-6-101 20-176 43-124 147-216 300-266h3170c332 107 329 364 320 441-8 23-16 38-17 39-11 56 6 103 32 140-49 266-25 607-23 621v1025c-2 16-26 356 23 624-26 38-43 84-31 141zM4023 745c-24 86-44 248-58 404-1-116 0-284 23-433 14 14 28 23 35 29zM3941 537c1-3 17-38 30-81l8 81c-9 29-18 60-26 92-12-26-20-57-12-92zM3947 181l18 198c-3 19-9 37-14 54-1-35-7-78-22-124-30-86-100-193-267-260h129c18 73 116 116 156 132zM263 49h127c-239 96-283 280-286 386-6-19-11-37-16-56l19-198c40-16 138-59 156-132zM75 537l7-81c14 43 29 78 31 80 8 35 0 65-14 93-6-32-15-63-24-92zM67 716c21 149 23 317 20 433-12-156-32-318-57-404 8-6 22-15 37-29zM30 2861c25-86 45-248 57-403 3 115 1 283-20 433-15-13-29-24-37-30zM113 3069c-2 3-17 38-31 83l-7-83c9-29 18-60 24-92 14 26 22 58 14 92zM107 3427l-19-201c5-16 10-35 14-52 2 36 8 79 23 124 29 86 100 193 265 261h-127c-18-75-116-117-156-132zM3791 3559h-127c240-98 283-280 286-386 6 17 12 35 15 53l-18 201c-40 15-138 57-156 132zM3979 3069l-8 83c-13-45-29-80-30-82-8-33 0-64 14-93 7 34 15 64 24 92zM3988 2891c-23-148-24-316-23-433 14 155 34 317 58 403-7 6-21 17-35 30z">
          <text:p/>
        </draw:path>
        <draw:path draw:style-name="gr4" draw:text-style-name="P4" draw:layer="layout" svg:width="4.011cm" svg:height="1.222cm" svg:x="3.27cm" svg:y="5.645cm" svg:viewBox="0 0 4012 1223" svg:d="M545 1c-8 3-11 11-8 17 0 2 5 11 11 26-80 2-156 22-225 54 66-8 170-2 268 18 1 0 3 0 3 0 6 8 12 14 18 22-450-106-566 122-566 122 38-41 84-69 133-90 15-5 31-8 45-11-135 104-224 268-224 451 0 184 89 348 224 452-14-3-30-8-45-11-49-20-95-49-133-90 0 0 116 229 566 125-6 6-12 14-18 21 0 0-2 0-3 0-98 19-202 25-268 17 69 32 145 52 225 55-6 14-11 23-11 26-3 6 0 14 8 17 6 3 14-2 17-8 0 0 105-204 243-241 41-12 83-23 127-24-72 76-167 132-275 152-30 29-42 55-46 78 79-6 154-29 222-64l76-52c9-6 18-13 26-21h2919l8-12c21-34 84-127 136-152l14-6v-262-261l-14-6c-52-25-115-118-136-152l-8-12h-2919c-8-8-17-15-26-23l-76-47c-68-37-143-59-222-65 4 23 16 49 46 77 108 20 203 75 275 151-44 0-86-12-127-24-138-37-243-239-243-239-3-8-11-11-17-8zM987 993c11-12 21-25 32-38 43 6 87 20 135 38zM3964 841c-60 37-116 120-136 152h-153c92-38 225-109 289-204zM3828 228c20 30 76 116 136 150v53c-64-94-197-165-289-203zM987 228h167c-48 18-92 30-135 38-11-14-21-26-32-38zM1218 228h2387c84 30 307 124 358 260v122 123c-51 134-274 228-358 260h-2387c-64-31-124-52-182-63 63-90 101-200 101-320 0-119-38-229-101-321 58-11 118-31 182-61zM669 197c35 29 76 57 127 77 50 18 104 26 159 24 69 86 110 195 110 312 0 118-41 227-110 311-55 0-109 8-159 26-51 20-92 47-127 78-49 17-152 48-276 52-188-72-322-254-322-467 0-212 134-393 322-465 124 3 227 34 276 52z">
          <text:p/>
        </draw:path>
        <draw:path draw:style-name="gr4" draw:text-style-name="P4" draw:layer="layout" svg:width="6.322cm" svg:height="0.958cm" svg:x="0.952cm" svg:y="20.666cm" svg:viewBox="0 0 6323 959" svg:d="M251 6c-158 106-251 283-251 473s93 367 251 474l9 6h615l8-6c34-23 64-48 90-75h5193l8-13c21-34 84-129 136-153l13-8v-451l-13-7c-52-24-115-117-136-151l-8-12h-5193c-26-28-56-54-90-77l-8-6h-615zM70 479c0-162 80-315 213-407h283c133 58 309 90 396 107 66 84 103 190 103 300s-37 216-103 300c-87 17-264 50-396 110h-283c-133-96-213-248-213-410zM5916 132c85 30 308 125 358 260l2 174c-52 135-275 230-360 262h-4617c-23-22-69-52-159-60 26-44 83-154 83-289 0-136-57-246-83-289 90-8 136-40 159-58zM1111 191c17 28 86 146 86 288s-69 260-86 288c-17 0-35 0-55 1 52-87 79-185 79-289s-27-202-79-289c20 1 38 1 55 1zM852 889h-147c89-38 166-61 230-76-23 27-52 53-83 76zM1039 797c109-10 174 9 213 31h-236c8-11 15-22 23-31zM6140 828h-153c93-40 225-110 289-205v52c-60 35-116 121-136 153zM6274 283v52c-62-96-194-165-287-203h153c20 30 76 114 134 151zM1252 132c-39 20-104 39-213 30-8-10-15-21-23-30zM935 145c-64-13-141-38-230-73h147c31 21 60 46 83 73z">
          <text:p/>
        </draw:path>
        <draw:path draw:style-name="gr1" draw:text-style-name="P1" draw:layer="layout" svg:width="1.826cm" svg:height="1.939cm" svg:x="1.103cm" svg:y="5.008cm" svg:viewBox="0 0 1827 1940" svg:d="M0 698c0 0 80 396 54 759 0 0-110 110 9 289l-10 194h861 862l-9-194c118-179 8-289 8-289-26-363 52-759 52-759l-49-38c11-20 38-141 38-141l-33-407c-101 40-168-112-168-112h-701-701c0 0-66 152-167 112l-33 407c0 0 27 121 38 141z">
          <text:p/>
        </draw:path>
        <draw:path draw:style-name="gr1" draw:text-style-name="P1" draw:layer="layout" svg:width="0.863cm" svg:height="0.582cm" svg:x="1.585cm" svg:y="6.52cm" svg:viewBox="0 0 864 583" svg:d="M432 0c238 0 432 130 432 292 0 160-194 291-432 291-237 0-432-131-432-291 0-162 195-292 432-292z">
          <text:p/>
        </draw:path>
        <draw:path draw:style-name="gr2" draw:text-style-name="P2" draw:layer="layout" svg:width="0.952cm" svg:height="0.67cm" svg:x="1.541cm" svg:y="6.476cm" svg:viewBox="0 0 953 671" svg:d="M476 582c-211 0-387-114-387-247 0-135 176-248 387-248 208 0 388 113 388 248 0 133-180 247-388 247zM476 671c262 0 477-153 477-336 0-185-215-335-477-335-263 0-476 150-476 335 0 183 213 336 476 336z">
          <text:p/>
        </draw:path>
        <draw:path draw:style-name="gr4" draw:text-style-name="P4" draw:layer="layout" svg:width="1.879cm" svg:height="2.203cm" svg:x="1.078cm" svg:y="4.984cm" svg:viewBox="0 0 1880 2204" svg:d="M105 315c-23-53-34-170-34-170l2-9 15-6c34-9 130-52 130-107v-23h1443v23c0 55 99 98 133 107l15 6v9c0 0-11 117-34 170l-9-145c-39-14-131-54-149-124h-1356c-17 70-109 110-145 124zM55 1845c1 0 4 0 6 0 1-26 4-55 4-88-26-41-46-87-50-136-5-61 15-118 59-168 0-9 0-17 0-26 0 0-32-597-61-693l-3-12 11-8c0 0 26-15 50-43 0 0 26-23 37-52 11-23 15-49 8-78 0-3-12-33-25-70l-6 67c6 20 11 38 17 58-8 14-20 37-37 48-6-34-15-66-24-94l-2-6 28-321c0 48 32 152 32 152 12 64 49 152 49 157 14 53-6 101-32 136 40 214 1 981-2 1071-18-23-35-60-44-81 3-46 3-98 4-150-21 35-30 72-27 110 4 45 24 87 49 126 1 1 3 4 3 4 5 5 8 11 12 16 0 1 0 1 0 1 57 75 129 127 133 132 28 13 55 30 81 49h2l5 4c18 12 36 26 53 37l5 3c32 26 62 52 87 72 32 1 64 3 92 6-29-23-54-49-74-78h-58-21l-58-44h53c-12-37-17-69-20-97-18 26-59 66-121 42 14 4 71 12 121-95l2 1c9-85 58-125 58-125-51 99-38 186-23 240 0 0 11 14 32 14-14-31-20-63-20-98 0-199 225-360 499-360 275 0 500 161 500 360 0 35-6 67-20 98 22 0 31-14 31-14 17-54 29-141-21-240 0 0 47 40 58 125v-1c50 107 107 99 122 95-61 24-102-16-122-42-2 28-8 60-20 97h55l-58 44h-23-57c-20 29-44 55-73 78 27-3 58-5 92-6 24-20 53-46 87-72l3-3c18-11 35-25 55-37l5-4h1c26-19 52-36 81-49 5-5 77-57 134-132l2-1c3-5 6-11 11-16 1 0 1-3 3-4 24-39 44-81 49-126 3-38-7-75-28-110 2 52 3 104 5 150-10 21-25 58-43 81-5-90-44-857-5-1071-27-35-45-83-33-136 2-5 41-93 52-157 0 0 32-104 32-152l29 321-2 6c-11 28-18 60-26 94-15-11-29-34-35-48 5-20 9-38 15-58l-6-67c-12 37-23 67-26 70-6 29 0 55 11 78 9 29 35 52 35 52 26 28 52 43 52 43l11 8-5 12c-29 96-61 693-61 693 0 9 0 17 0 26 46 50 66 107 61 168-6 49-26 95-52 136 2 33 3 62 5 88 3 0 4 0 6 0 35-3 66 15 50 39-13 25-38 28-38 28 0 0 8-6 17-20 3-8 0-11-3-12-3 0-6-2-9-2-6 0-14-1-20-1 4 55 7 87 7 89l4 24h-245-44c-34 26-66 51-92 73 100 0 162 49 162 49l-64 26c-31 14-80 31-124 40h2c-3 2-5 2-8 2s-5 0-6 1c-225 39-248 17-248 17 96 0 158-63 158-63l6-4c1-3 13-16 32-34-14 2-28 3-40 3h-2c-3 0-6 2-10 2-5 1-16 1-26 4-6 2-14 5-20 6-2 2-3 2-5 2-6 3-13 6-21 11-2 0-2 1-3 1-5 3-11 8-17 12-3 2-3 4-6 5-5 6-11 12-17 20l-182 20c-25 3-49 4-75 4s-49-1-75-4h2l-184-20c-5-8-11-14-17-20-1-1-3-3-5-5-6-4-12-9-18-12 0 0-1-1-3-1-6-5-14-8-21-11-2 0-2 0-5-2-6-1-14-4-20-6-9-3-20-3-26-4-3 0-6-2-9-2h-2c-12 0-27-1-41-3 20 18 32 31 34 34l6 4c0 0 61 63 156 63 0 0-23 22-246-17-2-1-5-1-6-1-4 0-5 0-8-2-43-9-92-26-124-40l-63-26c0 0 63-49 162-49-27-22-58-47-93-73h-43-243l3-24c0-2 3-34 8-89-7 0-14 1-19 1-3 0-6 2-9 2-5 1-8 4-3 12 8 14 17 20 17 20 0 0-26-3-40-28-15-24 15-42 51-39zM1783 1141c12-132 29-329 49-406-6-4-17-12-29-24-18 124-21 326-20 430zM1732 1857c16-3 30-6 42-8 0-10 0-23-2-35-12 15-27 31-40 43zM1614 1946h169c-1-16-3-37-6-65-52 7-108 31-163 65zM1361 2146c0 0 2 0 2 2 24 12 105-11 170-37-31-11-74-14-118-14-26 22-43 40-54 49zM939 2138c162 0 303-59 382-148 8-6 14-14 19-20 0-1 0-3 1-3 5-8 11-15 14-21 23-37 34-77 34-118 0-170-202-309-450-309s-450 139-450 309c0 41 12 81 34 118 4 6 9 13 15 21 0 0 0 2 2 3 4 6 10 14 18 20 78 89 220 148 381 148zM465 2097c-45 0-89 3-118 14 64 26 145 49 168 37 2-2 3-2 3-2-11-9-29-27-53-49zM107 1849c12 2 27 5 41 8-12-12-26-28-40-43 0 12-1 25-1 35zM99 1946h165c-55-34-110-58-160-65-2 28-5 49-5 65zM99 1141c0-104-3-306-21-430-11 12-22 20-30 24 20 77 37 274 51 406z">
          <text:p/>
        </draw:path>
        <draw:path draw:style-name="gr1" draw:text-style-name="P1" draw:layer="layout" svg:width="1.827cm" svg:height="1.939cm" svg:x="1.103cm" svg:y="7.542cm" svg:viewBox="0 0 1828 1940" svg:d="M0 698c0 0 80 396 54 760 0 0-110 110 9 289l-10 193h861 862l-9-193c118-179 8-289 8-289-26-364 53-760 53-760l-50-37c11-21 38-142 38-142l-33-407c-101 41-168-112-168-112h-701-701c0 0-66 153-167 112l-33 407c0 0 27 121 38 142z">
          <text:p/>
        </draw:path>
        <draw:path draw:style-name="gr1" draw:text-style-name="P1" draw:layer="layout" svg:width="0.863cm" svg:height="0.581cm" svg:x="1.585cm" svg:y="9.054cm" svg:viewBox="0 0 864 582" svg:d="M432 0c238 0 432 130 432 291 0 159-194 291-432 291-237 0-432-132-432-291 0-161 195-291 432-291z">
          <text:p/>
        </draw:path>
        <draw:path draw:style-name="gr2" draw:text-style-name="P2" draw:layer="layout" svg:width="0.952cm" svg:height="0.67cm" svg:x="1.541cm" svg:y="9.01cm" svg:viewBox="0 0 953 671" svg:d="M476 582c-211 0-387-113-387-245 0-134 176-248 387-248 210 0 388 114 388 248 0 132-178 245-388 245zM476 671c262 0 477-150 477-334 0-185-215-337-477-337-263 0-476 152-476 337 0 184 213 334 476 334z">
          <text:p/>
        </draw:path>
        <draw:path draw:style-name="gr4" draw:text-style-name="P4" draw:layer="layout" svg:width="1.879cm" svg:height="2.186cm" svg:x="1.078cm" svg:y="7.518cm" svg:viewBox="0 0 1880 2187" svg:d="M1309 2068c31-23 55-49 75-78h57 23l58-44h-55c12-37 18-68 20-97 20 26 61 64 122 41-15 5-70 13-122-94v1c-11-86-58-124-58-124 50 98 38 185 21 239 0 0-9 15-31 15 14-32 20-64 20-98 0-200-225-361-500-361-274 0-499 161-499 361 0 34 6 66 20 98-21 0-32-15-32-15-15-54-28-141 23-239 0 0-49 38-58 124l-2-1c-50 107-107 99-121 94 62 23 103-15 121-41 3 29 8 60 20 97h-53l58 44h21 58c20 29 45 55 74 78-2 1-147 86-257 14 0 0 32 67 139 61l-2 1c2-1 3 0 5-1 1 0 1 0 3 0 121-11 179 41 179 41-17-43-52-58-81-63 12-4 26-9 38-15 29 8 67 23 89 57l184 21h-2c26 2 49 3 75 3s50-1 75-3l182-21c23-34 61-49 89-57 14 6 26 11 38 15-29 5-64 20-81 63 0 0 58-52 179-41 1 0 3 0 3 0 2 1 3 0 5 1l-2-1c107 6 139-61 139-61-108 70-249-9-257-14zM558 1990c-8-6-14-14-18-20-2-2-2-3-2-3-6-8-11-14-15-21-22-37-34-77-34-117 0-171 202-310 450-310s450 139 450 310c0 40-11 80-34 117-3 7-9 13-14 21-1 0-1 1-1 3-5 6-12 14-19 20-79 90-220 148-382 148-161 0-303-58-381-148zM1730 532c-12 53 6 101 33 136-39 214 0 982 5 1071 18-23 33-60 43-81-2-46-3-98-5-150 21 35 31 72 28 110-5 44-25 87-49 126-2 1-2 3-3 4-5 6-8 11-11 15-2 2-2 2-2 2-57 75-129 127-134 132-29 13-55 30-81 49h-1l-7 4c-18 12-35 25-53 37l-3 3c0 0-46 41-31 69 16 26 106 21 152-37 0 0-46 40-95 17-22-9-5-29 21-49h8 44 245l-4-25c0-1-3-33-7-87 6 0 14 0 20 0 3 0 6 2 9 2 3 1 6 4 3 12-9 14-17 20-17 20 0 0 25-3 38-28 16-24-15-43-50-39-2 0-3 0-6 0-2-26-3-56-5-88 26-41 46-87 52-136 5-61-15-118-61-168 0-8 0-17 0-26 0 0 32-598 61-693l5-13-11-7c0 0-26-16-52-43 0 0-26-23-35-52-11-23-17-49-11-78 3-3 14-32 26-69l6 66c-6 20-10 38-15 58 6 15 20 38 35 47 8-32 15-65 26-93l2-6-29-318c0 47-32 151-32 151-11 64-50 150-52 155zM1772 1814c2 12 2 24 2 35-12 2-26 3-42 8 13-12 28-28 40-43zM1614 1946c55-34 111-59 163-65 3 28 5 49 6 65zM1803 712c12 11 23 19 29 23-20 77-37 274-49 406-1-104 3-306 20-429zM105 317c-23-53-34-169-34-169l2-11 15-6c34-10 130-53 130-108v-23h1443v23c0 55 99 98 133 108l15 6v11c0 0-11 116-34 169l-9-145c-39-15-131-56-149-126h-1356c-17 70-109 111-145 126zM4 1884c14 25 40 28 40 28 0 0-9-6-17-20-5-8-2-11 3-12 3 0 6-2 9-2 5 0 12 0 19 0-5 54-8 86-8 87l-3 25h243 43 9c25 20 42 40 20 49-49 23-95-17-95-17 46 58 136 63 152 37 15-28-31-69-31-69h2l-5-3c-17-12-35-25-53-37l-5-4h-2c-26-19-53-36-81-49-4-5-76-57-133-132v-2c-4-4-7-9-12-15 0-1-2-3-3-4-25-39-45-82-49-126-3-38 6-75 27-110-1 52-1 104-4 150 9 21 26 58 44 81 5-89 42-857 2-1071 26-35 46-83 32-136 0-5-37-91-49-155 0 0-32-104-32-151l-28 318 2 6c9 28 18 61 24 93 17-9 29-32 37-47-6-20-11-38-17-58l6-66c13 37 25 66 25 69 7 29 3 55-8 78-11 29-37 52-37 52-24 27-50 43-50 43l-11 7 3 13c29 95 61 693 61 693 0 9 0 18 0 26-44 50-64 107-59 168 4 49 24 95 50 136 0 32-3 62-4 88-2 0-5 0-8 0h2c-36-4-66 15-51 39zM108 1814c14 15 28 31 40 43-14-5-29-6-41-8 0-11 1-23 1-35zM104 1881c50 6 105 31 160 65h-165c0-16 3-37 5-65zM48 735c8-4 19-12 30-23 18 123 21 325 21 429-14-132-29-329-51-406z">
          <text:p/>
        </draw:path>
        <draw:path draw:style-name="gr1" draw:text-style-name="P1" draw:layer="layout" svg:width="1.826cm" svg:height="1.939cm" svg:x="1.103cm" svg:y="10.059cm" svg:viewBox="0 0 1827 1940" svg:d="M0 701c0 0 80 396 54 757 0 0-110 110 9 289l-10 193h861 862l-9-193c118-179 8-289 8-289-26-361 52-757 52-757l-49-39c11-20 38-143 38-143l-33-407c-101 40-168-112-168-112h-701-701c0 0-66 152-167 112l-33 407c0 0 27 123 38 143z">
          <text:p/>
        </draw:path>
        <draw:path draw:style-name="gr1" draw:text-style-name="P1" draw:layer="layout" svg:width="0.863cm" svg:height="0.581cm" svg:x="1.585cm" svg:y="11.571cm" svg:viewBox="0 0 864 582" svg:d="M432 0c238 0 432 130 432 291s-194 291-432 291c-237 0-432-130-432-291s195-291 432-291z">
          <text:p/>
        </draw:path>
        <draw:path draw:style-name="gr2" draw:text-style-name="P2" draw:layer="layout" svg:width="0.952cm" svg:height="0.67cm" svg:x="1.541cm" svg:y="11.527cm" svg:viewBox="0 0 953 671" svg:d="M476 582c-211 0-387-113-387-246s176-249 387-249c210 0 388 116 388 249s-178 246-388 246zM476 671c262 0 477-150 477-335 0-186-215-336-477-336-263 0-476 150-476 336 0 185 213 335 476 335z">
          <text:p/>
        </draw:path>
        <draw:path draw:style-name="gr4" draw:text-style-name="P4" draw:layer="layout" svg:width="1.879cm" svg:height="2.203cm" svg:x="1.078cm" svg:y="10.035cm" svg:viewBox="0 0 1880 2204" svg:d="M105 315c-23-55-34-170-34-170l2-9 15-6c34-9 130-52 130-107v-23h1443v23c0 55 99 98 133 107l15 6v9c0 0-11 115-34 170l-9-145c-39-14-131-54-149-124h-1356c-17 70-109 110-145 124zM55 1842c1 0 4 0 6 0 1-26 4-55 4-87-26-40-46-87-50-136-5-60 15-118 59-167 0-9 0-18 0-28 0 0-32-598-61-693l-3-12 11-6c0 0 26-17 50-43 0 0 26-24 37-52 11-23 15-51 8-78 0-3-12-32-25-69l-6 66c6 18 11 38 17 58-8 14-20 37-37 46-6-32-15-66-24-93l-2-5 28-320c0 48 32 152 32 152 12 64 49 151 49 154 14 54-6 101-32 136 40 216 3 981-2 1071-18-22-35-59-44-81 3-46 3-96 4-148-21 35-30 70-27 109 4 44 24 87 49 125 1 3 3 3 3 6 5 5 8 9 12 14 0 1 0 3 0 3 57 73 129 127 133 130 28 14 55 32 81 49h2l6 5c17 12 35 24 52 38l5 3h-57-43-105c-3 18-2 72 90 94 0 0 15 48 153 80 139 32 29-140-14-174h2l-58-46h53c-12-35-17-67-20-96-18 26-59 64-121 41 14 5 71 12 121-95l2 2c9-86 58-124 58-124-51 99-38 185-23 238 0 0 11 14 32 16-14-32-20-65-20-98 0-199 225-360 499-360 275 0 500 161 500 360 0 33-6 66-20 98 22-2 31-16 31-16 17-53 29-139-21-238 0 0 47 38 58 124v-2c50 107 107 100 122 95-61 23-102-15-122-41-2 29-8 61-20 96h55l-58 46c-43 34-153 206-14 174s153-80 153-80c93-22 93-76 90-94h-104-44-55l3-3c18-14 35-26 55-38l5-5h1c26-17 52-35 81-49 5-3 77-57 134-130 0 0 0-2 2-3 3-5 6-9 11-14 1-3 1-3 3-6 24-38 44-81 49-125 3-39-7-74-28-109 2 52 3 102 5 148-10 22-25 59-43 81-5-90-44-855-5-1071-27-35-45-82-33-136 2-3 41-90 52-154 0 0 32-104 32-152l29 320-2 5c-11 27-18 61-26 93-15-9-29-32-35-46 5-20 9-40 15-58l-6-66c-12 37-23 66-26 69-6 27 0 55 11 78 9 28 35 52 35 52 26 26 52 43 52 43l11 6-5 12c-29 95-61 693-61 693 0 10 0 19 0 28 46 49 66 107 61 167-6 49-26 96-52 136 2 32 3 61 5 87 3 0 4 0 6 0 35-3 66 17 50 40-13 24-38 27-38 27 0 0 8-6 17-20 3-7 0-10-3-12-3 0-6 0-9 0-6-1-14-1-20-1 4 53 7 85 7 87l4 26h-92c-44 163-338 215-338 215-52-46-113-32-113-32 49-26 61-81 61-81l-67 15c-28 8-66 23-89 57l-184 20h2c-25 3-49 4-75 4s-49-1-75-4h2l-184-20c-22-34-60-49-89-57l-66-15c0 0 13 55 60 81 0 0-60-14-113 32 0 0-294-52-337-215h-90l3-26c0-2 3-34 8-87-7 0-14 0-19 1-3 0-6 0-9 0-5 2-8 5-3 12 8 14 17 20 17 20 0 0-26-3-40-27-15-23 15-43 51-40zM1783 1138c12-130 29-329 49-404-6-6-17-14-29-24-18 122-21 324-20 428zM1732 1854c16-3 30-6 42-7 0-11 0-22-2-34-12 14-27 29-40 41zM1614 1943h169c-1-15-3-37-6-64-52 6-108 32-163 64zM1384 1989c-18 26-40 49-64 70 46 2 84-43 104-70zM489 1827c0 41 12 81 34 116 4 8 9 14 15 21 0 2 0 2 2 4 4 7 10 13 18 21 78 89 220 148 381 148 162 0 303-59 382-148 8-8 14-14 19-21 0-2 0-2 1-4 5-7 11-13 14-21 23-35 34-75 34-116 0-172-202-311-450-311s-450 139-450 311zM559 2059c-24-21-47-44-64-70h-41c20 29 58 72 105 70zM107 1847c12 1 27 4 41 7-12-12-26-27-40-41 0 12-1 23-1 34zM99 1943h165c-55-32-110-58-160-64-2 27-5 49-5 64zM99 1138c0-104-3-306-21-428-11 10-22 18-30 24 22 75 37 274 51 404z">
          <text:p/>
        </draw:path>
        <draw:path draw:style-name="gr1" draw:text-style-name="P1" draw:layer="layout" svg:width="1.826cm" svg:height="1.939cm" svg:x="1.103cm" svg:y="12.593cm" svg:viewBox="0 0 1827 1940" svg:d="M0 699c0 0 80 398 54 759 0 0-110 110 9 289l-10 193h861 862l-9-193c118-179 8-289 8-289-26-361 52-759 52-759l-49-37c11-21 38-142 38-142l-33-407c-101 41-168-113-168-113h-701-701c0 0-66 154-167 113l-33 407c0 0 27 121 38 142z">
          <text:p/>
        </draw:path>
        <draw:path draw:style-name="gr1" draw:text-style-name="P1" draw:layer="layout" svg:width="0.863cm" svg:height="0.581cm" svg:x="1.585cm" svg:y="14.105cm" svg:viewBox="0 0 864 582" svg:d="M432 0c238 0 432 131 432 293 0 159-194 289-432 289-237 0-432-130-432-289 0-162 195-293 432-293z">
          <text:p/>
        </draw:path>
        <draw:path draw:style-name="gr2" draw:text-style-name="P2" draw:layer="layout" svg:width="0.952cm" svg:height="0.67cm" svg:x="1.541cm" svg:y="14.061cm" svg:viewBox="0 0 953 671" svg:d="M476 582c-211 0-387-113-387-245 0-137 176-250 387-250 208 0 388 113 388 250 0 132-180 245-388 245zM476 671c262 0 477-150 477-334 0-188-215-337-477-337-263 0-476 149-476 337 0 184 213 334 476 334z">
          <text:p/>
        </draw:path>
        <draw:path draw:style-name="gr4" draw:text-style-name="P4" draw:layer="layout" svg:width="1.879cm" svg:height="2.186cm" svg:x="1.078cm" svg:y="12.569cm" svg:viewBox="0 0 1880 2187" svg:d="M1384 1991h52c-40 34-49 74-49 74 16 0 40 14 40 14-20-48 37-88 37-88l58-46h-55c12-35 18-67 20-96 20 26 61 66 122 41-15 5-72 13-122-94v1c-11-86-58-124-58-124 50 98 38 185 21 239 0 0-9 15-31 15 14-32 20-64 20-98 0-201-225-362-500-362s-499 161-499 362c0 34 6 66 20 98-21 0-32-15-32-15-15-54-28-141 23-239 0 0-49 38-58 124l-2-1c-50 107-107 99-121 94 62 25 103-15 121-41 3 29 8 61 20 96h-53l58 45-2 1c0 0 57 40 37 88 0 0 26-14 40-14 0 0-10-40-49-74h53c20 28 43 54 72 75-135 14-206 88-206 88 119-34 174 0 174 0-6-28-37-34-37-34 2-38 95-14 95-14 29 8 67 23 89 57l184 21h-2c26 2 49 3 75 3s50-1 75-3h-2l184-21c23-34 61-49 89-57 0 0 93-24 95 14 0 0-31 6-36 34 0 0 54-34 173 0 0 0-70-74-206-88 29-21 53-47 73-75zM558 1991c-8-7-14-15-18-21-2-2-2-3-2-3-6-8-11-14-15-22-22-35-34-76-34-116 0-171 202-313 450-313s450 142 450 313c0 40-11 81-34 116-3 8-9 14-14 22-1 0-1 1-1 3-5 6-12 14-19 21-79 89-220 147-382 147-161 0-303-58-381-147zM1730 529c-12 55 6 101 33 136-39 216 0 985 5 1074 18-23 33-60 43-81-2-49-3-99-5-151 21 35 31 70 28 110-5 45-25 88-49 126-2 2-2 5-3 5-5 6-8 11-11 15-2 2-2 2-2 2-57 75-129 127-134 131-29 16-55 31-81 49h-1l-7 5c-18 12-35 26-53 38l-3 3c0 0-23 17-26 46 0 0 20-32 72-46h9 44 17c-81 48-119 114-119 114 24 9 41 35 41 35-15-52 29-92 75-120 3-1 70-32 127-29h104l-4-26c0-1-3-33-7-87 6 0 14 0 20 0 3 0 6 2 9 2 3 1 6 4 3 12-9 14-17 20-17 20 0 0 25-3 38-28 16-24-15-43-50-40 0 0-3 0-6 0-2-26-3-55-5-87 26-41 46-87 52-137 5-61-15-118-61-168 0-9 0-19 0-28 0 0 32-597 61-693l5-12-11-6c0 0-26-17-52-43 0 0-26-25-35-52-11-23-17-49-11-78 3-3 14-31 26-69l6 66c-6 18-10 38-15 58 6 14 20 37 35 46 8-32 15-66 26-94l2-4-29-320c0 48-32 152-32 152-11 64-50 151-52 154zM1772 1814c2 12 2 24 2 35-12 2-26 5-42 8 13-13 28-28 40-43zM1614 1945c55-33 111-58 163-64 3 28 5 49 6 64zM1803 710c12 10 23 18 29 24-20 75-37 274-49 404-1-104 2-306 20-428zM105 315c-23-54-34-170-34-170l2-9 15-5c34-10 130-53 130-108v-23h1443v23c0 55 99 98 133 108l15 5v9c0 0-11 116-34 170l-9-145c-39-14-131-54-149-124h-1356c-17 70-109 110-145 124zM4 1884c14 25 40 28 40 28 0 0-9-6-17-20-5-8-2-11 3-12 3 0 6-2 9-2 5 0 12 0 19 0-5 54-8 86-8 87l-3 26h170c52 22 156 74 133 149 0 0 18-26 41-35 0 0-38-66-119-114h18 43 9c54 14 72 46 72 46-3-29-26-46-26-46h2l-5-3c-17-12-35-26-53-38l-5-5h-2c-26-18-53-33-81-49-4-4-76-56-133-131v-2c-4-4-7-9-12-15 0 0-2-3-3-5-25-38-45-81-49-126-3-40 6-75 27-110-1 52-1 102-4 151 9 21 26 58 44 81 5-89 42-858 2-1074 26-35 46-81 32-136 0-3-37-90-49-154 0 0-32-104-32-152l-28 320 2 4c9 28 18 62 24 94 17-9 29-32 37-46-6-20-11-40-17-58l6-66c13 38 25 66 25 69 7 29 3 55-8 78-11 27-37 52-37 52-24 26-50 43-50 43l-11 6 3 12c29 96 61 693 61 693 0 9 0 19 0 28-44 50-64 107-59 168 4 50 24 96 50 137 0 32-3 61-4 87-2 0-5 0-6 0-36-3-66 16-51 40zM108 1814c14 15 28 30 40 43-14-3-29-6-41-8 0-11 1-23 1-35zM104 1881c50 6 105 31 160 64h-165c0-15 3-36 5-64zM48 734c8-6 19-14 30-24 18 122 21 324 21 428-14-130-29-329-51-404z">
          <text:p/>
        </draw:path>
        <draw:path draw:style-name="gr1" draw:text-style-name="P1" draw:layer="layout" svg:width="1.826cm" svg:height="1.939cm" svg:x="1.103cm" svg:y="15.119cm" svg:viewBox="0 0 1827 1940" svg:d="M0 698c0 0 80 396 54 760 0 0-110 110 9 289l-10 193h861 862l-9-193c118-179 8-289 8-289-26-364 52-760 52-760l-49-38c11-20 38-141 38-141l-33-408c-101 41-168-111-168-111h-701-701c0 0-66 152-167 111l-33 408c0 0 27 121 38 141z">
          <text:p/>
        </draw:path>
        <draw:path draw:style-name="gr1" draw:text-style-name="P1" draw:layer="layout" svg:width="0.863cm" svg:height="0.582cm" svg:x="1.585cm" svg:y="16.631cm" svg:viewBox="0 0 864 583" svg:d="M432 0c238 0 432 130 432 289 0 161-194 294-432 294-237 0-432-133-432-294 0-159 195-289 432-289z">
          <text:p/>
        </draw:path>
        <draw:path draw:style-name="gr2" draw:text-style-name="P2" draw:layer="layout" svg:width="0.952cm" svg:height="0.67cm" svg:x="1.541cm" svg:y="16.587cm" svg:viewBox="0 0 953 671" svg:d="M476 582c-211 0-387-114-387-249 0-133 176-246 387-246 208 0 388 113 388 246 0 135-180 249-388 249zM476 671c262 0 477-150 477-338 0-185-215-333-477-333-263 0-476 148-476 333 0 188 213 338 476 338z">
          <text:p/>
        </draw:path>
        <draw:path draw:style-name="gr4" draw:text-style-name="P4" draw:layer="layout" svg:width="0.413cm" svg:height="1.828cm" svg:x="2.543cm" svg:y="15.317cm" svg:viewBox="0 0 414 1829" svg:d="M266 308c-12 55 6 101 32 138-38 214-1 981 3 1070 19-22 34-60 43-80-1-47-3-98-3-150 20 35 29 72 26 110-3 43-23 86-49 126 0 1-1 3-3 4-3 5-6 11-11 16-1 1-1 1-1 1-55 75-127 127-132 132-30 13-57 30-83 49h-2l-6 3c-17 12-35 26-52 38l-5 3c0 0-41 29-13 61 0 0-8-33 61-61h9 43 244l-3-24c0-2-3-34-6-89 6 0 12 0 18 1 3 0 6 2 9 2 5 1 8 4 3 12-7 14-16 20-16 20 0 0 24-3 38-28 15-24-14-42-49-41-3 0-5 2-6 2-2-26-5-55-5-88 26-41 46-87 51-137 4-60-16-117-60-167 0-9 0-18 0-28 0 0 32-596 61-691l3-14-10-6c0 0-26-17-51-43 0 0-26-23-37-52-10-23-15-49-9-78 2-3 14-32 26-69l5 66c-5 18-11 38-16 58 8 14 20 37 37 48 6-34 14-66 25-95l1-5-29-322c0 49-32 153-32 153-11 67-47 152-49 155zM306 1592c1 12 3 23 3 34-14 3-28 4-41 9 12-14 26-28 38-43zM150 1724c55-34 111-60 162-65 1 26 3 48 5 65zM338 489c11 11 21 20 29 24-21 75-38 274-50 406-2-104 1-306 21-430z">
          <text:p/>
        </draw:path>
        <draw:path draw:style-name="gr4" draw:text-style-name="P4" draw:layer="layout" svg:width="1.738cm" svg:height="0.317cm" svg:x="1.148cm" svg:y="15.095cm" svg:viewBox="0 0 1739 318" svg:d="M44 168c37-12 129-53 147-122h1357c18 69 110 110 147 122l9 150c23-56 35-173 35-173l-1-10-16-5c-33-11-130-52-130-107v-23h-1445v23c0 55-97 96-130 107l-16 5-1 10c0 0 12 117 35 173z">
          <text:p/>
        </draw:path>
        <draw:path draw:style-name="gr4" draw:text-style-name="P4" draw:layer="layout" svg:width="0.414cm" svg:height="1.828cm" svg:x="1.078cm" svg:y="15.317cm" svg:viewBox="0 0 415 1829" svg:d="M4 1662c14 25 40 28 40 28 0 0-9-6-17-20-5-8-2-11 3-12 3 0 6-2 9-2 5-1 12-1 19-1-5 55-8 87-8 89l-3 24h243 43 9c70 28 64 61 64 61 26-32-14-61-14-61l-4-3c-17-12-38-26-56-38l-5-3h-2c-26-19-53-36-81-49-4-5-76-57-133-132v-1c-4-5-7-11-12-16 0-1-2-3-3-4-25-40-45-83-49-126-3-38 6-75 27-110-1 52-1 103-4 150 9 20 26 58 44 80 5-89 42-856 2-1070 26-37 46-83 32-138 0-3-37-88-49-155 0 0-32-104-32-153l-28 322 2 5c9 29 18 61 24 95 17-11 29-34 37-48-6-20-11-40-17-58l6-66c13 37 25 66 25 69 7 29 3 55-8 78-11 29-37 52-37 52-24 26-50 43-50 43l-11 6 3 14c29 95 61 691 61 691 0 10 0 19 0 28-44 50-64 107-59 167 4 50 24 96 50 137 0 33-3 62-4 88-2 0-5-2-6-2-36-1-66 17-51 41zM108 1592c14 15 28 29 40 43-14-5-29-6-41-9 0-11 1-22 1-34zM104 1659c50 5 105 31 160 65h-165c0-17 3-39 5-65zM48 513c8-6 19-13 30-24 18 124 21 326 21 430-14-132-29-331-51-406z">
          <text:p/>
        </draw:path>
        <draw:path draw:style-name="gr4" draw:text-style-name="P4" draw:layer="layout" svg:width="1.472cm" svg:height="0.72cm" svg:x="1.281cm" svg:y="16.561cm" svg:viewBox="0 0 1473 721" svg:d="M1251 599c-1-1-35-31 11-75l58-44h-55c12-37 18-69 20-98 20 26 61 66 122 43-15 4-70 12-122-98-11-84-58-122-58-122 50 99 38 187 21 241 0 0-9 14-31 14 14-31 20-64 20-98 0-200-225-362-501-362-277 0-500 162-500 362 0 34 7 67 20 98-22 0-31-14-31-14-17-54-29-142 21-241 0 0-47 38-58 122-52 110-107 102-122 98 61 23 102-17 122-43 2 29 8 61 20 98h-55l58 44c46 44 12 74 11 75-57 25-136 40-222 0 0 0 35 52 87 66 0 0 81-31 126-20 0 0 70-90 139-54 3 3 6 7 11 8 1 2 1 3 1 3-139 20-128 115-128 115 13-41 70-37 70-37 12-46 84-40 84-40 8 2 14 5 23 8 2 0 5 2 6 3 6 2 11 5 17 8 6 1 9 6 14 9 3 1 6 3 9 6 8 6 14 14 20 23l182 20c12 1 23 3 34 3 13 0 27 1 41 1s26-1 40-1c12 0 23-2 35-3h-2l185-20c23-35 61-49 89-57 0 0 72-7 84 40 0 0 55-4 70 37 0 0 11-95-128-115 0 0 0-1 1-3 5-1 8-5 11-8 69-36 139 54 139 54 43-11 127 20 127 20 51-14 86-66 86-66-86 40-164 25-222 0zM736 50c249 0 451 138 451 312 0 41-11 81-34 118-3 6-9 13-14 21-1 0-1 0-1 2-5 7-12 15-19 21-29 34-67 61-111 84 0 2-2 2-5 3-12 6-26 14-41 20-2 0-3 0-3 0-17 6-35 12-53 17 0 0-2 0-3 0-14 6-29 9-45 12-4 0-9 2-15 2-12 3-26 4-38 6-5 0-11 0-15 1-19 2-37 2-54 2-18 0-37 0-55-2-5-1-9-1-14-1-14-2-26-3-40-6-4 0-9-2-15-2-14-3-29-6-44-12-2 0-2 0-3 0-17-5-34-11-51-17 0 0-1 0-3 0-14-6-29-14-41-20-2-1-5-1-5-3-44-23-82-50-112-84-7-6-12-14-18-21 0-2 0-2-1-2-5-8-11-15-14-21-23-37-34-77-34-118 0-174 202-312 450-312zM259 582c1-24-10-44-19-58h51c6 9 10 15 17 23 0 0-19 17-49 35zM1214 582c-30-18-49-35-49-35 7-8 13-14 17-23h51c-9 14-20 34-19 58z">
          <text:p/>
        </draw:path>
        <draw:path draw:style-name="gr1" draw:text-style-name="P1" draw:layer="layout" svg:width="1.827cm" svg:height="1.939cm" svg:x="1.103cm" svg:y="17.636cm" svg:viewBox="0 0 1828 1940" svg:d="M0 698c0 0 80 399 54 760 0 0-110 110 9 289l-10 193h861 862l-9-193c118-179 8-289 8-289-26-361 53-760 53-760l-50-38c11-20 38-141 38-141l-33-407c-101 40-168-112-168-112h-701-701c0 0-66 152-167 112l-33 407c0 0 27 121 38 141z">
          <text:p/>
        </draw:path>
        <draw:path draw:style-name="gr1" draw:text-style-name="P1" draw:layer="layout" svg:width="0.863cm" svg:height="0.582cm" svg:x="1.585cm" svg:y="19.148cm" svg:viewBox="0 0 864 583" svg:d="M432 0c238 0 432 130 432 291 0 162-194 292-432 292-237 0-432-130-432-292 0-161 195-291 432-291z">
          <text:p/>
        </draw:path>
        <draw:path draw:style-name="gr2" draw:text-style-name="P2" draw:layer="layout" svg:width="0.952cm" svg:height="0.67cm" svg:x="1.541cm" svg:y="19.104cm" svg:viewBox="0 0 953 671" svg:d="M476 581c-211 0-387-113-387-246 0-135 176-248 387-248 208 0 388 113 388 248 0 133-180 246-388 246zM476 671c262 0 477-152 477-336 0-185-215-335-477-335-263 0-476 150-476 335 0 184 213 336 476 336z">
          <text:p/>
        </draw:path>
        <draw:path draw:style-name="gr4" draw:text-style-name="P4" draw:layer="layout" svg:width="1.879cm" svg:height="2.203cm" svg:x="1.078cm" svg:y="17.612cm" svg:viewBox="0 0 1880 2204" svg:d="M1464 1990l58-44h-55c12-37 18-69 20-98 20 26 61 66 122 43-15 4-70 12-122-95-11-84-58-124-58-124 50 99 38 187 21 240 0 0-9 14-31 14 14-31 20-63 20-98 0-199-225-360-500-360-274 0-499 161-499 360 0 35 6 67 20 98-21 0-32-14-32-14-15-53-28-141 23-240 0 0-49 40-58 124h-2c-50 107-107 99-121 95 62 23 103-17 121-43 3 29 8 61 20 98h-53l58 44c0 0 62 44 49 130 0 0-11 28 15 31 23 4 52-49-25-161h40c11 17 23 32 37 46 0 0 1 2 3 3 81 121 12 139 12 139-6 3-9 11-6 17 14 20 90 12 57-87 29 8 64 23 84 55l184 20h-2c26 3 49 4 75 4s50-1 75-4h-2l184-20c21-32 57-47 84-55-32 99 45 107 57 87 3-6 1-14-5-17 0 0-69-18 12-139 2-1 2-3 2-3 14-14 28-29 38-46h40c-76 112-49 165-24 161 24-3 15-31 15-31-14-86 49-130 49-130zM939 2137c-161 0-303-58-381-147-8-6-14-14-18-20-2-1-2-3-2-3-6-7-11-15-15-21-22-37-34-77-34-118 0-170 202-309 450-309s450 139 450 309c0 41-11 81-34 118-3 6-9 14-14 21-1 0-1 2-1 3-5 6-12 14-19 20-79 89-220 147-382 147zM1730 529c-12 54 6 100 35 137-41 214-2 983 3 1073 18-23 33-60 43-81-2-46-3-98-5-150 21 35 31 72 28 109-5 46-25 89-49 127-2 1-2 3-3 4-5 5-8 11-11 16-2 1-2 1-2 1-57 75-129 127-134 132-29 14-55 30-81 49h-1l-5 3c-11 7-20 15-29 21-11 6-20 14-29 20-57 52-37 98-20 104 18 5 24-20 24-20-1-41 28-69 49-84h2 44 245l-4-24c0-2-3-34-7-89 6 0 14 0 20 1 3 0 6 2 9 2 3 1 6 5 3 12-9 14-17 20-17 20 0 0 25-3 38-27 16-25-15-43-50-40-2 0-3 0-6 0-2-26-3-55-5-87 26-42 46-89 52-138 5-60-15-116-61-167 0-9 0-17 0-26 0 0 32-601 61-696l5-12-11-6c0 0-26-17-52-43 0 0-26-24-35-52-11-23-17-50-9-78 1-3 12-32 24-69l6 66c-6 18-10 37-15 58 6 14 20 37 35 46 8-32 15-66 26-93l2-5-29-320c0 48-32 152-32 152-11 64-50 150-52 154zM1772 1814c2 12 2 23 2 34-12 3-26 4-42 9 13-12 28-28 40-43zM1614 1946c55-34 111-58 163-65 3 28 5 49 6 65zM1803 710c12 11 23 18 29 23-20 76-37 274-49 408-1-107 3-309 20-431zM105 315c-23-53-34-171-34-171l2-8 15-6c34-9 130-52 130-107v-23h1443v23c0 55 99 98 133 107l15 6v8c0 0-11 118-34 171l-9-145c-39-14-131-54-149-124h-1356c-17 70-109 110-145 124zM4 1885c14 24 40 27 40 27 0 0-9-6-17-20-5-7-2-11 3-12 3 0 6-2 9-2 5-1 12-1 19-1-5 55-8 87-8 89l-3 24h243 43 3c22 15 49 43 49 84 0 0 6 25 25 20 15-6 36-52-20-104h-2c-8-6-17-14-27-20-11-6-19-14-29-21l-5-3h-2c-26-19-53-35-81-49-4-5-76-57-133-132v-1c-4-5-7-11-12-16 0-1-2-3-3-4-25-38-45-81-49-127-3-37 6-74 27-109-1 52-1 104-4 150 9 21 26 58 44 81 3-90 42-859 2-1073 26-37 46-83 32-137 0-4-37-90-49-154 0 0-32-104-32-152l-28 320 2 5c9 27 18 61 24 93 17-9 29-32 37-46-6-21-11-40-17-58l6-66c13 37 25 66 25 69 7 28 3 55-8 78-11 28-37 52-37 52-24 26-50 43-50 43l-11 6 3 12c29 95 61 696 61 696 0 9 0 17 0 26-44 51-64 107-59 167 4 49 24 96 50 138 0 32-3 61-4 87-2 0-5 0-8 0h2c-36-3-66 15-51 40zM108 1814c14 15 28 31 40 43-14-5-29-6-41-9 0-11 1-22 1-34zM104 1881c50 7 105 31 160 65h-165c0-16 3-37 5-65zM48 733c8-5 19-12 30-23 18 122 21 324 21 431-14-134-29-332-51-408z">
          <text:p/>
        </draw:path>
        <draw:path draw:style-name="gr4" draw:text-style-name="P4" draw:layer="layout" svg:width="6.353cm" svg:height="6.324cm" svg:x="7.619cm" svg:y="20.747cm" svg:viewBox="0 0 6354 6325" svg:d="M6178 0h-6001l-177 176v5973l177 176h6001l176-176v-5973zM6305 196v138c-14-43-34-89-63-133v-2h-1c-40-61-98-116-179-150h96zM5994 6276h-5635c-91-21-165-73-220-150v-5925c47-69 118-127 222-152h5633c92 22 167 72 222 150v5927c-49 66-118 126-222 150zM49 413c10-50 29-111 62-171v5841c-4-9-12-19-16-30-23-49-37-98-46-139zM6242 242c6 9 12 20 17 31 24 48 38 97 46 139v5500c-9 49-29 112-63 171zM197 49h95c-81 34-138 89-179 150h-2v2c-27 44-49 90-62 133v-138zM49 6128v-136c13 42 35 88 62 133v1h2c41 61 98 117 179 150h-95zM6158 6276h-96c81-33 139-89 179-150h1v-1c29-45 49-91 63-133v136z">
          <text:p/>
        </draw:path>
        <draw:path draw:style-name="gr4" draw:text-style-name="P4" draw:layer="layout" svg:width="6.529cm" svg:height="7.023cm" svg:x="7.53cm" svg:y="13.421cm" svg:viewBox="0 0 6530 7024" svg:d="M6530 6288l-2-17-15-1c-1 0-56-5-72-141v-5985l-15-5c-40-12-142-58-142-118v-21h-6038v21c0 60-102 106-142 118l-14 5v5985c-17 136-72 141-72 141h-18v18c0 164 38 292 90 392v199l14 6c40 12 142 57 142 116v23h6038v-23c0-59 102-104 142-116l15-6v-199c51-100 89-228 89-392zM6452 6268c14 20 31 29 41 34-1 115-21 211-52 291v-340c3 6 6 11 11 15zM133 379c6-12 15-32 29-56v5789c0 120-9 256-29 404zM133 6640c32-199 48-375 48-528v-5818c58-95 162-225 298-251h5572c136 26 240 156 298 251v5818c0 153 16 329 48 528v49c-35 63-75 112-112 150-84 84-167 127-199 141h-5642c-46-20-205-104-311-292zM6397 6516c-20-148-29-284-29-404v-5789c14 26 23 44 29 56zM6397 176v127c-44-78-127-199-243-260h88c17 73 117 118 155 133zM288 43h88c-116 61-199 182-243 260v-127c40-15 138-60 155-133zM37 6302c10-5 27-14 41-34 5-4 8-9 12-15v341c-32-82-52-179-53-292zM133 6848v-92c29 45 60 80 89 109 52 54 104 90 145 115h-79c-17-74-115-118-155-132zM6242 6980h-79c41-25 93-61 145-115 29-29 60-64 89-109v92c-38 14-138 58-155 132z">
          <text:p/>
        </draw:path>
        <draw:path draw:style-name="gr4" draw:text-style-name="P4" draw:layer="layout" svg:width="6.522cm" svg:height="13.658cm" svg:x="14.198cm" svg:y="13.421cm" svg:viewBox="0 0 6523 13659" svg:d="M6440 12718v-12574l-14-5c-41-12-142-58-142-118v-21h-6039v21c0 60-101 106-142 118l-14 5v12554c-23 90-110 462-84 658l3 12 9 3c2 0 32 11 72 29v115l14 5c41 12 142 56 142 117v22h6039v-22c0-59 101-105 142-117l14-5v-118c38-17 66-26 66-26l11-3 1-12c26-185-49-525-78-638zM132 379c6-12 17-30 30-56v12424c0 121-9 255-30 404zM132 13275c32-198 49-375 49-528v-12453c58-95 162-225 298-251h5571c136 26 240 156 298 251v12453c0 153 17 330 49 528v104c-96 44-228 125-251 237h-5768c-23-110-150-190-246-236zM6367 323c13 26 24 44 30 56v12772c-20-149-30-283-30-404zM6397 176v127c-46-78-128-199-243-260h87c17 73 116 118 156 133zM288 43h87c-115 61-197 182-243 260v-127c40-15 139-60 156-133zM40 13342c-15-130 18-338 49-483v501c-21-9-40-15-49-18zM132 13483v-63c84 43 188 109 211 196h-55c-17-75-116-118-156-133zM6397 13483c-40 15-139 58-156 133h-58c21-87 128-156 214-199zM6484 13342c-9 3-24 9-44 17v-477c29 143 58 336 44 460z">
          <text:p/>
        </draw:path>
        <draw:path draw:style-name="gr4" draw:text-style-name="P4" draw:layer="layout" svg:width="6.35cm" svg:height="5.132cm" svg:x="0.952cm" svg:y="21.947cm" svg:viewBox="0 0 6351 5133" svg:d="M6351 105v-32h-101v-73h-43c0 0-18 24-66 24h-5931c-48 0-66-24-66-24h-43v73h-101v32c41 0 43 69 43 69v4743c0 0-2 67-43 67v33h43 58v116h43v-5078h6063v5024h-6063v54c0 0 18-26 66-26h5931c48 0 65 26 66 26h43v-116h58 43v-33c-41 0-43-67-43-67v-4743c0 0 2-69 43-69zM101 4917h-32v-4717h32zM6282 4917h-32v-4717h32z">
          <text:p/>
        </draw:path>
        <draw:path draw:style-name="gr1" draw:text-style-name="P1" draw:layer="layout" svg:width="1.177cm" svg:height="0.488cm" svg:x="7.472cm" svg:y="21.194cm" svg:viewBox="0 0 1178 489" svg:d="M1034 61c-25 26-66 26-92 0-17-15-23-40-17-61h-672c5 21 0 46-17 61-24 26-66 26-92 0l-144 123v59 60l144 122c26-24 68-24 92 2 17 15 22 40 17 62h672c-6-22 0-47 17-62 26-26 67-26 92-2l144-122v-60-59z">
          <text:p/>
        </draw:path>
        <draw:path draw:style-name="gr4" draw:text-style-name="P4" draw:layer="layout" svg:width="1.212cm" svg:height="0.522cm" svg:x="7.453cm" svg:y="21.177cm" svg:viewBox="0 0 1213 523" svg:d="M967 523h-720l6-22c5-17 0-34-11-45-18-20-50-20-67 0l-11 11-164-138v-136l164-138 11 11c17 18 49 18 67 0 11-11 16-28 11-44l-6-22h720l-6 22c-3 16 0 33 12 44 18 18 49 18 66 0l12-11 162 138v136l-162 138-12-11c-17-20-48-20-66 0-12 11-15 28-12 45zM290 488h634c0-23 9-43 25-58 27-27 72-32 104-11l125-107v-104l-127-107c-30 22-75 17-102-9-16-15-25-35-25-57h-633c-1 22-9 42-24 57-28 26-74 31-104 9l-126 107v104l126 107c30-21 76-16 104 11 15 15 23 35 23 58z">
          <text:p/>
        </draw:path>
        <draw:polygon draw:style-name="gr1" draw:text-style-name="P1" draw:layer="layout" svg:width="1.504cm" svg:height="0.754cm" svg:x="7.853cm" svg:y="21.061cm" svg:viewBox="0 0 1505 755" draw:points="1505,464 1505,291 1275,0 231,0 0,291 0,464 231,755 1274,755">
          <text:p/>
        </draw:polygon>
        <draw:path draw:style-name="gr4" draw:text-style-name="P4" draw:layer="layout" svg:width="1.544cm" svg:height="0.794cm" svg:x="7.833cm" svg:y="21.041cm" svg:viewBox="0 0 1545 795" svg:d="M1305 795h-1063l-242-305v-187l242-303h1063l240 303v187zM262 753h1024l219-277v-158l-219-277h-1024l-221 277v158z">
          <text:p/>
        </draw:path>
        <draw:polygon draw:style-name="gr4" draw:text-style-name="P4" draw:layer="layout" svg:width="0.324cm" svg:height="0.39cm" svg:x="7.853cm" svg:y="21.055cm" svg:viewBox="0 0 325 391" draw:points="15,391 0,377 308,0 325,12">
          <text:p/>
        </draw:polygon>
        <draw:polygon draw:style-name="gr4" draw:text-style-name="P4" draw:layer="layout" svg:width="0.324cm" svg:height="0.39cm" svg:x="9.042cm" svg:y="21.055cm" svg:viewBox="0 0 325 391" draw:points="308,391 0,12 15,0 325,377">
          <text:p/>
        </draw:polygon>
        <draw:polygon draw:style-name="gr4" draw:text-style-name="P4" draw:layer="layout" svg:width="0.324cm" svg:height="0.39cm" svg:x="7.853cm" svg:y="21.431cm" svg:viewBox="0 0 325 391" draw:points="308,391 0,14 15,0 325,378">
          <text:p/>
        </draw:polygon>
        <draw:polygon draw:style-name="gr4" draw:text-style-name="P4" draw:layer="layout" svg:width="0.324cm" svg:height="0.39cm" svg:x="9.042cm" svg:y="21.431cm" svg:viewBox="0 0 325 391" draw:points="15,391 0,378 308,0 325,14">
          <text:p/>
        </draw:polygon>
        <draw:path draw:style-name="gr1" draw:text-style-name="P1" draw:layer="layout" svg:width="1.177cm" svg:height="0.486cm" svg:x="7.472cm" svg:y="23.026cm" svg:viewBox="0 0 1178 487" svg:d="M1034 63c-25 26-66 26-92 0-17-18-23-41-17-63h-672c5 22 0 45-17 63-24 26-66 26-92 0l-144 121v60 61l144 121c26-25 68-25 92 0 17 17 22 41 17 61h672c-6-20 0-44 17-61 26-25 67-25 92 0l144-121v-61-60z">
          <text:p/>
        </draw:path>
        <draw:path draw:style-name="gr4" draw:text-style-name="P4" draw:layer="layout" svg:width="1.212cm" svg:height="0.521cm" svg:x="7.453cm" svg:y="23.009cm" svg:viewBox="0 0 1213 522" svg:d="M967 522h-720l6-21c5-17 0-34-11-46-18-18-50-17-67 0l-11 12-164-136v-138l164-138 11 10c17 19 49 19 67 0 11-10 16-27 11-44l-6-21h720l-6 21c-3 17 0 34 12 44 18 19 49 19 66 0l12-10 162 138v138l-162 136-12-12c-17-17-48-17-66 0-12 12-15 29-12 46zM290 487h634c0-21 9-41 25-56 27-28 72-31 104-11l125-107v-104l-127-107c-30 20-75 16-102-12-16-14-25-35-25-55h-633c-1 20-9 41-24 55-28 28-74 32-104 12l-126 107v104l126 107c30-20 76-17 104 11 15 15 23 35 23 56z">
          <text:p/>
        </draw:path>
        <draw:polygon draw:style-name="gr1" draw:text-style-name="P1" draw:layer="layout" svg:width="1.504cm" svg:height="0.753cm" svg:x="7.853cm" svg:y="22.892cm" svg:viewBox="0 0 1505 754" draw:points="1505,465 1505,292 1275,0 231,0 0,292 0,465 231,754 1274,754">
          <text:p/>
        </draw:polygon>
        <draw:path draw:style-name="gr4" draw:text-style-name="P4" draw:layer="layout" svg:width="1.544cm" svg:height="0.792cm" svg:x="7.833cm" svg:y="22.873cm" svg:viewBox="0 0 1545 793" svg:d="M1305 793h-1063l-242-304v-187l242-302h1063l240 302v187zM262 755h1024l219-281v-158l-219-277h-1024l-221 277v158z">
          <text:p/>
        </draw:path>
        <draw:path draw:style-name="gr4" draw:text-style-name="P4" draw:layer="layout" svg:width="0.072cm" svg:height="0.335cm" svg:x="7.905cm" svg:y="23.102cm" svg:viewBox="0 0 73 336" svg:d="M18 336l-18-12c32-44 50-98 50-157 0-55-18-109-50-155l17-12c36 49 56 107 56 167 0 64-19 120-55 169z">
          <text:p/>
        </draw:path>
        <draw:path draw:style-name="gr4" draw:text-style-name="P4" draw:layer="layout" svg:width="0.071cm" svg:height="0.335cm" svg:x="9.235cm" svg:y="23.102cm" svg:viewBox="0 0 72 336" svg:d="M54 336c-36-49-54-105-54-169 0-60 18-118 56-167l16 12c-33 46-51 100-51 155 0 59 18 113 50 157z">
          <text:p/>
        </draw:path>
        <draw:path draw:style-name="gr4" draw:text-style-name="P4" draw:layer="layout" svg:width="0.404cm" svg:height="0.288cm" svg:x="7.935cm" svg:y="22.883cm" svg:viewBox="0 0 405 289" svg:d="M20 289l-20-6c0-2 16-72 97-110 6-33 46-173 308-173v21c-273 0-287 158-288 159v6l-5 3c-76 36-92 98-92 100z">
          <text:p/>
        </draw:path>
        <draw:path draw:style-name="gr4" draw:text-style-name="P4" draw:layer="layout" svg:width="0.404cm" svg:height="0.288cm" svg:x="8.873cm" svg:y="22.883cm" svg:viewBox="0 0 405 289" svg:d="M384 289c0-3-14-66-90-100l-6-3v-6c-2-6-16-159-288-159v-21c262 0 301 140 307 173 82 38 97 108 98 110z">
          <text:p/>
        </draw:path>
        <draw:path draw:style-name="gr1" draw:text-style-name="P1" draw:layer="layout" svg:width="0.049cm" svg:height="0.051cm" svg:x="9.219cm" svg:y="23.244cm" svg:viewBox="0 0 50 52" svg:d="M50 25c0-12-11-25-23-25-16 0-27 13-27 25 0 16 11 27 27 27 12 0 23-11 23-27z">
          <text:p/>
        </draw:path>
        <draw:path draw:style-name="gr4" draw:text-style-name="P4" draw:layer="layout" svg:width="0.067cm" svg:height="0.069cm" svg:x="9.21cm" svg:y="23.235cm" svg:viewBox="0 0 68 70" svg:d="M35 70c-20 0-35-16-35-36 0-19 15-34 35-34 9 0 17 5 23 11s10 14 10 23c0 20-15 36-33 36zM35 19c-9 0-17 7-17 15 0 9 8 17 17 17 7 0 15-8 15-17 0-5-2-8-5-11s-7-4-10-4z">
          <text:p/>
        </draw:path>
        <draw:path draw:style-name="gr1" draw:text-style-name="P1" draw:layer="layout" svg:width="0.049cm" svg:height="0.051cm" svg:x="7.943cm" svg:y="23.244cm" svg:viewBox="0 0 50 52" svg:d="M50 25c0-12-11-25-23-25-16 0-27 13-27 25 0 16 11 27 27 27 12 0 23-11 23-27z">
          <text:p/>
        </draw:path>
        <draw:path draw:style-name="gr4" draw:text-style-name="P4" draw:layer="layout" svg:width="0.067cm" svg:height="0.069cm" svg:x="7.934cm" svg:y="23.235cm" svg:viewBox="0 0 68 70" svg:d="M36 70c-20 0-36-16-36-36 0-19 16-34 36-34 8 0 17 5 23 11s9 14 9 23c0 20-15 36-32 36zM36 19c-9 0-18 7-18 15 0 9 9 17 18 17 8 0 14-8 14-17 0-5 0-8-3-11s-8-4-11-4z">
          <text:p/>
        </draw:path>
        <draw:path draw:style-name="gr4" draw:text-style-name="P4" draw:layer="layout" svg:width="0.404cm" svg:height="0.288cm" svg:x="7.935cm" svg:y="23.368cm" svg:viewBox="0 0 405 289" svg:d="M405 289c-262 0-302-139-308-171-81-41-97-110-97-113l20-5c2 2 16 66 92 100l5 3v7c1 6 15 159 288 159z">
          <text:p/>
        </draw:path>
        <draw:path draw:style-name="gr4" draw:text-style-name="P4" draw:layer="layout" svg:width="0.404cm" svg:height="0.288cm" svg:x="8.873cm" svg:y="23.368cm" svg:viewBox="0 0 405 289" svg:d="M0 289v-20c274 0 288-159 288-159v-7l6-3c76-34 90-100 90-100l21 5c-1 3-16 72-98 113-6 32-45 171-307 171z">
          <text:p/>
        </draw:path>
        <draw:path draw:style-name="gr1" draw:text-style-name="P1" draw:layer="layout" svg:width="1.177cm" svg:height="0.488cm" svg:x="7.472cm" svg:y="24.857cm" svg:viewBox="0 0 1178 489" svg:d="M1034 61c-25 25-66 25-92 0-17-17-23-40-17-61h-672c5 21 0 44-17 61-24 25-66 25-92 0l-144 123v62 60l144 120c26-24 68-24 92 0 17 17 22 40 17 63h672c-6-23 0-46 17-63 26-24 67-24 92 0l144-120v-60-62z">
          <text:p/>
        </draw:path>
        <draw:path draw:style-name="gr4" draw:text-style-name="P4" draw:layer="layout" svg:width="1.212cm" svg:height="0.522cm" svg:x="7.453cm" svg:y="24.84cm" svg:viewBox="0 0 1213 523" svg:d="M967 523h-720l6-23c5-15 0-33-11-44-18-18-50-18-67 0l-11 11-164-138v-137l164-138 11 12c17 17 49 17 67 0 11-12 16-29 11-44l-6-22h720l-6 22c-3 15 0 32 12 44 18 17 49 17 66 0l12-12 162 138v137l-162 138-12-11c-17-18-48-18-66 0-12 11-15 29-12 44zM290 488h634c0-23 9-42 25-58 27-27 72-32 104-12l125-107v-103l-127-107c-30 22-75 17-102-10-16-16-25-36-25-57h-633c-1 21-9 41-24 57-28 27-74 32-104 10l-126 107v103l126 107c30-20 76-17 104 12 15 16 23 35 23 58z">
          <text:p/>
        </draw:path>
        <draw:polygon draw:style-name="gr1" draw:text-style-name="P1" draw:layer="layout" svg:width="1.504cm" svg:height="0.753cm" svg:x="7.853cm" svg:y="24.724cm" svg:viewBox="0 0 1505 754" draw:points="1505,462 1505,291 1275,0 231,0 0,291 0,462 231,754 1274,754">
          <text:p/>
        </draw:polygon>
        <draw:path draw:style-name="gr4" draw:text-style-name="P4" draw:layer="layout" svg:width="1.544cm" svg:height="0.794cm" svg:x="7.833cm" svg:y="24.704cm" svg:viewBox="0 0 1545 795" svg:d="M1305 795h-1063l-242-304v-185l242-306h1063l240 306v185zM262 754h1024l219-277v-158l-219-279h-1024l-221 279v158z">
          <text:p/>
        </draw:path>
        <draw:path draw:style-name="gr4" draw:text-style-name="P4" draw:layer="layout" svg:width="0.072cm" svg:height="0.338cm" svg:x="7.905cm" svg:y="24.932cm" svg:viewBox="0 0 73 339" svg:d="M18 339l-18-14c32-44 50-99 50-155 0-57-18-110-50-156l17-14c36 52 56 110 56 170 0 62-19 120-55 169z">
          <text:p/>
        </draw:path>
        <draw:path draw:style-name="gr1" draw:text-style-name="P1" draw:layer="layout" svg:width="0.141cm" svg:height="0.094cm" svg:x="7.868cm" svg:y="25.054cm" svg:viewBox="0 0 142 95" svg:d="M76 90c6 3 12 5 20 5 24 0 46-22 46-46 0-26-22-49-46-49-8 0-14 2-20 5l-3 2c0 1-3 1-3 1l-70 41 70 38c0 0 3 0 3 2z">
          <text:p/>
        </draw:path>
        <draw:path draw:style-name="gr4" draw:text-style-name="P4" draw:layer="layout" svg:width="0.168cm" svg:height="0.112cm" svg:x="7.85cm" svg:y="25.046cm" svg:viewBox="0 0 169 113" svg:d="M114 113c-8 0-14-3-21-6l-5-2c-2-1-3-1-6-3l-82-47 85-46c0 0 1-1 3-1l3-3c38-17 78 12 78 50 0 31-24 58-55 58zM38 55l62 37c5 1 9 3 14 3 20 0 38-20 38-40s-18-36-38-36c-5 0-9 1-14 3l-3 1c-3 2-3 2-3 2z">
          <text:p/>
        </draw:path>
        <draw:path draw:style-name="gr4" draw:text-style-name="P4" draw:layer="layout" svg:width="0.222cm" svg:height="0.354cm" svg:x="7.978cm" svg:y="24.716cm" svg:viewBox="0 0 223 355" svg:d="M5 355c0-2-14-51 4-121 19-64 68-156 205-234l9 16c-250 145-203 327-200 334z">
          <text:p/>
        </draw:path>
        <draw:path draw:style-name="gr4" draw:text-style-name="P4" draw:layer="layout" svg:width="0.222cm" svg:height="0.353cm" svg:x="7.978cm" svg:y="25.131cm" svg:viewBox="0 0 223 354" svg:d="M214 354c-137-78-186-168-205-232-18-67-4-119-4-122l18 6c-3 8-50 189 200 333z">
          <text:p/>
        </draw:path>
        <draw:path draw:style-name="gr4" draw:text-style-name="P4" draw:layer="layout" svg:width="0.469cm" svg:height="0.1cm" svg:x="8.073cm" svg:y="25.38cm" svg:viewBox="0 0 470 101" svg:d="M469 101l-18-5c2 0 6-24-12-41-14-14-52-26-139-3-190 50-297-34-300-37l11-15c0 0 104 81 284 35 78-20 130-17 158 9 23 23 16 54 16 57z">
          <text:p/>
        </draw:path>
        <draw:path draw:style-name="gr4" draw:text-style-name="P4" draw:layer="layout" svg:width="0.071cm" svg:height="0.338cm" svg:x="9.235cm" svg:y="24.932cm" svg:viewBox="0 0 72 339" svg:d="M54 339c-36-49-54-107-54-169 0-60 18-118 56-170l16 14c-33 46-51 99-51 156 0 58 18 111 50 155z">
          <text:p/>
        </draw:path>
        <draw:path draw:style-name="gr1" draw:text-style-name="P1" draw:layer="layout" svg:width="0.141cm" svg:height="0.094cm" svg:x="9.202cm" svg:y="25.054cm" svg:viewBox="0 0 142 95" svg:d="M67 90c-6 3-12 5-18 5-29 0-49-22-49-46 0-26 20-49 49-49 6 0 12 2 18 5l3 2c2 1 2 1 3 1l69 41-69 38c-1 0-1 0-3 2z">
          <text:p/>
        </draw:path>
        <draw:path draw:style-name="gr4" draw:text-style-name="P4" draw:layer="layout" svg:width="0.169cm" svg:height="0.112cm" svg:x="9.193cm" svg:y="25.045cm" svg:viewBox="0 0 170 113" svg:d="M57 113c-31 0-57-27-57-58 0-30 26-55 57-55 6 0 15 2 21 5l5 3c1 0 3 1 3 3l84 44-84 49c0 0-2 0-3 0l-5 3c-6 3-15 6-21 6zM57 19c-22 0-38 16-38 36s16 39 38 39c4 0 9-2 14-3l62-36-55-30c-1 0-3 0-3-2l-4-1c-5-2-10-3-14-3z">
          <text:p/>
        </draw:path>
        <draw:path draw:style-name="gr4" draw:text-style-name="P4" draw:layer="layout" svg:width="0.222cm" svg:height="0.354cm" svg:x="9.011cm" svg:y="24.716cm" svg:viewBox="0 0 223 355" svg:d="M217 355l-17-5c3-7 52-189-200-334l9-16c138 78 188 170 205 234 18 70 4 119 3 121z">
          <text:p/>
        </draw:path>
        <draw:path draw:style-name="gr4" draw:text-style-name="P4" draw:layer="layout" svg:width="0.222cm" svg:height="0.353cm" svg:x="9.011cm" svg:y="25.131cm" svg:viewBox="0 0 223 354" svg:d="M9 354l-9-15c252-144 203-325 200-333l17-6c1 3 15 55-3 122-17 64-67 154-205 232z">
          <text:p/>
        </draw:path>
        <draw:path draw:style-name="gr4" draw:text-style-name="P4" draw:layer="layout" svg:width="0.471cm" svg:height="0.1cm" svg:x="8.669cm" svg:y="25.38cm" svg:viewBox="0 0 472 101" svg:d="M1 101c0-3-6-34 18-57 29-26 81-29 159-9 177 46 281-35 283-35l11 15c-5 3-112 87-300 37-87-23-124-11-139 4-18 16-14 40-14 40z">
          <text:p/>
        </draw:path>
        <draw:path draw:style-name="gr4" draw:text-style-name="P4" draw:layer="layout" svg:width="0.469cm" svg:height="0.098cm" svg:x="8.073cm" svg:y="24.722cm" svg:viewBox="0 0 470 99" svg:d="M11 99l-11-12c3-4 110-90 300-40 88 25 125 11 139-3 18-17 14-41 14-41l16-3c0 2 7 34-16 57-28 27-80 30-158 10-180-50-284 32-284 32z">
          <text:p/>
        </draw:path>
        <draw:path draw:style-name="gr4" draw:text-style-name="P4" draw:layer="layout" svg:width="0.471cm" svg:height="0.098cm" svg:x="8.669cm" svg:y="24.722cm" svg:viewBox="0 0 472 99" svg:d="M461 99c-2 0-106-82-283-32-78 20-130 17-159-10-24-23-18-55-18-57l18 3c0 2-4 26 14 41 15 14 52 28 139 3 188-50 295 36 300 40z">
          <text:p/>
        </draw:path>
        <draw:path draw:style-name="gr1" draw:text-style-name="P1" draw:layer="layout" svg:width="1.177cm" svg:height="0.487cm" svg:x="7.472cm" svg:y="23.942cm" svg:viewBox="0 0 1178 488" svg:d="M1034 61c-25 26-66 26-92 0-17-17-23-41-17-61h-672c5 20 0 44-17 61-24 26-66 26-92 0l-144 124v59 60l144 121c26-25 68-25 92 0 17 18 22 41 17 63h672c-6-22 0-45 17-63 26-25 67-25 92 0l144-121v-60-59z">
          <text:p/>
        </draw:path>
        <draw:path draw:style-name="gr4" draw:text-style-name="P4" draw:layer="layout" svg:width="1.212cm" svg:height="0.523cm" svg:x="7.453cm" svg:y="23.924cm" svg:viewBox="0 0 1213 524" svg:d="M967 524h-720l6-23c5-17 0-32-11-44-18-19-50-19-67 0l-11 10-164-137v-138l164-137 11 12c17 17 49 17 67 0 11-12 16-29 11-46l-6-21h720l-6 21c-3 17 0 34 12 46 18 17 49 17 66 0l12-12 162 137v138l-162 137-12-10c-17-19-48-19-66 0-12 12-15 27-12 44zM290 487h634c0-21 9-41 25-55 27-27 72-32 104-11l125-108v-105l-127-106c-30 20-75 17-102-10-16-16-25-36-25-57h-633c-1 21-9 41-24 57-28 27-74 30-104 10l-126 106v105l126 108c30-21 76-16 104 11 15 14 23 34 23 55z">
          <text:p/>
        </draw:path>
        <draw:polygon draw:style-name="gr1" draw:text-style-name="P1" draw:layer="layout" svg:width="1.504cm" svg:height="0.753cm" svg:x="7.853cm" svg:y="23.809cm" svg:viewBox="0 0 1505 754" draw:points="1505,462 1505,289 1275,0 231,0 0,289 0,462 231,754 1274,754">
          <text:p/>
        </draw:polygon>
        <draw:path draw:style-name="gr4" draw:text-style-name="P4" draw:layer="layout" svg:width="1.544cm" svg:height="0.793cm" svg:x="7.833cm" svg:y="23.789cm" svg:viewBox="0 0 1545 794" svg:d="M1305 794h-1063l-242-303v-188l242-303h1063l240 303v188zM262 754h1024l219-277v-160l-219-277h-1024l-221 277v160z">
          <text:p/>
        </draw:path>
        <draw:path draw:style-name="gr4" draw:text-style-name="P4" draw:layer="layout" svg:width="0.072cm" svg:height="0.337cm" svg:x="7.905cm" svg:y="24.017cm" svg:viewBox="0 0 73 338" svg:d="M18 338l-18-13c32-45 50-99 50-156 0-55-18-110-50-156l17-13c36 50 56 108 56 169 0 60-19 120-55 169z">
          <text:p/>
        </draw:path>
        <draw:path draw:style-name="gr4" draw:text-style-name="P4" draw:layer="layout" svg:width="0.071cm" svg:height="0.337cm" svg:x="9.235cm" svg:y="24.017cm" svg:viewBox="0 0 72 338" svg:d="M54 338c-36-49-54-109-54-169 0-61 18-119 56-169l16 13c-33 46-51 101-51 156 0 57 18 111 50 156z">
          <text:p/>
        </draw:path>
        <draw:path draw:style-name="gr1" draw:text-style-name="P1" draw:layer="layout" svg:width="0.071cm" svg:height="0.069cm" svg:x="7.932cm" svg:y="24.15cm" svg:viewBox="0 0 72 70" svg:d="M0 36c0-21 18-36 37-36s35 15 35 36c0 20-16 34-35 34s-37-14-37-34z">
          <text:p/>
        </draw:path>
        <draw:path draw:style-name="gr4" draw:text-style-name="P4" draw:layer="layout" svg:width="0.089cm" svg:height="0.087cm" svg:x="7.923cm" svg:y="24.141cm" svg:viewBox="0 0 90 88" svg:d="M47 88c-27 0-47-18-47-45 0-11 5-22 14-31 8-7 20-12 33-12 23 0 43 20 43 43 0 27-20 45-43 45zM47 17c-9 0-16 3-21 9-4 5-7 11-7 17 0 15 10 28 28 28 14 0 25-13 25-28 0-14-11-26-25-26z">
          <text:p/>
        </draw:path>
        <draw:path draw:style-name="gr1" draw:text-style-name="P1" draw:layer="layout" svg:width="0.07cm" svg:height="0.069cm" svg:x="9.209cm" svg:y="24.15cm" svg:viewBox="0 0 71 70" svg:d="M71 36c0-21-15-36-34-36-20 0-37 15-37 36 0 20 17 34 37 34 19 0 34-14 34-34z">
          <text:p/>
        </draw:path>
        <draw:path draw:style-name="gr4" draw:text-style-name="P4" draw:layer="layout" svg:width="0.089cm" svg:height="0.087cm" svg:x="9.199cm" svg:y="24.141cm" svg:viewBox="0 0 90 88" svg:d="M45 88c-25 0-45-18-45-45 0-23 20-43 45-43 12 0 23 5 30 12 11 9 15 20 15 31 0 27-21 45-45 45zM45 17c-14 0-26 12-26 26 0 15 12 28 26 28 15 0 26-13 26-28 0-6-2-12-8-17-5-6-11-9-18-9z">
          <text:p/>
        </draw:path>
        <draw:path draw:style-name="gr4" draw:text-style-name="P4" draw:layer="layout" svg:width="0.084cm" svg:height="0.096cm" svg:x="9.262cm" svg:y="24.071cm" svg:viewBox="0 0 85 97" svg:d="M20 97l-20-3c2-3 11-69 78-94l7 16c-57 23-65 79-65 81z">
          <text:p/>
        </draw:path>
        <draw:path draw:style-name="gr4" draw:text-style-name="P4" draw:layer="layout" svg:width="0.326cm" svg:height="0.283cm" svg:x="8.948cm" svg:y="23.803cm" svg:viewBox="0 0 327 284" svg:d="M312 284l-138-179c-1 0-29-28-73 3l-6 5-95-101 14-12 84 90c53-33 90 4 90 4l139 179z">
          <text:p/>
        </draw:path>
        <draw:path draw:style-name="gr4" draw:text-style-name="P4" draw:layer="layout" svg:width="0.084cm" svg:height="0.096cm" svg:x="9.262cm" svg:y="24.204cm" svg:viewBox="0 0 85 97" svg:d="M78 97c-67-26-76-91-78-94l20-3c0 3 9 59 65 79z">
          <text:p/>
        </draw:path>
        <draw:path draw:style-name="gr4" draw:text-style-name="P4" draw:layer="layout" svg:width="0.326cm" svg:height="0.283cm" svg:x="8.948cm" svg:y="24.285cm" svg:viewBox="0 0 327 284" svg:d="M14 284l-14-12 95-100 6 3c46 31 72 3 73 2l138-177 15 11-139 178c0 0-37 38-90 6z">
          <text:p/>
        </draw:path>
        <draw:path draw:style-name="gr4" draw:text-style-name="P4" draw:layer="layout" svg:width="0.083cm" svg:height="0.096cm" svg:x="7.868cm" svg:y="24.071cm" svg:viewBox="0 0 84 97" svg:d="M65 97c0-3-10-58-65-81l6-16c67 25 76 91 78 94z">
          <text:p/>
        </draw:path>
        <draw:path draw:style-name="gr4" draw:text-style-name="P4" draw:layer="layout" svg:width="0.325cm" svg:height="0.283cm" svg:x="7.939cm" svg:y="23.803cm" svg:viewBox="0 0 326 284" svg:d="M13 284l-13-11 140-177c0-2 36-39 90-6l84-90 12 12-93 101-6-5c-46-31-72-3-75-2z">
          <text:p/>
        </draw:path>
        <draw:path draw:style-name="gr4" draw:text-style-name="P4" draw:layer="layout" svg:width="0.083cm" svg:height="0.096cm" svg:x="7.868cm" svg:y="24.204cm" svg:viewBox="0 0 84 97" svg:d="M6 97l-6-18c57-20 65-79 65-79l19 3c-2 3-11 68-78 94z">
          <text:p/>
        </draw:path>
        <draw:path draw:style-name="gr4" draw:text-style-name="P4" draw:layer="layout" svg:width="0.325cm" svg:height="0.283cm" svg:x="7.939cm" svg:y="24.285cm" svg:viewBox="0 0 326 284" svg:d="M314 284l-84-89c-54 32-90-6-90-6l-140-178 13-11 141 177c1 1 29 29 73-2l6-3 93 100z">
          <text:p/>
        </draw:path>
        <draw:path draw:style-name="gr1" draw:text-style-name="P1" draw:layer="layout" svg:width="1.177cm" svg:height="0.486cm" svg:x="7.472cm" svg:y="22.111cm" svg:viewBox="0 0 1178 487" svg:d="M1034 62c-25 24-66 24-92 0-17-17-23-40-17-62h-672c5 22 0 45-17 62-24 24-66 24-92 0l-144 122v60 59l144 121c26-24 68-24 92 0 17 17 22 42 17 63h672c-6-21 0-46 17-63 26-24 67-24 92 0l144-121v-59-60z">
          <text:p/>
        </draw:path>
        <draw:path draw:style-name="gr4" draw:text-style-name="P4" draw:layer="layout" svg:width="1.212cm" svg:height="0.522cm" svg:x="7.453cm" svg:y="22.092cm" svg:viewBox="0 0 1213 523" svg:d="M967 523h-720l6-22c5-15 0-33-11-44-18-18-50-18-67 0l-11 11-164-136v-138l164-137 11 12c17 17 49 17 67 0 11-12 16-31 11-46l-6-23h720l-6 23c-3 15 0 34 12 46 18 17 49 17 66 0l12-12 162 137v138l-162 136-12-11c-17-18-48-18-66 0-12 11-15 29-12 44zM290 489h634c0-21 9-41 25-56 27-28 72-32 104-11l125-107v-104l-127-106c-30 20-75 17-102-13-16-14-25-35-25-57h-633c-1 22-9 43-24 59-28 28-74 31-104 11l-126 106v104l126 107c30-21 76-17 104 11 15 15 23 35 23 56z">
          <text:p/>
        </draw:path>
        <draw:polygon draw:style-name="gr1" draw:text-style-name="P1" draw:layer="layout" svg:width="1.504cm" svg:height="0.754cm" svg:x="7.853cm" svg:y="21.976cm" svg:viewBox="0 0 1505 755" draw:points="1505,464 1505,293 1275,0 231,0 0,293 0,464 231,755 1274,755">
          <text:p/>
        </draw:polygon>
        <draw:path draw:style-name="gr4" draw:text-style-name="P4" draw:layer="layout" svg:width="1.544cm" svg:height="0.793cm" svg:x="7.833cm" svg:y="21.957cm" svg:viewBox="0 0 1545 794" svg:d="M1305 794h-1063l-242-305v-186l242-303h1063l240 303v186zM262 754h1024l219-279v-158l-219-278h-1024l-221 278v158z">
          <text:p/>
        </draw:path>
        <draw:path draw:style-name="gr4" draw:text-style-name="P4" draw:layer="layout" svg:width="0.071cm" svg:height="0.07cm" svg:x="7.932cm" svg:y="22.319cm" svg:viewBox="0 0 72 71" svg:d="M0 36c0-19 18-36 37-36s35 17 35 36c0 20-16 35-35 35s-37-15-37-35z">
          <text:p/>
        </draw:path>
        <draw:polygon draw:style-name="gr4" draw:text-style-name="P4" draw:layer="layout" svg:width="0.24cm" svg:height="0.286cm" svg:x="7.937cm" svg:y="22.45cm" svg:viewBox="0 0 241 287" draw:points="224,287 0,14 17,0 241,275">
          <text:p/>
        </draw:polygon>
        <draw:polygon draw:style-name="gr4" draw:text-style-name="P4" draw:layer="layout" svg:width="0.24cm" svg:height="0.285cm" svg:x="7.937cm" svg:y="21.971cm" svg:viewBox="0 0 241 286" draw:points="15,286 0,274 224,0 241,13">
          <text:p/>
        </draw:polygon>
        <draw:path draw:style-name="gr4" draw:text-style-name="P4" draw:layer="layout" svg:width="0.072cm" svg:height="0.337cm" svg:x="7.905cm" svg:y="22.185cm" svg:viewBox="0 0 73 338" svg:d="M18 338l-18-12c32-46 50-98 50-156 0-56-18-110-50-156l17-14c36 51 56 109 56 170s-19 119-55 168z">
          <text:p/>
        </draw:path>
        <draw:path draw:style-name="gr4" draw:text-style-name="P4" draw:layer="layout" svg:width="0.07cm" svg:height="0.07cm" svg:x="9.209cm" svg:y="22.319cm" svg:viewBox="0 0 71 71" svg:d="M71 36c0-19-15-36-34-36-20 0-37 17-37 36 0 20 17 35 37 35 19 0 34-15 34-35z">
          <text:p/>
        </draw:path>
        <draw:polygon draw:style-name="gr4" draw:text-style-name="P4" draw:layer="layout" svg:width="0.242cm" svg:height="0.286cm" svg:x="9.034cm" svg:y="22.45cm" svg:viewBox="0 0 243 287" draw:points="18,287 0,275 226,0 243,14">
          <text:p/>
        </draw:polygon>
        <draw:polygon draw:style-name="gr4" draw:text-style-name="P4" draw:layer="layout" svg:width="0.242cm" svg:height="0.285cm" svg:x="9.034cm" svg:y="21.971cm" svg:viewBox="0 0 243 286" draw:points="226,286 0,13 18,0 243,272">
          <text:p/>
        </draw:polygon>
        <draw:path draw:style-name="gr4" draw:text-style-name="P4" draw:layer="layout" svg:width="0.071cm" svg:height="0.337cm" svg:x="9.235cm" svg:y="22.185cm" svg:viewBox="0 0 72 338" svg:d="M54 338c-36-49-54-107-54-168s18-119 56-170l16 14c-33 46-51 100-51 156 0 58 18 110 50 156z">
          <text:p/>
        </draw:path>
        <draw:line draw:style-name="gr10" draw:text-style-name="P5" draw:layer="layout" svg:x1="9.525cm" svg:y1="2.251cm" svg:x2="20.04cm" svg:y2="2.251cm">
          <text:p/>
        </draw:line>
        <draw:line draw:style-name="gr10" draw:text-style-name="P5" draw:layer="layout" svg:x1="9.525cm" svg:y1="3.171cm" svg:x2="20.04cm" svg:y2="3.171cm">
          <text:p/>
        </draw:line>
        <draw:frame draw:style-name="gr11" draw:text-style-name="P8" draw:layer="layout" svg:width="0.667cm" svg:height="0.289cm" svg:x="9.55cm" svg:y="3.168cm">
          <draw:text-box>
            <text:p text:style-name="P7"><text:span text:style-name="T1">RACE</text:span></text:p>
          </draw:text-box>
        </draw:frame>
        <draw:frame draw:style-name="gr12" draw:text-style-name="P8" draw:layer="layout" svg:width="1.886cm" svg:height="0.289cm" svg:x="9.55cm" svg:y="2.248cm">
          <draw:text-box>
            <text:p text:style-name="P7"><text:span text:style-name="T1">CLASS &amp; LEVEL</text:span></text:p>
          </draw:text-box>
        </draw:frame>
        <draw:frame draw:style-name="gr13" draw:text-style-name="P8" draw:layer="layout" svg:width="1.725cm" svg:height="0.289cm" svg:x="16.94cm" svg:y="2.248cm">
          <draw:text-box>
            <text:p text:style-name="P7"><text:span text:style-name="T1">PLAYER NAME</text:span></text:p>
          </draw:text-box>
        </draw:frame>
        <draw:frame draw:style-name="gr14" draw:text-style-name="P8" draw:layer="layout" svg:width="2.305cm" svg:height="0.289cm" svg:x="2.438cm" svg:y="3.175cm">
          <draw:text-box>
            <text:p text:style-name="P7"><text:span text:style-name="T1">CHARACTER NAME</text:span></text:p>
          </draw:text-box>
        </draw:frame>
        <draw:frame draw:style-name="gr15" draw:text-style-name="P8" draw:layer="layout" svg:width="1.776cm" svg:height="0.289cm" svg:x="13.529cm" svg:y="2.248cm">
          <draw:text-box>
            <text:p text:style-name="P7"><text:span text:style-name="T1">BACKGROUND</text:span></text:p>
          </draw:text-box>
        </draw:frame>
        <draw:frame draw:style-name="gr16" draw:text-style-name="P8" draw:layer="layout" svg:width="2.517cm" svg:height="0.289cm" svg:x="16.94cm" svg:y="3.175cm">
          <draw:text-box>
            <text:p text:style-name="P7"><text:span text:style-name="T1">EXPERIENCE POINTS</text:span></text:p>
          </draw:text-box>
        </draw:frame>
        <draw:frame draw:style-name="gr17" draw:text-style-name="P8" draw:layer="layout" svg:width="1.45cm" svg:height="0.289cm" svg:x="13.529cm" svg:y="3.168cm">
          <draw:text-box>
            <text:p text:style-name="P7"><text:span text:style-name="T1">ALIGNMENT</text:span></text:p>
          </draw:text-box>
        </draw:frame>
        <draw:line draw:style-name="gr10" draw:text-style-name="P5" draw:layer="layout" svg:x1="8.71cm" svg:y1="11.573cm" svg:x2="10.396cm" svg:y2="11.573cm">
          <text:p/>
        </draw:line>
        <draw:path draw:style-name="gr1" draw:text-style-name="P1" draw:layer="layout" svg:width="0.211cm" svg:height="0.211cm" svg:x="3.575cm" svg:y="7.348cm" svg:viewBox="0 0 212 212" svg:d="M106 212c58 0 106-46 106-104 0-61-48-108-106-108-59 0-106 47-106 108 0 58 47 104 106 104z">
          <text:p/>
        </draw:path>
        <draw:path draw:style-name="gr4" draw:text-style-name="P4" draw:layer="layout" svg:width="0.236cm" svg:height="0.234cm" svg:x="3.562cm" svg:y="7.337cm" svg:viewBox="0 0 237 235" svg:d="M119 235c-67 0-119-52-119-116 0-66 52-119 119-119 66 0 118 53 118 119 0 64-52 116-118 116zM119 25c-51 0-94 42-94 94 0 51 43 92 94 92 52 0 92-41 92-92 0-52-40-94-92-94z">
          <text:p/>
        </draw:path>
        <draw:frame draw:style-name="gr18" draw:text-style-name="P9" draw:layer="layout" svg:width="10.556cm" svg:height="0.23cm" svg:x="6.156cm" svg:y="27.326cm">
          <draw:text-box>
            <text:p text:style-name="P7"><text:span text:style-name="T2">TM &amp; © 2014 Wizards of the Coast LLC. Permission is granted to photocopy this document for personal use.</text:span></text:p>
          </draw:text-box>
        </draw:frame>
        <draw:line draw:style-name="gr19" draw:text-style-name="P5" draw:layer="layout" svg:x1="3.986cm" svg:y1="7.597cm" svg:x2="4.488cm" svg:y2="7.597cm">
          <text:p/>
        </draw:line>
        <draw:frame draw:style-name="gr20" draw:text-style-name="P8" draw:layer="layout" svg:width="0.246cm" svg:height="0.289cm" svg:x="3.799cm" svg:y="7.342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1cm" svg:x="3.575cm" svg:y="7.824cm" svg:viewBox="0 0 212 212" svg:d="M106 212c58 0 106-46 106-104 0-59-48-108-106-108-59 0-106 49-106 108 0 58 47 104 106 104z">
          <text:p/>
        </draw:path>
        <draw:path draw:style-name="gr4" draw:text-style-name="P4" draw:layer="layout" svg:width="0.236cm" svg:height="0.236cm" svg:x="3.562cm" svg:y="7.813cm" svg:viewBox="0 0 237 237" svg:d="M119 237c-67 0-119-54-119-118 0-67 52-119 119-119 66 0 118 52 118 119 0 64-52 118-118 118zM119 25c-51 0-94 41-94 94 0 50 43 92 94 92 52 0 92-42 92-92 0-53-40-94-92-94z">
          <text:p/>
        </draw:path>
        <draw:frame draw:style-name="gr20" draw:text-style-name="P8" draw:layer="layout" svg:width="0.246cm" svg:height="0.289cm" svg:x="4.487cm" svg:y="7.377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86cm" svg:y1="8.073cm" svg:x2="4.488cm" svg:y2="8.073cm">
          <text:p/>
        </draw:line>
        <draw:frame draw:style-name="gr21" draw:text-style-name="P8" draw:layer="layout" svg:width="1.077cm" svg:height="0.289cm" svg:x="4.621cm" svg:y="7.306cm">
          <draw:text-box>
            <text:p text:style-name="P7"><text:span text:style-name="T1">Strength</text:span></text:p>
          </draw:text-box>
        </draw:frame>
        <draw:frame draw:style-name="gr20" draw:text-style-name="P8" draw:layer="layout" svg:width="0.246cm" svg:height="0.289cm" svg:x="3.799cm" svg:y="7.818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cm" svg:x="3.575cm" svg:y="8.301cm" svg:viewBox="0 0 212 211" svg:d="M106 211c58 0 106-49 106-107 0-56-48-104-106-104-59 0-106 48-106 104 0 58 47 107 106 107z">
          <text:p/>
        </draw:path>
        <draw:path draw:style-name="gr4" draw:text-style-name="P4" draw:layer="layout" svg:width="0.236cm" svg:height="0.236cm" svg:x="3.562cm" svg:y="8.289cm" svg:viewBox="0 0 237 237" svg:d="M119 237c-67 0-119-54-119-118 0-66 52-119 119-119 66 0 118 53 118 119 0 64-52 118-118 118zM119 26c-51 0-94 41-94 93 0 50 43 93 94 93 52 0 92-43 92-93 0-52-40-93-92-93z">
          <text:p/>
        </draw:path>
        <draw:frame draw:style-name="gr20" draw:text-style-name="P8" draw:layer="layout" svg:width="0.246cm" svg:height="0.289cm" svg:x="4.487cm" svg:y="7.853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86cm" svg:y1="8.549cm" svg:x2="4.488cm" svg:y2="8.549cm">
          <text:p/>
        </draw:line>
        <draw:frame draw:style-name="gr22" draw:text-style-name="P8" draw:layer="layout" svg:width="1.149cm" svg:height="0.289cm" svg:x="4.621cm" svg:y="7.783cm">
          <draw:text-box>
            <text:p text:style-name="P7"><text:span text:style-name="T1">Dexterity</text:span></text:p>
          </draw:text-box>
        </draw:frame>
        <draw:frame draw:style-name="gr20" draw:text-style-name="P8" draw:layer="layout" svg:width="0.246cm" svg:height="0.289cm" svg:x="3.799cm" svg:y="8.294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1cm" svg:x="3.575cm" svg:y="8.777cm" svg:viewBox="0 0 212 212" svg:d="M106 212c58 0 106-47 106-105 0-60-48-107-106-107-59 0-106 47-106 107 0 58 47 105 106 105z">
          <text:p/>
        </draw:path>
        <draw:path draw:style-name="gr4" draw:text-style-name="P4" draw:layer="layout" svg:width="0.236cm" svg:height="0.235cm" svg:x="3.562cm" svg:y="8.765cm" svg:viewBox="0 0 237 236" svg:d="M119 236c-67 0-119-52-119-116 0-66 52-120 119-120 66 0 118 54 118 120 0 64-52 116-118 116zM119 26c-51 0-94 42-94 94 0 51 43 92 94 92 52 0 92-41 92-92 0-52-40-94-92-94z">
          <text:p/>
        </draw:path>
        <draw:frame draw:style-name="gr20" draw:text-style-name="P8" draw:layer="layout" svg:width="0.246cm" svg:height="0.289cm" svg:x="4.487cm" svg:y="8.329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86cm" svg:y1="9.026cm" svg:x2="4.488cm" svg:y2="9.026cm">
          <text:p/>
        </draw:line>
        <draw:frame draw:style-name="gr23" draw:text-style-name="P8" draw:layer="layout" svg:width="1.492cm" svg:height="0.289cm" svg:x="4.621cm" svg:y="8.259cm">
          <draw:text-box>
            <text:p text:style-name="P7"><text:span text:style-name="T1">Constitution</text:span></text:p>
          </draw:text-box>
        </draw:frame>
        <draw:frame draw:style-name="gr20" draw:text-style-name="P8" draw:layer="layout" svg:width="0.246cm" svg:height="0.289cm" svg:x="3.799cm" svg:y="8.77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1cm" svg:x="3.575cm" svg:y="9.253cm" svg:viewBox="0 0 212 212" svg:d="M106 212c58 0 106-46 106-104 0-59-48-108-106-108-59 0-106 49-106 108 0 58 47 104 106 104z">
          <text:p/>
        </draw:path>
        <draw:path draw:style-name="gr4" draw:text-style-name="P4" draw:layer="layout" svg:width="0.236cm" svg:height="0.234cm" svg:x="3.562cm" svg:y="9.242cm" svg:viewBox="0 0 237 235" svg:d="M119 235c-67 0-119-52-119-116 0-66 52-119 119-119 66 0 118 53 118 119 0 64-52 116-118 116zM119 27c-51 0-94 40-94 92 0 51 43 92 94 92 52 0 92-41 92-92 0-52-40-92-92-92z">
          <text:p/>
        </draw:path>
        <draw:frame draw:style-name="gr20" draw:text-style-name="P8" draw:layer="layout" svg:width="0.246cm" svg:height="0.289cm" svg:x="4.487cm" svg:y="8.806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86cm" svg:y1="9.502cm" svg:x2="4.488cm" svg:y2="9.502cm">
          <text:p/>
        </draw:line>
        <draw:frame draw:style-name="gr24" draw:text-style-name="P8" draw:layer="layout" svg:width="1.437cm" svg:height="0.289cm" svg:x="4.621cm" svg:y="8.735cm">
          <draw:text-box>
            <text:p text:style-name="P7"><text:span text:style-name="T1">Intelligence</text:span></text:p>
          </draw:text-box>
        </draw:frame>
        <draw:frame draw:style-name="gr20" draw:text-style-name="P8" draw:layer="layout" svg:width="0.246cm" svg:height="0.289cm" svg:x="3.799cm" svg:y="9.247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1cm" svg:x="3.575cm" svg:y="9.729cm" svg:viewBox="0 0 212 212" svg:d="M106 212c58 0 106-48 106-106s-48-106-106-106c-59 0-106 48-106 106s47 106 106 106z">
          <text:p/>
        </draw:path>
        <draw:path draw:style-name="gr4" draw:text-style-name="P4" draw:layer="layout" svg:width="0.236cm" svg:height="0.236cm" svg:x="3.562cm" svg:y="9.718cm" svg:viewBox="0 0 237 237" svg:d="M119 237c-67 0-119-54-119-120 0-65 52-117 119-117 66 0 118 52 118 117 0 66-52 120-118 120zM119 25c-51 0-94 41-94 92s43 92 94 92c52 0 92-41 92-92s-40-92-92-92z">
          <text:p/>
        </draw:path>
        <draw:frame draw:style-name="gr20" draw:text-style-name="P8" draw:layer="layout" svg:width="0.246cm" svg:height="0.289cm" svg:x="4.487cm" svg:y="9.282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86cm" svg:y1="9.978cm" svg:x2="4.488cm" svg:y2="9.978cm">
          <text:p/>
        </draw:line>
        <draw:frame draw:style-name="gr25" draw:text-style-name="P8" draw:layer="layout" svg:width="0.984cm" svg:height="0.289cm" svg:x="4.621cm" svg:y="9.211cm">
          <draw:text-box>
            <text:p text:style-name="P7"><text:span text:style-name="T1">Wisdom</text:span></text:p>
          </draw:text-box>
        </draw:frame>
        <draw:frame draw:style-name="gr20" draw:text-style-name="P8" draw:layer="layout" svg:width="0.246cm" svg:height="0.289cm" svg:x="3.799cm" svg:y="9.723cm">
          <draw:text-box>
            <text:p text:style-name="P7"><text:span text:style-name="T1"><text:s/></text:span></text:p>
          </draw:text-box>
        </draw:frame>
        <draw:frame draw:style-name="gr20" draw:text-style-name="P8" draw:layer="layout" svg:width="0.246cm" svg:height="0.289cm" svg:x="4.487cm" svg:y="9.758cm">
          <draw:text-box>
            <text:p text:style-name="P7"><text:span text:style-name="T1"><text:s/></text:span></text:p>
          </draw:text-box>
        </draw:frame>
        <draw:frame draw:style-name="gr26" draw:text-style-name="P8" draw:layer="layout" svg:width="1.166cm" svg:height="0.289cm" svg:x="4.621cm" svg:y="9.688cm">
          <draw:text-box>
            <text:p text:style-name="P7"><text:span text:style-name="T1">Charisma</text:span></text:p>
          </draw:text-box>
        </draw:frame>
        <draw:frame draw:style-name="gr27" draw:text-style-name="P10" draw:layer="layout" svg:width="0.269cm" svg:height="0.239cm" svg:x="7.549cm" svg:y="21.322cm">
          <draw:text-box>
            <text:p text:style-name="P7"><text:span text:style-name="T3">CP</text:span></text:p>
          </draw:text-box>
        </draw:frame>
        <draw:frame draw:style-name="gr28" draw:text-style-name="P10" draw:layer="layout" svg:width="0.252cm" svg:height="0.239cm" svg:x="7.557cm" svg:y="23.15cm">
          <draw:text-box>
            <text:p text:style-name="P7"><text:span text:style-name="T3">EP</text:span></text:p>
          </draw:text-box>
        </draw:frame>
        <draw:frame draw:style-name="gr29" draw:text-style-name="P10" draw:layer="layout" svg:width="0.248cm" svg:height="0.239cm" svg:x="7.553cm" svg:y="24.977cm">
          <draw:text-box>
            <text:p text:style-name="P7"><text:span text:style-name="T3">PP</text:span></text:p>
          </draw:text-box>
        </draw:frame>
        <draw:frame draw:style-name="gr30" draw:text-style-name="P10" draw:layer="layout" svg:width="0.281cm" svg:height="0.239cm" svg:x="7.539cm" svg:y="24.071cm">
          <draw:text-box>
            <text:p text:style-name="P7"><text:span text:style-name="T3">GP</text:span></text:p>
          </draw:text-box>
        </draw:frame>
        <draw:frame draw:style-name="gr28" draw:text-style-name="P10" draw:layer="layout" svg:width="0.252cm" svg:height="0.239cm" svg:x="7.557cm" svg:y="22.233cm">
          <draw:text-box>
            <text:p text:style-name="P7"><text:span text:style-name="T3">SP</text:span></text:p>
          </draw:text-box>
        </draw:frame>
        <draw:frame draw:style-name="gr31" draw:text-style-name="P10" draw:layer="layout" svg:width="3.296cm" svg:height="0.239cm" svg:x="3.122cm" svg:y="21.033cm">
          <draw:text-box>
            <text:p text:style-name="P7"><text:span text:style-name="T4">PASSIVE WISDOM (PERCEPTION)</text:span></text:p>
          </draw:text-box>
        </draw:frame>
        <draw:frame draw:style-name="gr32" draw:text-style-name="P11" draw:layer="layout" svg:width="1.526cm" svg:height="0.268cm" svg:x="10.178cm" svg:y="26.715cm">
          <draw:text-box>
            <text:p text:style-name="P7"><text:span text:style-name="T5">EQUIPMENT</text:span></text:p>
          </draw:text-box>
        </draw:frame>
        <draw:frame draw:style-name="gr33" draw:text-style-name="P11" draw:layer="layout" svg:width="4.849cm" svg:height="0.268cm" svg:x="2.177cm" svg:y="26.715cm">
          <draw:text-box>
            <text:p text:style-name="P7"><text:span text:style-name="T5">OTHER PROFICIENCIES &amp; LANGUAGES</text:span></text:p>
          </draw:text-box>
        </draw:frame>
        <draw:path draw:style-name="gr4" draw:text-style-name="P4" draw:layer="layout" svg:width="4.053cm" svg:height="9.473cm" svg:x="3.249cm" svg:y="10.971cm" svg:viewBox="0 0 4054 9474" svg:d="M3971 8048v-6623c13-181 39-548 80-683l3-9-9-6c0 0-26-17-52-43 9-49 20-96 33-136l2-6-35-398-17-5c-35-12-139-56-139-116v-23h-3620v23c0 60-101 104-141 116l-15 5-35 398 1 6c14 40 26 87 34 135-26 27-52 44-54 44l-7 6 3 9c41 135 67 502 78 683v6623c-11 182-37 548-78 683l-3 9 7 6c2 0 28 17 54 44-8 49-20 95-34 136l-1 5 35 398 15 6c40 12 141 57 141 115v24h3620v-24c0-58 101-103 139-115l17-6 35-398-2-5c-13-41-24-87-33-136 26-27 52-44 52-44l9-6-3-9c-41-135-67-501-80-683zM3916 8946c0 0 8 16 16 37 3 34 6 101-19 176-44 124-148 216-303 266h-3168c-332-107-329-364-320-440 8-23 15-40 15-40 14-55-4-103-30-139 49-268 24-608 23-623v-6890c1-18 26-358-23-626 26-36 44-84 30-139-1-1-7-17-15-38-3-32-6-101 20-176 43-124 147-216 300-265h3170c332 107 329 363 320 441-8 23-16 38-17 40-11 53 6 102 32 137-49 268-25 608-23 623v6891c-2 17-26 358 23 626-26 37-43 84-31 139zM4023 744c-24 87-44 249-58 404-1-115 0-283 23-433 14 14 28 23 35 29zM3941 537c1-3 17-38 30-81l8 80c-9 29-18 61-26 93-12-26-20-58-12-92zM3947 181l18 199c-3 17-9 35-14 53-1-35-7-78-22-125-30-84-100-193-267-259h129c18 74 116 116 156 132zM263 49h127c-239 97-283 280-286 384-6-17-11-35-16-53l19-199c40-16 138-58 156-132zM75 536l7-80c14 43 29 78 31 80 8 33 0 66-14 93-6-32-15-64-24-93zM67 715c21 150 23 318 20 433-12-155-32-317-57-404 8-6 22-15 37-29zM30 8729c25-87 45-249 57-404 3 116 1 285-20 433-15-14-29-23-37-29zM113 8936c-2 3-17 38-31 82l-7-81c9-29 18-61 24-93 14 27 22 58 14 92zM107 9294l-19-201c5-17 10-35 14-52 2 35 8 78 23 124 29 86 100 193 265 260h-127c-18-73-116-116-156-131zM3791 9425h-127c240-98 283-280 286-385 6 18 12 36 15 53l-18 201c-40 15-138 58-156 131zM3979 8937l-8 81c-13-44-29-78-30-79-8-36 0-66 14-94 7 32 15 63 24 92zM3988 8758c-23-148-24-317-23-433 14 155 34 317 58 404-7 6-21 15-35 29z">
          <text:p/>
        </draw:path>
        <draw:path draw:style-name="gr1" draw:text-style-name="P1" draw:layer="layout" svg:width="0.211cm" svg:height="0.211cm" svg:x="3.575cm" svg:y="11.415cm" svg:viewBox="0 0 212 212" svg:d="M106 212c58 0 106-49 106-107s-48-105-106-105c-59 0-106 47-106 105s47 107 106 107z">
          <text:p/>
        </draw:path>
        <draw:path draw:style-name="gr4" draw:text-style-name="P4" draw:layer="layout" svg:width="0.236cm" svg:height="0.235cm" svg:x="3.562cm" svg:y="11.403cm" svg:viewBox="0 0 237 236" svg:d="M119 236c-67 0-119-54-119-120 0-64 52-116 119-116 66 0 118 52 118 116 0 66-52 120-118 120zM119 24c-51 0-94 42-94 92 0 52 43 93 94 93 52 0 92-41 92-93 0-50-40-92-92-92z">
          <text:p/>
        </draw:path>
        <draw:frame draw:style-name="gr34" draw:text-style-name="P11" draw:layer="layout" svg:width="3.452cm" svg:height="0.268cm" svg:x="7.937cm" svg:y="14.605cm">
          <draw:text-box>
            <text:p text:style-name="P7"><text:span text:style-name="T5">ATTACKS &amp; SPELLCASTING</text:span></text:p>
          </draw:text-box>
        </draw:frame>
        <draw:line draw:style-name="gr19" draw:text-style-name="P5" draw:layer="layout" svg:x1="3.951cm" svg:y1="11.663cm" svg:x2="4.451cm" svg:y2="11.663cm">
          <text:p/>
        </draw:line>
        <draw:frame draw:style-name="gr35" draw:text-style-name="P11" draw:layer="layout" svg:width="2.614cm" svg:height="0.268cm" svg:x="16.457cm" svg:y="26.723cm">
          <draw:text-box>
            <text:p text:style-name="P7"><text:span text:style-name="T5">FEATURES &amp; TRAITS</text:span></text:p>
          </draw:text-box>
        </draw:frame>
        <draw:frame draw:style-name="gr36" draw:text-style-name="P11" draw:layer="layout" svg:width="0.228cm" svg:height="0.268cm" svg:x="3.799cm" svg:y="11.46cm">
          <draw:text-box>
            <text:p text:style-name="P7"><text:span text:style-name="T6"><text:s/></text:span></text:p>
          </draw:text-box>
        </draw:frame>
        <draw:path draw:style-name="gr1" draw:text-style-name="P1" draw:layer="layout" svg:width="0.211cm" svg:height="0.211cm" svg:x="3.575cm" svg:y="11.891cm" svg:viewBox="0 0 212 212" svg:d="M106 212c58 0 106-48 106-108 0-57-48-104-106-104-59 0-106 47-106 104 0 60 47 108 106 108z">
          <text:p/>
        </draw:path>
        <draw:path draw:style-name="gr4" draw:text-style-name="P4" draw:layer="layout" svg:width="0.236cm" svg:height="0.235cm" svg:x="3.562cm" svg:y="11.879cm" svg:viewBox="0 0 237 236" svg:d="M119 236c-67 0-119-53-119-120 0-63 52-116 119-116 66 0 118 53 118 116 0 67-52 120-118 120zM119 24c-51 0-94 41-94 92 0 52 43 95 94 95 52 0 92-43 92-95 0-51-40-92-92-92z">
          <text:p/>
        </draw:path>
        <draw:frame draw:style-name="gr36" draw:text-style-name="P11" draw:layer="layout" svg:width="0.228cm" svg:height="0.268cm" svg:x="4.452cm" svg:y="11.46cm">
          <draw:text-box>
            <text:p text:style-name="P7"><text:span text:style-name="T6"><text:s/></text:span></text:p>
          </draw:text-box>
        </draw:frame>
        <draw:line draw:style-name="gr19" draw:text-style-name="P5" draw:layer="layout" svg:x1="3.951cm" svg:y1="12.14cm" svg:x2="4.451cm" svg:y2="12.14cm">
          <text:p/>
        </draw:line>
        <draw:frame draw:style-name="gr37" draw:text-style-name="P8" draw:layer="layout" svg:width="2.051cm" svg:height="0.289cm" svg:x="4.621cm" svg:y="11.374cm">
          <draw:text-box>
            <text:p text:style-name="P7"><text:span text:style-name="T1">Acrobatics </text:span><text:span text:style-name="T7">(Dex)</text:span></text:p>
          </draw:text-box>
        </draw:frame>
        <draw:frame draw:style-name="gr20" draw:text-style-name="P8" draw:layer="layout" svg:width="0.246cm" svg:height="0.289cm" svg:x="3.799cm" svg:y="11.921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cm" svg:x="3.575cm" svg:y="12.368cm" svg:viewBox="0 0 212 211" svg:d="M106 211c58 0 106-48 106-105 0-60-48-106-106-106-59 0-106 46-106 106 0 57 47 105 106 105z">
          <text:p/>
        </draw:path>
        <draw:path draw:style-name="gr4" draw:text-style-name="P4" draw:layer="layout" svg:width="0.236cm" svg:height="0.236cm" svg:x="3.562cm" svg:y="12.354cm" svg:viewBox="0 0 237 237" svg:d="M119 237c-67 0-119-52-119-118 0-64 52-119 119-119 66 0 118 55 118 119 0 66-52 118-118 118zM119 25c-51 0-94 44-94 94 0 51 43 94 94 94 52 0 92-43 92-94 0-50-40-94-92-94z">
          <text:p/>
        </draw:path>
        <draw:frame draw:style-name="gr20" draw:text-style-name="P8" draw:layer="layout" svg:width="0.246cm" svg:height="0.289cm" svg:x="4.452cm" svg:y="11.921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2.616cm" svg:x2="4.451cm" svg:y2="12.616cm">
          <text:p/>
        </draw:line>
        <draw:frame draw:style-name="gr38" draw:text-style-name="P8" draw:layer="layout" svg:width="2.737cm" svg:height="0.289cm" svg:x="4.621cm" svg:y="11.85cm">
          <draw:text-box>
            <text:p text:style-name="P7"><text:span text:style-name="T1">Animal Handling </text:span><text:span text:style-name="T7">(Wis)</text:span></text:p>
          </draw:text-box>
        </draw:frame>
        <draw:frame draw:style-name="gr20" draw:text-style-name="P8" draw:layer="layout" svg:width="0.246cm" svg:height="0.289cm" svg:x="3.799cm" svg:y="12.397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1cm" svg:x="3.575cm" svg:y="12.844cm" svg:viewBox="0 0 212 212" svg:d="M106 212c58 0 106-47 106-105 0-59-48-107-106-107-59 0-106 48-106 107 0 58 47 105 106 105z">
          <text:p/>
        </draw:path>
        <draw:path draw:style-name="gr4" draw:text-style-name="P4" draw:layer="layout" svg:width="0.236cm" svg:height="0.236cm" svg:x="3.562cm" svg:y="12.83cm" svg:viewBox="0 0 237 237" svg:d="M119 237c-67 0-119-52-119-118 0-64 52-119 119-119 66 0 118 55 118 119 0 66-52 118-118 118zM119 26c-51 0-94 43-94 93 0 52 43 93 94 93 52 0 92-41 92-93 0-50-40-93-92-93z">
          <text:p/>
        </draw:path>
        <draw:frame draw:style-name="gr20" draw:text-style-name="P8" draw:layer="layout" svg:width="0.246cm" svg:height="0.289cm" svg:x="4.452cm" svg:y="12.397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3.092cm" svg:x2="4.451cm" svg:y2="13.092cm">
          <text:p/>
        </draw:line>
        <draw:frame draw:style-name="gr39" draw:text-style-name="P8" draw:layer="layout" svg:width="1.467cm" svg:height="0.289cm" svg:x="4.621cm" svg:y="12.326cm">
          <draw:text-box>
            <text:p text:style-name="P7"><text:span text:style-name="T1">Arcana </text:span><text:span text:style-name="T7">(Int)</text:span></text:p>
          </draw:text-box>
        </draw:frame>
        <draw:frame draw:style-name="gr20" draw:text-style-name="P8" draw:layer="layout" svg:width="0.246cm" svg:height="0.289cm" svg:x="3.799cm" svg:y="12.873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1cm" svg:x="3.575cm" svg:y="13.32cm" svg:viewBox="0 0 212 212" svg:d="M106 212c58 0 106-47 106-107 0-58-48-105-106-105-59 0-106 47-106 105 0 60 47 107 106 107z">
          <text:p/>
        </draw:path>
        <draw:path draw:style-name="gr4" draw:text-style-name="P4" draw:layer="layout" svg:width="0.236cm" svg:height="0.235cm" svg:x="3.562cm" svg:y="13.308cm" svg:viewBox="0 0 237 236" svg:d="M119 236c-67 0-119-54-119-120 0-64 52-116 119-116 66 0 118 52 118 116 0 66-52 120-118 120zM119 24c-51 0-94 42-94 92 0 52 43 94 94 94 52 0 92-42 92-94 0-50-40-92-92-92z">
          <text:p/>
        </draw:path>
        <draw:frame draw:style-name="gr20" draw:text-style-name="P8" draw:layer="layout" svg:width="0.246cm" svg:height="0.289cm" svg:x="4.452cm" svg:y="12.873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3.568cm" svg:x2="4.451cm" svg:y2="13.568cm">
          <text:p/>
        </draw:line>
        <draw:frame draw:style-name="gr40" draw:text-style-name="P8" draw:layer="layout" svg:width="1.699cm" svg:height="0.289cm" svg:x="4.621cm" svg:y="12.803cm">
          <draw:text-box>
            <text:p text:style-name="P7"><text:span text:style-name="T1">Athletics </text:span><text:span text:style-name="T7">(Str)</text:span></text:p>
          </draw:text-box>
        </draw:frame>
        <draw:frame draw:style-name="gr20" draw:text-style-name="P8" draw:layer="layout" svg:width="0.246cm" svg:height="0.289cm" svg:x="3.799cm" svg:y="13.349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1cm" svg:x="3.575cm" svg:y="13.796cm" svg:viewBox="0 0 212 212" svg:d="M106 212c58 0 106-48 106-107 0-58-48-105-106-105-59 0-106 47-106 105 0 59 47 107 106 107z">
          <text:p/>
        </draw:path>
        <draw:path draw:style-name="gr4" draw:text-style-name="P4" draw:layer="layout" svg:width="0.236cm" svg:height="0.235cm" svg:x="3.562cm" svg:y="13.784cm" svg:viewBox="0 0 237 236" svg:d="M119 236c-67 0-119-53-119-120 0-63 52-116 119-116 66 0 118 53 118 116 0 67-52 120-118 120zM119 24c-51 0-94 41-94 92 0 52 43 96 94 96 52 0 92-44 92-96 0-51-40-92-92-92z">
          <text:p/>
        </draw:path>
        <draw:frame draw:style-name="gr20" draw:text-style-name="P8" draw:layer="layout" svg:width="0.246cm" svg:height="0.289cm" svg:x="4.452cm" svg:y="13.349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4.045cm" svg:x2="4.451cm" svg:y2="14.045cm">
          <text:p/>
        </draw:line>
        <draw:frame draw:style-name="gr41" draw:text-style-name="P8" draw:layer="layout" svg:width="2.009cm" svg:height="0.289cm" svg:x="4.621cm" svg:y="13.279cm">
          <draw:text-box>
            <text:p text:style-name="P7"><text:span text:style-name="T1">Deception </text:span><text:span text:style-name="T7">(Cha)</text:span></text:p>
          </draw:text-box>
        </draw:frame>
        <draw:frame draw:style-name="gr20" draw:text-style-name="P8" draw:layer="layout" svg:width="0.246cm" svg:height="0.289cm" svg:x="3.799cm" svg:y="13.826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cm" svg:x="3.575cm" svg:y="14.273cm" svg:viewBox="0 0 212 211" svg:d="M106 211c58 0 106-48 106-105 0-58-48-106-106-106-59 0-106 48-106 106 0 57 47 105 106 105z">
          <text:p/>
        </draw:path>
        <draw:path draw:style-name="gr4" draw:text-style-name="P4" draw:layer="layout" svg:width="0.236cm" svg:height="0.236cm" svg:x="3.562cm" svg:y="14.259cm" svg:viewBox="0 0 237 237" svg:d="M119 237c-67 0-119-52-119-118 0-64 52-119 119-119 66 0 118 55 118 119 0 66-52 118-118 118zM119 26c-51 0-94 43-94 93 0 51 43 94 94 94 52 0 92-43 92-94 0-50-40-93-92-93z">
          <text:p/>
        </draw:path>
        <draw:frame draw:style-name="gr20" draw:text-style-name="P8" draw:layer="layout" svg:width="0.246cm" svg:height="0.289cm" svg:x="4.452cm" svg:y="13.826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4.521cm" svg:x2="4.451cm" svg:y2="14.521cm">
          <text:p/>
        </draw:line>
        <draw:frame draw:style-name="gr42" draw:text-style-name="P8" draw:layer="layout" svg:width="1.471cm" svg:height="0.289cm" svg:x="4.621cm" svg:y="13.755cm">
          <draw:text-box>
            <text:p text:style-name="P7"><text:span text:style-name="T1">History </text:span><text:span text:style-name="T7">(Int)</text:span></text:p>
          </draw:text-box>
        </draw:frame>
        <draw:frame draw:style-name="gr20" draw:text-style-name="P8" draw:layer="layout" svg:width="0.246cm" svg:height="0.289cm" svg:x="3.799cm" svg:y="14.302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1cm" svg:x="3.575cm" svg:y="14.749cm" svg:viewBox="0 0 212 212" svg:d="M106 212c58 0 106-49 106-107 0-59-48-105-106-105-59 0-106 46-106 105 0 58 47 107 106 107z">
          <text:p/>
        </draw:path>
        <draw:path draw:style-name="gr4" draw:text-style-name="P4" draw:layer="layout" svg:width="0.236cm" svg:height="0.236cm" svg:x="3.562cm" svg:y="14.735cm" svg:viewBox="0 0 237 237" svg:d="M119 237c-67 0-119-52-119-118 0-64 52-119 119-119 66 0 118 55 118 119 0 66-52 118-118 118zM119 27c-51 0-94 42-94 92 0 52 43 93 94 93 52 0 92-41 92-93 0-50-40-92-92-92z">
          <text:p/>
        </draw:path>
        <draw:frame draw:style-name="gr20" draw:text-style-name="P8" draw:layer="layout" svg:width="0.246cm" svg:height="0.289cm" svg:x="4.452cm" svg:y="14.302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4.997cm" svg:x2="4.451cm" svg:y2="14.997cm">
          <text:p/>
        </draw:line>
        <draw:frame draw:style-name="gr43" draw:text-style-name="P8" draw:layer="layout" svg:width="1.543cm" svg:height="0.289cm" svg:x="4.621cm" svg:y="14.231cm">
          <draw:text-box>
            <text:p text:style-name="P7"><text:span text:style-name="T1">Insight </text:span><text:span text:style-name="T7">(Wis)</text:span></text:p>
          </draw:text-box>
        </draw:frame>
        <draw:frame draw:style-name="gr20" draw:text-style-name="P8" draw:layer="layout" svg:width="0.246cm" svg:height="0.289cm" svg:x="3.799cm" svg:y="14.778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1cm" svg:x="3.575cm" svg:y="15.225cm" svg:viewBox="0 0 212 212" svg:d="M106 212c58 0 106-48 106-108 0-58-48-104-106-104-59 0-106 46-106 104 0 60 47 108 106 108z">
          <text:p/>
        </draw:path>
        <draw:path draw:style-name="gr4" draw:text-style-name="P4" draw:layer="layout" svg:width="0.236cm" svg:height="0.235cm" svg:x="3.562cm" svg:y="15.213cm" svg:viewBox="0 0 237 236" svg:d="M119 236c-67 0-119-53-119-118 0-66 52-118 119-118 66 0 118 52 118 118 0 65-52 118-118 118zM119 24c-51 0-94 42-94 94 0 50 43 92 94 92 52 0 92-42 92-92 0-52-40-94-92-94z">
          <text:p/>
        </draw:path>
        <draw:frame draw:style-name="gr20" draw:text-style-name="P8" draw:layer="layout" svg:width="0.246cm" svg:height="0.289cm" svg:x="4.452cm" svg:y="14.778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5.473cm" svg:x2="4.451cm" svg:y2="15.473cm">
          <text:p/>
        </draw:line>
        <draw:frame draw:style-name="gr44" draw:text-style-name="P8" draw:layer="layout" svg:width="2.229cm" svg:height="0.289cm" svg:x="4.621cm" svg:y="14.708cm">
          <draw:text-box>
            <text:p text:style-name="P7"><text:span text:style-name="T1">Intimidation </text:span><text:span text:style-name="T7">(Cha)</text:span></text:p>
          </draw:text-box>
        </draw:frame>
        <draw:frame draw:style-name="gr20" draw:text-style-name="P8" draw:layer="layout" svg:width="0.246cm" svg:height="0.289cm" svg:x="3.799cm" svg:y="15.254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1cm" svg:x="3.575cm" svg:y="15.701cm" svg:viewBox="0 0 212 212" svg:d="M106 212c58 0 106-47 106-107 0-58-48-105-106-105-59 0-106 47-106 105 0 60 47 107 106 107z">
          <text:p/>
        </draw:path>
        <draw:path draw:style-name="gr4" draw:text-style-name="P4" draw:layer="layout" svg:width="0.236cm" svg:height="0.235cm" svg:x="3.562cm" svg:y="15.689cm" svg:viewBox="0 0 237 236" svg:d="M119 236c-67 0-119-52-119-119 0-64 52-117 119-117 66 0 118 53 118 117 0 67-52 119-118 119zM119 24c-51 0-94 41-94 93 0 51 43 95 94 95 52 0 92-44 92-95 0-52-40-93-92-93z">
          <text:p/>
        </draw:path>
        <draw:frame draw:style-name="gr20" draw:text-style-name="P8" draw:layer="layout" svg:width="0.246cm" svg:height="0.289cm" svg:x="4.452cm" svg:y="15.254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5.95cm" svg:x2="4.451cm" svg:y2="15.95cm">
          <text:p/>
        </draw:line>
        <draw:frame draw:style-name="gr45" draw:text-style-name="P8" draw:layer="layout" svg:width="2.195cm" svg:height="0.289cm" svg:x="4.621cm" svg:y="15.184cm">
          <draw:text-box>
            <text:p text:style-name="P7"><text:span text:style-name="T1">Investigation </text:span><text:span text:style-name="T7">(Int)</text:span></text:p>
          </draw:text-box>
        </draw:frame>
        <draw:frame draw:style-name="gr20" draw:text-style-name="P8" draw:layer="layout" svg:width="0.246cm" svg:height="0.289cm" svg:x="3.799cm" svg:y="15.731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cm" svg:x="3.575cm" svg:y="16.178cm" svg:viewBox="0 0 212 211" svg:d="M106 211c58 0 106-48 106-104 0-59-48-107-106-107-59 0-106 48-106 107 0 56 47 104 106 104z">
          <text:p/>
        </draw:path>
        <draw:path draw:style-name="gr4" draw:text-style-name="P4" draw:layer="layout" svg:width="0.236cm" svg:height="0.236cm" svg:x="3.562cm" svg:y="16.164cm" svg:viewBox="0 0 237 237" svg:d="M119 237c-67 0-119-52-119-116 0-66 52-121 119-121 66 0 118 55 118 121 0 64-52 116-118 116zM119 26c-51 0-94 43-94 95 0 49 43 92 94 92 52 0 92-43 92-92 0-52-40-95-92-95z">
          <text:p/>
        </draw:path>
        <draw:frame draw:style-name="gr20" draw:text-style-name="P8" draw:layer="layout" svg:width="0.246cm" svg:height="0.289cm" svg:x="4.452cm" svg:y="15.731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6.426cm" svg:x2="4.451cm" svg:y2="16.426cm">
          <text:p/>
        </draw:line>
        <draw:frame draw:style-name="gr46" draw:text-style-name="P8" draw:layer="layout" svg:width="1.81cm" svg:height="0.289cm" svg:x="4.621cm" svg:y="15.66cm">
          <draw:text-box>
            <text:p text:style-name="P7"><text:span text:style-name="T1">Medicine </text:span><text:span text:style-name="T7">(Wis)</text:span></text:p>
          </draw:text-box>
        </draw:frame>
        <draw:frame draw:style-name="gr20" draw:text-style-name="P8" draw:layer="layout" svg:width="0.246cm" svg:height="0.289cm" svg:x="3.799cm" svg:y="16.207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1cm" svg:x="3.575cm" svg:y="16.654cm" svg:viewBox="0 0 212 212" svg:d="M106 212c58 0 106-49 106-107s-48-105-106-105c-59 0-106 47-106 105s47 107 106 107z">
          <text:p/>
        </draw:path>
        <draw:path draw:style-name="gr4" draw:text-style-name="P4" draw:layer="layout" svg:width="0.236cm" svg:height="0.236cm" svg:x="3.562cm" svg:y="16.64cm" svg:viewBox="0 0 237 237" svg:d="M119 237c-67 0-119-53-119-117 0-66 52-120 119-120 66 0 118 54 118 120 0 64-52 117-118 117zM119 26c-51 0-94 42-94 94 0 50 43 91 94 91 52 0 92-41 92-91 0-52-40-94-92-94z">
          <text:p/>
        </draw:path>
        <draw:frame draw:style-name="gr20" draw:text-style-name="P8" draw:layer="layout" svg:width="0.246cm" svg:height="0.289cm" svg:x="4.452cm" svg:y="16.207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6.902cm" svg:x2="4.451cm" svg:y2="16.902cm">
          <text:p/>
        </draw:line>
        <draw:frame draw:style-name="gr47" draw:text-style-name="P8" draw:layer="layout" svg:width="1.442cm" svg:height="0.289cm" svg:x="4.621cm" svg:y="16.136cm">
          <draw:text-box>
            <text:p text:style-name="P7"><text:span text:style-name="T1">Nature </text:span><text:span text:style-name="T7">(Int)</text:span></text:p>
          </draw:text-box>
        </draw:frame>
        <draw:frame draw:style-name="gr20" draw:text-style-name="P8" draw:layer="layout" svg:width="0.246cm" svg:height="0.289cm" svg:x="3.799cm" svg:y="16.683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1cm" svg:x="3.575cm" svg:y="17.13cm" svg:viewBox="0 0 212 212" svg:d="M106 212c58 0 106-48 106-108 0-58-48-104-106-104-59 0-106 46-106 104 0 60 47 108 106 108z">
          <text:p/>
        </draw:path>
        <draw:path draw:style-name="gr4" draw:text-style-name="P4" draw:layer="layout" svg:width="0.236cm" svg:height="0.235cm" svg:x="3.562cm" svg:y="17.118cm" svg:viewBox="0 0 237 236" svg:d="M119 236c-67 0-119-53-119-118 0-66 52-118 119-118 66 0 118 52 118 118 0 65-52 118-118 118zM119 24c-51 0-94 42-94 94 0 51 43 92 94 92 52 0 92-41 92-92 0-52-40-94-92-94z">
          <text:p/>
        </draw:path>
        <draw:frame draw:style-name="gr20" draw:text-style-name="P8" draw:layer="layout" svg:width="0.246cm" svg:height="0.289cm" svg:x="4.452cm" svg:y="16.683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7.378cm" svg:x2="4.451cm" svg:y2="17.378cm">
          <text:p/>
        </draw:line>
        <draw:frame draw:style-name="gr48" draw:text-style-name="P8" draw:layer="layout" svg:width="2.026cm" svg:height="0.289cm" svg:x="4.621cm" svg:y="16.613cm">
          <draw:text-box>
            <text:p text:style-name="P7"><text:span text:style-name="T1">Perception </text:span><text:span text:style-name="T7">(Wis)</text:span></text:p>
          </draw:text-box>
        </draw:frame>
        <draw:frame draw:style-name="gr20" draw:text-style-name="P8" draw:layer="layout" svg:width="0.246cm" svg:height="0.289cm" svg:x="3.799cm" svg:y="17.159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1cm" svg:x="3.575cm" svg:y="17.606cm" svg:viewBox="0 0 212 212" svg:d="M106 212c58 0 106-47 106-107 0-58-48-105-106-105-59 0-106 47-106 105 0 60 47 107 106 107z">
          <text:p/>
        </draw:path>
        <draw:path draw:style-name="gr4" draw:text-style-name="P4" draw:layer="layout" svg:width="0.236cm" svg:height="0.235cm" svg:x="3.562cm" svg:y="17.594cm" svg:viewBox="0 0 237 236" svg:d="M119 236c-67 0-119-52-119-119 0-64 52-117 119-117 66 0 118 53 118 117 0 67-52 119-118 119zM119 24c-51 0-94 41-94 93s43 95 94 95c52 0 92-43 92-95s-40-93-92-93z">
          <text:p/>
        </draw:path>
        <draw:frame draw:style-name="gr20" draw:text-style-name="P8" draw:layer="layout" svg:width="0.246cm" svg:height="0.289cm" svg:x="4.452cm" svg:y="17.159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7.855cm" svg:x2="4.451cm" svg:y2="17.855cm">
          <text:p/>
        </draw:line>
        <draw:frame draw:style-name="gr49" draw:text-style-name="P8" draw:layer="layout" svg:width="2.322cm" svg:height="0.289cm" svg:x="4.621cm" svg:y="17.089cm">
          <draw:text-box>
            <text:p text:style-name="P7"><text:span text:style-name="T1">Performance </text:span><text:span text:style-name="T7">(Cha)</text:span></text:p>
          </draw:text-box>
        </draw:frame>
        <draw:frame draw:style-name="gr20" draw:text-style-name="P8" draw:layer="layout" svg:width="0.246cm" svg:height="0.289cm" svg:x="3.799cm" svg:y="17.636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cm" svg:x="3.575cm" svg:y="18.083cm" svg:viewBox="0 0 212 211" svg:d="M106 211c58 0 106-49 106-106 0-59-48-105-106-105-59 0-106 46-106 105 0 57 47 106 106 106z">
          <text:p/>
        </draw:path>
        <draw:path draw:style-name="gr4" draw:text-style-name="P4" draw:layer="layout" svg:width="0.236cm" svg:height="0.236cm" svg:x="3.562cm" svg:y="18.069cm" svg:viewBox="0 0 237 237" svg:d="M119 237c-67 0-119-53-119-117 0-66 52-120 119-120 66 0 118 54 118 120 0 64-52 117-118 117zM119 25c-51 0-94 43-94 95 0 49 43 92 94 92 52 0 92-43 92-92 0-52-40-95-92-95z">
          <text:p/>
        </draw:path>
        <draw:frame draw:style-name="gr20" draw:text-style-name="P8" draw:layer="layout" svg:width="0.246cm" svg:height="0.289cm" svg:x="4.452cm" svg:y="17.636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8.331cm" svg:x2="4.451cm" svg:y2="18.331cm">
          <text:p/>
        </draw:line>
        <draw:frame draw:style-name="gr50" draw:text-style-name="P8" draw:layer="layout" svg:width="2.089cm" svg:height="0.289cm" svg:x="4.621cm" svg:y="17.565cm">
          <draw:text-box>
            <text:p text:style-name="P7"><text:span text:style-name="T1">Persuasion </text:span><text:span text:style-name="T7">(Cha)</text:span></text:p>
          </draw:text-box>
        </draw:frame>
        <draw:frame draw:style-name="gr20" draw:text-style-name="P8" draw:layer="layout" svg:width="0.246cm" svg:height="0.289cm" svg:x="3.799cm" svg:y="18.112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1cm" svg:x="3.575cm" svg:y="18.559cm" svg:viewBox="0 0 212 212" svg:d="M106 212c58 0 106-47 106-107 0-58-48-105-106-105-59 0-106 47-106 105 0 60 47 107 106 107z">
          <text:p/>
        </draw:path>
        <draw:path draw:style-name="gr4" draw:text-style-name="P4" draw:layer="layout" svg:width="0.236cm" svg:height="0.236cm" svg:x="3.562cm" svg:y="18.545cm" svg:viewBox="0 0 237 237" svg:d="M119 237c-67 0-119-53-119-117 0-66 52-120 119-120 66 0 118 54 118 120 0 64-52 117-118 117zM119 26c-51 0-94 43-94 94 0 50 43 91 94 91 52 0 92-41 92-91 0-51-40-94-92-94z">
          <text:p/>
        </draw:path>
        <draw:frame draw:style-name="gr20" draw:text-style-name="P8" draw:layer="layout" svg:width="0.246cm" svg:height="0.289cm" svg:x="4.452cm" svg:y="18.112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8.807cm" svg:x2="4.451cm" svg:y2="18.807cm">
          <text:p/>
        </draw:line>
        <draw:frame draw:style-name="gr51" draw:text-style-name="P8" draw:layer="layout" svg:width="1.586cm" svg:height="0.289cm" svg:x="4.621cm" svg:y="18.041cm">
          <draw:text-box>
            <text:p text:style-name="P7"><text:span text:style-name="T1">Religion </text:span><text:span text:style-name="T7">(Int)</text:span></text:p>
          </draw:text-box>
        </draw:frame>
        <draw:frame draw:style-name="gr20" draw:text-style-name="P8" draw:layer="layout" svg:width="0.246cm" svg:height="0.289cm" svg:x="3.799cm" svg:y="18.588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1cm" svg:x="3.575cm" svg:y="19.035cm" svg:viewBox="0 0 212 212" svg:d="M106 212c58 0 106-48 106-106 0-60-48-106-106-106-59 0-106 46-106 106 0 58 47 106 106 106z">
          <text:p/>
        </draw:path>
        <draw:path draw:style-name="gr4" draw:text-style-name="P4" draw:layer="layout" svg:width="0.236cm" svg:height="0.235cm" svg:x="3.562cm" svg:y="19.023cm" svg:viewBox="0 0 237 236" svg:d="M119 236c-67 0-119-53-119-118 0-66 52-118 119-118 66 0 118 52 118 118 0 65-52 118-118 118zM119 24c-51 0-94 43-94 94s43 92 94 92c52 0 92-41 92-92s-40-94-92-94z">
          <text:p/>
        </draw:path>
        <draw:frame draw:style-name="gr20" draw:text-style-name="P8" draw:layer="layout" svg:width="0.246cm" svg:height="0.289cm" svg:x="4.452cm" svg:y="18.588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9.283cm" svg:x2="4.451cm" svg:y2="19.283cm">
          <text:p/>
        </draw:line>
        <draw:frame draw:style-name="gr52" draw:text-style-name="P8" draw:layer="layout" svg:width="2.653cm" svg:height="0.289cm" svg:x="4.621cm" svg:y="18.518cm">
          <draw:text-box>
            <text:p text:style-name="P7"><text:span text:style-name="T1">Sleight of Hand </text:span><text:span text:style-name="T7">(Dex)</text:span></text:p>
          </draw:text-box>
        </draw:frame>
        <draw:frame draw:style-name="gr20" draw:text-style-name="P8" draw:layer="layout" svg:width="0.246cm" svg:height="0.289cm" svg:x="3.799cm" svg:y="19.064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1cm" svg:x="3.575cm" svg:y="19.511cm" svg:viewBox="0 0 212 212" svg:d="M106 212c58 0 106-47 106-107 0-58-48-105-106-105-59 0-106 47-106 105 0 60 47 107 106 107z">
          <text:p/>
        </draw:path>
        <draw:path draw:style-name="gr4" draw:text-style-name="P4" draw:layer="layout" svg:width="0.236cm" svg:height="0.235cm" svg:x="3.562cm" svg:y="19.499cm" svg:viewBox="0 0 237 236" svg:d="M119 236c-67 0-119-52-119-119 0-64 52-117 119-117 66 0 118 53 118 117 0 67-52 119-118 119zM119 24c-51 0-94 43-94 93 0 52 43 95 94 95 52 0 92-43 92-95 0-50-40-93-92-93z">
          <text:p/>
        </draw:path>
        <draw:frame draw:style-name="gr20" draw:text-style-name="P8" draw:layer="layout" svg:width="0.246cm" svg:height="0.289cm" svg:x="4.452cm" svg:y="19.064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9.76cm" svg:x2="4.451cm" svg:y2="19.76cm">
          <text:p/>
        </draw:line>
        <draw:frame draw:style-name="gr53" draw:text-style-name="P8" draw:layer="layout" svg:width="1.641cm" svg:height="0.289cm" svg:x="4.621cm" svg:y="18.994cm">
          <draw:text-box>
            <text:p text:style-name="P7"><text:span text:style-name="T1">Stealth </text:span><text:span text:style-name="T7">(Dex)</text:span></text:p>
          </draw:text-box>
        </draw:frame>
        <draw:frame draw:style-name="gr20" draw:text-style-name="P8" draw:layer="layout" svg:width="0.246cm" svg:height="0.289cm" svg:x="3.799cm" svg:y="19.541cm">
          <draw:text-box>
            <text:p text:style-name="P7"><text:span text:style-name="T1"><text:s/></text:span></text:p>
          </draw:text-box>
        </draw:frame>
        <draw:frame draw:style-name="gr20" draw:text-style-name="P8" draw:layer="layout" svg:width="0.246cm" svg:height="0.289cm" svg:x="4.452cm" svg:y="19.541cm">
          <draw:text-box>
            <text:p text:style-name="P7"><text:span text:style-name="T1"><text:s/></text:span></text:p>
          </draw:text-box>
        </draw:frame>
        <draw:frame draw:style-name="gr54" draw:text-style-name="P8" draw:layer="layout" svg:width="1.7cm" svg:height="0.289cm" svg:x="4.621cm" svg:y="19.47cm">
          <draw:text-box>
            <text:p text:style-name="P7"><text:span text:style-name="T1">Survival </text:span><text:span text:style-name="T7">(Wis)</text:span></text:p>
          </draw:text-box>
        </draw:frame>
        <draw:frame draw:style-name="gr55" draw:text-style-name="P10" draw:layer="layout" svg:width="1.429cm" svg:height="0.239cm" svg:x="11.659cm" svg:y="12.485cm">
          <draw:text-box>
            <text:p text:style-name="P7"><text:span text:style-name="T4">DEATH SAVES</text:span></text:p>
          </draw:text-box>
        </draw:frame>
        <draw:frame draw:style-name="gr56" draw:text-style-name="P10" draw:layer="layout" svg:width="0.887cm" svg:height="0.239cm" svg:x="8.872cm" svg:y="12.485cm">
          <draw:text-box>
            <text:p text:style-name="P7"><text:span text:style-name="T4">HIT DICE</text:span></text:p>
          </draw:text-box>
        </draw:frame>
        <draw:frame draw:style-name="gr57" draw:text-style-name="P10" draw:layer="layout" svg:width="0.595cm" svg:height="0.239cm" svg:x="7.885cm" svg:y="13.547cm">
          <draw:text-box>
            <text:p text:style-name="P7"><text:span text:style-name="T3">NAME</text:span></text:p>
          </draw:text-box>
        </draw:frame>
        <draw:frame draw:style-name="gr58" draw:text-style-name="P10" draw:layer="layout" svg:width="2.72cm" svg:height="0.239cm" svg:x="10.273cm" svg:y="13.547cm">
          <draw:text-box>
            <text:p text:style-name="P7"><text:span text:style-name="T3">ATK BONUS DAMAGE/TYPE</text:span></text:p>
          </draw:text-box>
        </draw:frame>
        <draw:frame draw:style-name="gr59" draw:text-style-name="P8" draw:layer="layout" svg:width="0.616cm" svg:height="0.289cm" svg:x="8.103cm" svg:y="11.332cm">
          <draw:text-box>
            <text:p text:style-name="P7"><text:span text:style-name="T8">Total</text:span></text:p>
          </draw:text-box>
        </draw:frame>
        <draw:frame draw:style-name="gr60" draw:text-style-name="P10" draw:layer="layout" svg:width="1.204cm" svg:height="0.239cm" svg:x="11.105cm" svg:y="11.416cm">
          <draw:text-box>
            <text:p text:style-name="P7"><text:span text:style-name="T4">SUCCESSES</text:span></text:p>
          </draw:text-box>
        </draw:frame>
        <draw:frame draw:style-name="gr61" draw:text-style-name="P10" draw:layer="layout" svg:width="0.976cm" svg:height="0.239cm" svg:x="11.282cm" svg:y="11.946cm">
          <draw:text-box>
            <text:p text:style-name="P7"><text:span text:style-name="T4">FAILURES</text:span></text:p>
          </draw:text-box>
        </draw:frame>
        <draw:frame draw:style-name="gr62" draw:text-style-name="P10" draw:layer="layout" svg:width="0.726cm" svg:height="0.239cm" svg:x="17.145cm" svg:y="8.619cm">
          <draw:text-box>
            <text:p text:style-name="P7"><text:span text:style-name="T4">IDEALS</text:span></text:p>
          </draw:text-box>
        </draw:frame>
        <draw:frame draw:style-name="gr63" draw:text-style-name="P10" draw:layer="layout" svg:width="0.739cm" svg:height="0.239cm" svg:x="17.127cm" svg:y="10.591cm">
          <draw:text-box>
            <text:p text:style-name="P7"><text:span text:style-name="T4">BONDS</text:span></text:p>
          </draw:text-box>
        </draw:frame>
        <draw:frame draw:style-name="gr64" draw:text-style-name="P10" draw:layer="layout" svg:width="0.701cm" svg:height="0.239cm" svg:x="17.166cm" svg:y="12.521cm">
          <draw:text-box>
            <text:p text:style-name="P7"><text:span text:style-name="T4">FLAWS</text:span></text:p>
          </draw:text-box>
        </draw:frame>
        <draw:frame draw:style-name="gr65" draw:text-style-name="P10" draw:layer="layout" svg:width="2.174cm" svg:height="0.239cm" svg:x="16.499cm" svg:y="6.679cm">
          <draw:text-box>
            <text:p text:style-name="P7"><text:span text:style-name="T4">PERSONALITY TRAITS</text:span></text:p>
          </draw:text-box>
        </draw:frame>
        <draw:frame draw:style-name="gr66" draw:text-style-name="P11" draw:layer="layout" svg:width="0.959cm" svg:height="0.268cm" svg:x="8.25cm" svg:y="5.852cm">
          <draw:text-box>
            <text:p text:style-name="P7"><text:span text:style-name="T5">ARMOR</text:span></text:p>
          </draw:text-box>
        </draw:frame>
        <draw:frame draw:style-name="gr67" draw:text-style-name="P11" draw:layer="layout" svg:width="0.823cm" svg:height="0.268cm" svg:x="8.324cm" svg:y="6.059cm">
          <draw:text-box>
            <text:p text:style-name="P7"><text:span text:style-name="T5">CLASS</text:span></text:p>
          </draw:text-box>
        </draw:frame>
        <draw:frame draw:style-name="gr68" draw:text-style-name="P11" draw:layer="layout" svg:width="2.771cm" svg:height="0.268cm" svg:x="9.525cm" svg:y="7.134cm">
          <draw:text-box>
            <text:p text:style-name="P7"><text:span text:style-name="T5">HIT POINT MAXIMUM</text:span></text:p>
          </draw:text-box>
        </draw:frame>
        <draw:frame draw:style-name="gr69" draw:text-style-name="P11" draw:layer="layout" svg:width="3.16cm" svg:height="0.268cm" svg:x="9.222cm" svg:y="9.774cm">
          <draw:text-box>
            <text:p text:style-name="P7"><text:span text:style-name="T5">TEMPORARY HIT POINTS</text:span></text:p>
          </draw:text-box>
        </draw:frame>
        <draw:frame draw:style-name="gr70" draw:text-style-name="P11" draw:layer="layout" svg:width="1.357cm" svg:height="0.268cm" svg:x="10.078cm" svg:y="6.158cm">
          <draw:text-box>
            <text:p text:style-name="P7"><text:span text:style-name="T5">INITIATIVE</text:span></text:p>
          </draw:text-box>
        </draw:frame>
        <draw:frame draw:style-name="gr71" draw:text-style-name="P11" draw:layer="layout" svg:width="0.84cm" svg:height="0.268cm" svg:x="12.353cm" svg:y="6.158cm">
          <draw:text-box>
            <text:p text:style-name="P7"><text:span text:style-name="T5">SPEED</text:span></text:p>
          </draw:text-box>
        </draw:frame>
        <draw:frame draw:style-name="gr72" draw:text-style-name="P10" draw:layer="layout" svg:width="2.411cm" svg:height="0.239cm" svg:x="4.784cm" svg:y="6.142cm">
          <draw:text-box>
            <text:p text:style-name="P7"><text:span text:style-name="T9">PROFICIENCY BONUS</text:span></text:p>
          </draw:text-box>
        </draw:frame>
        <draw:frame draw:style-name="gr73" draw:text-style-name="P11" draw:layer="layout" svg:width="1.382cm" svg:height="0.268cm" svg:x="1.45cm" svg:y="5.128cm">
          <draw:text-box>
            <text:p text:style-name="P7"><text:span text:style-name="T5">STRENGTH</text:span></text:p>
          </draw:text-box>
        </draw:frame>
        <draw:frame draw:style-name="gr74" draw:text-style-name="P11" draw:layer="layout" svg:width="1.424cm" svg:height="0.268cm" svg:x="1.464cm" svg:y="7.661cm">
          <draw:text-box>
            <text:p text:style-name="P7"><text:span text:style-name="T5">DEXTERITY</text:span></text:p>
          </draw:text-box>
        </draw:frame>
        <draw:frame draw:style-name="gr75" draw:text-style-name="P11" draw:layer="layout" svg:width="1.932cm" svg:height="0.268cm" svg:x="1.21cm" svg:y="10.176cm">
          <draw:text-box>
            <text:p text:style-name="P7"><text:span text:style-name="T5">CONSTITUTION</text:span></text:p>
          </draw:text-box>
        </draw:frame>
        <draw:frame draw:style-name="gr76" draw:text-style-name="P11" draw:layer="layout" svg:width="1.822cm" svg:height="0.268cm" svg:x="1.27cm" svg:y="12.713cm">
          <draw:text-box>
            <text:p text:style-name="P7"><text:span text:style-name="T5">INTELLIGENCE</text:span></text:p>
          </draw:text-box>
        </draw:frame>
        <draw:frame draw:style-name="gr77" draw:text-style-name="P11" draw:layer="layout" svg:width="1.12cm" svg:height="0.268cm" svg:x="1.556cm" svg:y="15.239cm">
          <draw:text-box>
            <text:p text:style-name="P7"><text:span text:style-name="T5">WISDOM</text:span></text:p>
          </draw:text-box>
        </draw:frame>
        <draw:path draw:style-name="gr78" draw:text-style-name="P12" draw:layer="layout" svg:width="3.989cm" svg:height="0.995cm" svg:x="3.292cm" svg:y="4.428cm" svg:viewBox="0 0 3990 996" svg:d="M3990 274l-14-8c-52-23-115-118-136-151l-8-13h-2841v-102h-242l-9 13c-15 18-35 36-55 48-54-24-109-38-165-41-5-9-14-15-25-15-10 0-20 6-24 15-57 3-112 17-164 41-21-12-41-30-57-48l-9-13h-241v996h241l9-12c16-20 36-35 57-46 52 23 107 35 164 38 4 9 14 17 24 17 11 0 20-8 25-17 56-3 111-15 165-38 20 11 40 26 55 46l9 12h242v-101h2829 12l8-12c21-34 84-127 136-152l14-6zM3748 771h-2685v-543h2685c81 46 165 109 194 184v174c-29 75-113 139-194 185zM991 228h46v543h-46zM3942 303v52c-64-95-197-164-289-204h153c20 31 76 117 136 152zM3583 151c27 11 68 28 114 51h-2706v-51zM472 49c5 6 14 12 23 12 11 0 19-6 23-12 45 1 87 11 129 26-12 3-26 3-38 3h-227c-12 0-26 0-38-3 41-15 84-25 128-26zM518 950c-4-8-12-12-23-12-9 0-18 4-23 12-44-3-87-11-128-26 12-3 26-4 38-4h227c12 0 26 1 38 4-42 15-84 23-129 26zM778 933c-44-47-105-76-169-76h-227c-64 0-125 29-170 76h-41c0 0-110-1-110-150v-569c0-148 110-150 110-150h41c45 49 106 77 170 77h227c64 0 125-28 169-77h42c0 0 110 2 110 150v569c0 149-110 150-110 150zM991 797h2706c-46 23-87 40-114 49h-2592zM3806 846h-153c92-38 225-109 289-203v53c-60 35-116 119-136 150z">
          <text:p/>
        </draw:path>
        <draw:frame draw:style-name="gr79" draw:text-style-name="P11" draw:layer="layout" svg:width="1.374cm" svg:height="0.268cm" svg:x="1.464cm" svg:y="17.758cm">
          <draw:text-box>
            <text:p text:style-name="P7"><text:span text:style-name="T5">CHARISMA</text:span></text:p>
          </draw:text-box>
        </draw:frame>
        <draw:frame draw:style-name="gr80" draw:text-style-name="P11" draw:layer="layout" svg:width="2.203cm" svg:height="0.268cm" svg:x="4.396cm" svg:y="10.254cm">
          <draw:text-box>
            <text:p text:style-name="P7"><text:span text:style-name="T5">SAVING THROWS</text:span></text:p>
          </draw:text-box>
        </draw:frame>
        <draw:path draw:style-name="gr4" draw:text-style-name="P4" draw:layer="layout" svg:width="0.172cm" svg:height="0.172cm" svg:x="8.844cm" svg:y="1.14cm" svg:viewBox="0 0 173 173" svg:d="M94 61c13 0 13 20 0 20h-20v-20zM107 97c32-8 25-55-13-55h-43v87h23v-28h9l21 28h25v-5zM86 156c41 0 65-32 65-72 0-38-24-67-65-67s-64 29-66 67c2 40 25 72 66 72zM173 84c0 48-31 89-87 89-55 0-86-41-86-89 0-46 31-84 86-84 56 0 87 38 87 84z">
          <text:p/>
        </draw:path>
        <draw:path draw:style-name="gr4" draw:text-style-name="P4" draw:layer="layout" svg:width="4.906cm" svg:height="0.537cm" svg:x="3.934cm" svg:y="1.006cm" svg:viewBox="0 0 4907 538" svg:d="M2442 150c-1-9-1-17 2-26l12-38 14 36c6 11 15 19 26 25-2-17 1-35 7-49-1-28 19-49 42-49 38 0 49 49 30 81 10 14 22 26 34 35 3 5 8 8 11 11 0 2 1 3 3 3 17-23 29-55 29-79 0-51-32-97-101-100-43-3-72 11-93 32-11 11-33 35-28 81 2 17 6 29 12 37zM2624 385c-15 26-47 60-81 60-61 0-92-86-24-159-3 0-8 0-8 0-6 0-12 0-15 3l-31 26 8-43c1-1 1-1 3-4-15 9-31 18-35 26l-28 29 3-43 2-9c0-6 3-14 1-17l-1-1c-12 10-48 39-52 86 0 0 7-10 14-13 3-2 7 0 3 13-2 5-36 95 30 158 0 0-6-17-3-23 3-3 6-3 9 1 3 5 6 8 10 11 4 6 10 12 18 17 20 15 46 26 76 26 81 0 124-57 149-104-2 0-2-3-5-3-12-11-29-26-43-37zM2808 222c-60 3-112 55-138 92 5 0 8 3 14 6 6 6 14 14 23 21 6-18 23-50 47-78 23-26 63-29 83-12 14-12 60-24 84-17-15-17-47-38-81-38-29 0-44 15-49 8-4-8 20-20 20-20-34 1-58 41-69 36-6-3 9-21 9-21-30 17-56 55-61 78 28-35 83-60 118-55zM4058 391c-2-3-4-6-4-18v-79c0-11 2-12 4-17 1-3 7-9 7-9v-2l-1-1c0 0-6-2-11-3v1c-3-1-121-1-121-1l6 3c0 0 17 12 26 17 8 4 11 9 11 27v42c-9 4-17 5-29 5-48 0-72-28-72-79 0-49 26-78 73-78 29 0 60 8 97 35v-1l-8-81v-7l-6-1-6-2c-26-6-34-7-49-9-9 0-14-1-26-1 0 0-3 0-5 0-87 0-151 61-151 145 0 87 64 148 153 148 15 0 44-3 64-8 3-1 6-1 8-1h1c11-3 23-6 34-9l12-5v-3c0 0-4-5-7-8zM4705 136h-159l6 3c0 0 15 10 24 16 8 6 11 9 11 27v69l-118-115h-93l6 3c0 0 15 10 23 16s12 12 12 30v188c0 18-3 21-12 26-8 6-26 17-26 17l-6 3h159l-6-3c0-2-19-11-26-17-8-5-12-8-12-26v-114l171 169v-246c0-18 3-21 12-27 8-6 26-16 26-16zM3680 300l-25-69-29 69zM3415 216c0-14-9-25-35-25h-9v66c3 0 6 0 9 0 17 0 35-3 35-41zM3810 400l24 19h-148c0 0 12-12 18-19 5-4 8-9 3-18 0-3-1-6-3-12h-102c-2 6-5 9-5 12-5 11-3 14 3 18 6 7 20 19 20 19h-153l-73-87c-9-12-14-18-20-20 0 0-1-1-3-1v62c0 17 3 20 11 26 9 8 33 20 33 20h-165c0 0 26-14 34-20 6-5 12-8 12-26v-189c0-19-5-23-12-28-8-6-26-17-26-17l-5-3c0 0 127 0 133 0 26 0 37 2 53 5 34 11 55 40 55 75 0 18-4 32-12 46-7 9-17 18-26 24 28 38 52 70 66 85 2-1 86-207 86-207v-3c0-2 0-3-5-8l-20-17h112c0 0 92 235 93 237 2 6 2 8 5 12 4 5 6 6 17 15zM4305 276c0-46-29-75-73-75s-72 29-72 76 29 79 74 79c41 0 71-35 71-80zM4387 276c0 85-66 147-155 147-87 0-151-59-151-146 0-84 64-145 151-145s155 61 155 144zM4821 237c-5-1-8-3-12-3-28-6-45-12-45-23 0-4 2-7 4-9 4-6 13-8 27-8 3 0 5 0 6 0h2c1 0 1 0 1 0 25 2 54 14 83 34l-5-84-6-2v-1c0 0-3 0-14-3-4 0-33-6-50-8-6 0-11 0-17 0-63 0-98 29-102 83-2 27 10 53 33 67 20 12 49 22 72 29h5c13 5 29 14 27 32-1 9-4 18-30 18-3 0-8 0-13-1-18-2-38-11-61-32 0 0-1-2-3-2l-14-10-13-11 4 107 6 1h2c0 0 3 2 12 3 9 3 40 8 57 9 4 0 9 2 15 2 69 0 113-34 115-87 1-53-28-87-86-101zM3186 277c0-46-23-73-64-73h-32v146h32c41 0 64-27 64-73zM3269 276c0 33-11 66-31 89-8 11-17 20-29 28-29 18-55 26-95 26h-147l6-3c0 0 19-11 26-17 8-5 12-9 12-26v-165c0-18-4-23-12-27-36-28-40-57-40-59v-4l4 3c0 0 12 8 26 11 15 3 36 4 81 4h56c28 0 49 5 69 17 46 23 74 69 74 123zM1174 402c0 0-3-6-6-9-2-3-3-6-3-17v-79c0-11 1-14 3-17 1-3 6-9 6-9l1-2-1-1c0 0-6-3-11-3-3 0-121 0-121 0l6 3c0 0 17 11 25 15 9 5 12 11 12 28v44c-9 3-17 4-29 4-47 0-72-28-72-80 0-48 26-77 74-77 29 0 59 6 96 35v-3l-8-81v-6h-6l-6-3c-26-5-35-6-49-8-9-1-15-3-26-3 0 0-3 0-5 0-87 0-151 63-151 147 0 85 64 146 153 146 15 0 44-3 64-7 3 0 5 0 8-2h1c11-1 22-4 34-9l12-3zM2063 136h-159l6 3c0 0 15 10 24 16 8 6 11 9 11 27v69l-116-115h-95l6 3c0 0 15 10 23 16 9 6 12 12 12 30v188c0 18-3 21-12 26-8 6-26 17-26 17l-6 3h159l-6-3c0 0-19-11-26-17-8-5-12-8-12-26v-114l171 169v-246c0-18 3-21 12-27 8-6 26-16 26-16zM1829 136zM923 136h-159l6 3c0 0 15 10 24 16 8 6 11 9 11 27v69l-116-115h-185c-7 0-13 2-13 3l-1 2 1 1c0 0 5 5 6 10 2 3 4 4 4 12 0 0 0 142 0 144v1c0 32-14 47-42 47-29 0-44-15-44-48v-144c0-8 1-9 3-12 3-5 6-10 6-10l2-1-2-2c0-1-6-3-12-3h-118l6 3c0 0 15 10 25 16 9 6 12 9 12 27v116c0 26 3 49 9 63 3 9 9 18 20 27 23 23 53 35 93 35 52 0 95-24 112-64 6-15 8-31 8-59v-118c0-18 4-21 12-27 4-3 12-8 17-11 4 3 10 8 15 11 9 6 12 12 12 30v188c0 18-3 21-12 26-9 6-26 17-26 17l-6 3h159l-6-3c0 0-19-11-26-17-8-5-12-8-12-26v-114l171 169v-246c0-18 3-21 12-27 8-6 26-16 26-16zM1360 350h-64v-42c0 0 58 0 60 0 9 0 17 0 21 1 6 3 11 8 11 8l3 6-1-90-2 1c0 0-5 2-8 3-3 2-4 2-18 2h-66v-35h66c17 0 21 1 32 9l15 12-7-89h-225l6 3c0 0 14 10 23 16s12 9 12 27v191c0 18-3 21-12 26-8 6-26 17-26 17l-6 3h234l20-96c0 0-19 16-23 18-11 7-20 9-45 9zM2179 237c-3-1-8-3-12-3-28-6-45-12-45-23 0-4 2-7 4-9 4-6 15-8 27-8 3 0 5 0 8 0 1 0 1 0 1 0 25 2 54 14 83 34l-5-84-6-2v-1c0 0-3 0-12-3-6 0-35-6-52-8-6 0-11 0-17 0-63 0-98 29-102 83-2 27 10 53 33 67 20 12 51 22 72 29h5c14 5 29 14 27 32-1 9-4 18-29 18-4 0-9 0-14-1-18-2-38-11-61-32l-1-2-16-10-13-11 6 107 4 1h2c0 0 3 2 12 3 9 3 40 8 57 9 4 0 10 2 15 2 69 0 113-34 115-87 1-53-28-87-86-101zM228 277c0-46-24-73-66-73h-32v146h32c42 0 66-27 66-73zM309 276c0 33-10 66-29 89-9 11-18 20-30 28-28 18-54 26-95 26h-147l6-3c0 0 18-11 26-17 9-5 12-9 12-26v-165c0-18-4-23-12-27-35-28-40-57-40-59v-4l3 3c2 0 14 8 26 11 17 3 37 4 81 4h57c29 0 49 5 69 17 46 23 73 69 73 123zM1663 276c0-46-29-77-73-77-43 0-70 31-70 78 0 46 27 79 72 79 42 0 71-35 71-80zM1745 276c0 85-66 147-155 147-87 0-151-61-151-146 0-84 64-145 151-145 89 0 155 61 155 144zM2614 248l-3-9c0-2-8-23-29-31l-14-3 4 11c3 12 10 32 32 32zM2447 196c3-11-18-29-26-32 29 0 43 4 43 4-8-10-11-27-6-39 15 36 70 41 84 73-2-14-14-29-28-38-9-20-3-57 6-66-3 52 74 84 89 122-9-33-44-55-61-75-5-12-2-35 4-42-1 35 37 64 57 84 25 23 32 44 29 61 5 1 12 6 11 15 7-1 15-10 18-17 3 28-12 56-29 63 0 0 5-12-3-21-9-11-32-11-38-9 0 0 9-14 4-22-4-8-47-4-67 3 6 0 23 0 29 3-3 5-12 25-6 29 6 6 12-4 12-4 0 0-6 21-1 26 3 6 15 3 15 3-8 17-32 30-50 30 7-3 16-16 18-24-5 3-17 5-22 3 7-2 17-17 14-32-4-26-38-29-55-17 5-15 22-32 34-37-8-1-17-3-26-6 12-9 38-15 52-15-20-6-60 1-78 23 6 0 21 3 26 3-23 6-57 27-66 38 3-14 6-26 3-34-4-12-20-16-49-10 20-20 60-32 63-43zM2903 431c0 40-40 72-86 66 11 11 40 18 55 11-9 15-50 38-89 27-36-9-52-44-53-67-17 18-11 46 0 56-14-4-35-18-38-44-3-23 9-49-14-69-14-12-37-30-49-41-31-23-20-41-26-53-5-9-17-15-25-23-7-9-7-22-3-29-1 11 8 18 17 21 11 3 20 0 28 5 12 7 6 24 15 30 6 5 25-1 40 13 15 13 49 40 64 54 26 20 55-4 44-29 28 15 31 60 8 77 22 4 60-5 60-37 0-17-17-32-29-34 43-3 81 28 81 66z">
          <text:p/>
        </draw:path>
        <draw:frame draw:style-name="gr81" draw:text-style-name="P10" draw:layer="layout" svg:width="1.492cm" svg:height="0.239cm" svg:x="5.165cm" svg:y="4.812cm">
          <draw:text-box>
            <text:p text:style-name="P7"><text:span text:style-name="T9">INSPIRATION</text:span></text:p>
          </draw:text-box>
        </draw:frame>
        <draw:frame draw:style-name="gr82" draw:text-style-name="P11" draw:layer="layout" svg:width="0.883cm" svg:height="0.268cm" svg:x="4.939cm" svg:y="20.111cm">
          <draw:text-box>
            <text:p text:style-name="P7"><text:span text:style-name="T5">SKILLS</text:span></text:p>
          </draw:text-box>
        </draw:frame>
        <draw:frame draw:style-name="gr83" draw:text-style-name="P13" draw:layer="layout" svg:width="2.419cm" svg:height="0.357cm" svg:x="9.596cm" svg:y="1.828cm">
          <draw:text-box>
            <text:p text:style-name="P7"><text:span text:style-name="T10">Barbarian Lv. 7</text:span></text:p>
          </draw:text-box>
        </draw:frame>
        <draw:frame draw:style-name="gr84" draw:text-style-name="P13" draw:layer="layout" svg:width="1.568cm" svg:height="0.357cm" svg:x="13.621cm" svg:y="1.828cm">
          <draw:text-box>
            <text:p text:style-name="P7"><text:span text:style-name="T10">Outlander</text:span></text:p>
          </draw:text-box>
        </draw:frame>
        <draw:frame draw:style-name="gr85" draw:text-style-name="P13" draw:layer="layout" svg:width="2.436cm" svg:height="0.357cm" svg:x="17.014cm" svg:y="1.828cm">
          <draw:text-box>
            <text:p text:style-name="P7"><text:span text:style-name="T10">Simon Weydert</text:span></text:p>
          </draw:text-box>
        </draw:frame>
        <draw:frame draw:style-name="gr86" draw:text-style-name="P14" draw:layer="layout" svg:width="1.966cm" svg:height="0.496cm" svg:x="3.754cm" svg:y="2.332cm">
          <draw:text-box>
            <text:p text:style-name="P7"><text:span text:style-name="T11">Th'Anton</text:span></text:p>
          </draw:text-box>
        </draw:frame>
        <draw:frame draw:style-name="gr87" draw:text-style-name="P13" draw:layer="layout" svg:width="1.327cm" svg:height="0.357cm" svg:x="9.56cm" svg:y="2.749cm">
          <draw:text-box>
            <text:p text:style-name="P7"><text:span text:style-name="T10">Half-Orc</text:span></text:p>
          </draw:text-box>
        </draw:frame>
        <draw:frame draw:style-name="gr88" draw:text-style-name="P13" draw:layer="layout" svg:width="2.182cm" svg:height="0.357cm" svg:x="13.6cm" svg:y="2.749cm">
          <draw:text-box>
            <text:p text:style-name="P7"><text:span text:style-name="T10">Chaotic Good</text:span></text:p>
          </draw:text-box>
        </draw:frame>
        <draw:frame draw:style-name="gr89" draw:text-style-name="P13" draw:layer="layout" svg:width="1.53cm" svg:height="0.357cm" svg:x="17.014cm" svg:y="2.749cm">
          <draw:text-box>
            <text:p text:style-name="P7"><text:span text:style-name="T10">Milestone</text:span></text:p>
          </draw:text-box>
        </draw:frame>
        <draw:frame draw:style-name="gr90" draw:text-style-name="P15" draw:layer="layout" svg:width="1.391cm" svg:height="0.619cm" svg:x="1.33cm" svg:y="5.642cm">
          <draw:text-box>
            <text:p text:style-name="P7"><text:span text:style-name="T12">16+2</text:span></text:p>
          </draw:text-box>
        </draw:frame>
        <draw:frame draw:style-name="gr91" draw:text-style-name="P16" draw:layer="layout" svg:width="0.438cm" svg:height="0.382cm" svg:x="3.574cm" svg:y="6.104cm">
          <draw:text-box>
            <text:p text:style-name="P7"><text:span text:style-name="T13">+3</text:span></text:p>
          </draw:text-box>
        </draw:frame>
        <draw:frame draw:style-name="gr92" draw:text-style-name="P17" draw:layer="layout" svg:width="0.696cm" svg:height="0.623cm" svg:x="8.393cm" svg:y="5.161cm">
          <draw:text-box>
            <text:p text:style-name="P7"><text:span text:style-name="T14">13</text:span></text:p>
          </draw:text-box>
        </draw:frame>
        <draw:frame draw:style-name="gr93" draw:text-style-name="P18" draw:layer="layout" svg:width="0.929cm" svg:height="0.814cm" svg:x="10.255cm" svg:y="5.216cm">
          <draw:text-box>
            <text:p text:style-name="P7"><text:span text:style-name="T15">+1</text:span></text:p>
          </draw:text-box>
        </draw:frame>
        <draw:frame draw:style-name="gr94" draw:text-style-name="P18" draw:layer="layout" svg:width="0.908cm" svg:height="0.814cm" svg:x="12.326cm" svg:y="5.216cm">
          <draw:text-box>
            <text:p text:style-name="P7"><text:span text:style-name="T15">40</text:span></text:p>
          </draw:text-box>
        </draw:frame>
        <draw:frame draw:style-name="gr95" draw:text-style-name="P19" draw:layer="layout" svg:width="0.324cm" svg:height="0.285cm" svg:x="1.852cm" svg:y="6.701cm">
          <draw:text-box>
            <text:p text:style-name="P7"><text:span text:style-name="T16">+4</text:span></text:p>
          </draw:text-box>
        </draw:frame>
        <draw:frame draw:style-name="gr96" draw:text-style-name="P20" draw:layer="layout" svg:width="0.201cm" svg:height="0.175cm" svg:x="4.131cm" svg:y="7.371cm">
          <draw:text-box>
            <text:p text:style-name="P7"><text:span text:style-name="T17">+6</text:span></text:p>
          </draw:text-box>
        </draw:frame>
        <draw:frame draw:style-name="gr97" draw:text-style-name="P15" draw:layer="layout" svg:width="0.688cm" svg:height="0.619cm" svg:x="1.679cm" svg:y="8.182cm">
          <draw:text-box>
            <text:p text:style-name="P7"><text:span text:style-name="T12">12</text:span></text:p>
          </draw:text-box>
        </draw:frame>
        <draw:frame draw:style-name="gr95" draw:text-style-name="P19" draw:layer="layout" svg:width="0.324cm" svg:height="0.285cm" svg:x="1.852cm" svg:y="9.241cm">
          <draw:text-box>
            <text:p text:style-name="P7"><text:span text:style-name="T16">+1</text:span></text:p>
          </draw:text-box>
        </draw:frame>
        <draw:frame draw:style-name="gr90" draw:text-style-name="P15" draw:layer="layout" svg:width="1.391cm" svg:height="0.619cm" svg:x="1.33cm" svg:y="10.694cm">
          <draw:text-box>
            <text:p text:style-name="P7"><text:span text:style-name="T12">13+1</text:span></text:p>
          </draw:text-box>
        </draw:frame>
        <draw:frame draw:style-name="gr95" draw:text-style-name="P19" draw:layer="layout" svg:width="0.324cm" svg:height="0.285cm" svg:x="1.852cm" svg:y="11.757cm">
          <draw:text-box>
            <text:p text:style-name="P7"><text:span text:style-name="T16">+2</text:span></text:p>
          </draw:text-box>
        </draw:frame>
        <draw:frame draw:style-name="gr98" draw:text-style-name="P14" draw:layer="layout" svg:width="1.103cm" svg:height="0.496cm" svg:x="8.749cm" svg:y="11.857cm">
          <draw:text-box>
            <text:p text:style-name="P7"><text:span text:style-name="T11">6d12</text:span></text:p>
          </draw:text-box>
        </draw:frame>
        <draw:frame draw:style-name="gr99" draw:text-style-name="P15" draw:layer="layout" svg:width="0.616cm" svg:height="0.619cm" svg:x="1.852cm" svg:y="13.234cm">
          <draw:text-box>
            <text:p text:style-name="P7"><text:span text:style-name="T12">9</text:span></text:p>
          </draw:text-box>
        </draw:frame>
        <draw:frame draw:style-name="gr96" draw:text-style-name="P20" draw:layer="layout" svg:width="0.201cm" svg:height="0.175cm" svg:x="4.131cm" svg:y="7.847cm">
          <draw:text-box>
            <text:p text:style-name="P7"><text:span text:style-name="T17">+1</text:span></text:p>
          </draw:text-box>
        </draw:frame>
        <draw:frame draw:style-name="gr96" draw:text-style-name="P20" draw:layer="layout" svg:width="0.201cm" svg:height="0.175cm" svg:x="4.131cm" svg:y="8.323cm">
          <draw:text-box>
            <text:p text:style-name="P7"><text:span text:style-name="T17">+4</text:span></text:p>
          </draw:text-box>
        </draw:frame>
        <draw:frame draw:style-name="gr100" draw:text-style-name="P20" draw:layer="layout" svg:width="0.172cm" svg:height="0.175cm" svg:x="4.156cm" svg:y="8.799cm">
          <draw:text-box>
            <text:p text:style-name="P7"><text:span text:style-name="T17">-1</text:span></text:p>
          </draw:text-box>
        </draw:frame>
        <draw:frame draw:style-name="gr100" draw:text-style-name="P20" draw:layer="layout" svg:width="0.172cm" svg:height="0.175cm" svg:x="4.156cm" svg:y="9.276cm">
          <draw:text-box>
            <text:p text:style-name="P7"><text:span text:style-name="T17">-1</text:span></text:p>
          </draw:text-box>
        </draw:frame>
        <draw:frame draw:style-name="gr100" draw:text-style-name="P20" draw:layer="layout" svg:width="0.172cm" svg:height="0.175cm" svg:x="4.184cm" svg:y="9.748cm">
          <draw:text-box>
            <text:p text:style-name="P7"><text:span text:style-name="T17">1</text:span></text:p>
          </draw:text-box>
        </draw:frame>
        <draw:frame draw:style-name="gr96" draw:text-style-name="P20" draw:layer="layout" svg:width="0.201cm" svg:height="0.175cm" svg:x="4.106cm" svg:y="11.431cm">
          <draw:text-box>
            <text:p text:style-name="P7"><text:span text:style-name="T17">+1</text:span></text:p>
          </draw:text-box>
        </draw:frame>
        <draw:frame draw:style-name="gr96" draw:text-style-name="P20" draw:layer="layout" svg:width="0.201cm" svg:height="0.175cm" svg:x="4.106cm" svg:y="11.911cm">
          <draw:text-box>
            <text:p text:style-name="P7"><text:span text:style-name="T17">+1</text:span></text:p>
          </draw:text-box>
        </draw:frame>
        <draw:frame draw:style-name="gr96" draw:text-style-name="P20" draw:layer="layout" svg:width="0.201cm" svg:height="0.175cm" svg:x="4.106cm" svg:y="12.863cm">
          <draw:text-box>
            <text:p text:style-name="P7"><text:span text:style-name="T17">+6</text:span></text:p>
          </draw:text-box>
        </draw:frame>
        <draw:frame draw:style-name="gr96" draw:text-style-name="P20" draw:layer="layout" svg:width="0.201cm" svg:height="0.175cm" svg:x="4.106cm" svg:y="13.34cm">
          <draw:text-box>
            <text:p text:style-name="P7"><text:span text:style-name="T17">+1</text:span></text:p>
          </draw:text-box>
        </draw:frame>
        <draw:frame draw:style-name="gr100" draw:text-style-name="P20" draw:layer="layout" svg:width="0.172cm" svg:height="0.175cm" svg:x="4.128cm" svg:y="13.816cm">
          <draw:text-box>
            <text:p text:style-name="P7"><text:span text:style-name="T17">-1</text:span></text:p>
          </draw:text-box>
        </draw:frame>
        <draw:frame draw:style-name="gr100" draw:text-style-name="P20" draw:layer="layout" svg:width="0.172cm" svg:height="0.175cm" svg:x="4.128cm" svg:y="14.292cm">
          <draw:text-box>
            <text:p text:style-name="P7"><text:span text:style-name="T17">-1</text:span></text:p>
          </draw:text-box>
        </draw:frame>
        <draw:frame draw:style-name="gr96" draw:text-style-name="P20" draw:layer="layout" svg:width="0.201cm" svg:height="0.175cm" svg:x="4.106cm" svg:y="14.768cm">
          <draw:text-box>
            <text:p text:style-name="P7"><text:span text:style-name="T17">+3</text:span></text:p>
          </draw:text-box>
        </draw:frame>
        <draw:frame draw:style-name="gr101" draw:text-style-name="P21" draw:layer="layout" svg:width="0.14cm" svg:height="0.166cm" svg:x="3.627cm" svg:y="7.376cm">
          <draw:text-box>
            <text:p text:style-name="P7"><text:span text:style-name="T18">●</text:span></text:p>
          </draw:text-box>
        </draw:frame>
        <draw:frame draw:style-name="gr101" draw:text-style-name="P21" draw:layer="layout" svg:width="0.14cm" svg:height="0.166cm" svg:x="3.627cm" svg:y="8.329cm">
          <draw:text-box>
            <text:p text:style-name="P7"><text:span text:style-name="T18">●</text:span></text:p>
          </draw:text-box>
        </draw:frame>
        <draw:frame draw:style-name="gr102" draw:text-style-name="P19" draw:layer="layout" svg:width="0.281cm" svg:height="0.285cm" svg:x="1.887cm" svg:y="14.297cm">
          <draw:text-box>
            <text:p text:style-name="P7"><text:span text:style-name="T16">-1</text:span></text:p>
          </draw:text-box>
        </draw:frame>
        <draw:frame draw:style-name="gr100" draw:text-style-name="P20" draw:layer="layout" svg:width="0.172cm" svg:height="0.175cm" svg:x="4.128cm" svg:y="15.248cm">
          <draw:text-box>
            <text:p text:style-name="P7"><text:span text:style-name="T17">-1</text:span></text:p>
          </draw:text-box>
        </draw:frame>
        <draw:frame draw:style-name="gr99" draw:text-style-name="P15" draw:layer="layout" svg:width="0.616cm" svg:height="0.619cm" svg:x="1.852cm" svg:y="15.75cm">
          <draw:text-box>
            <text:p text:style-name="P7"><text:span text:style-name="T12">9</text:span></text:p>
          </draw:text-box>
        </draw:frame>
        <draw:frame draw:style-name="gr100" draw:text-style-name="P20" draw:layer="layout" svg:width="0.172cm" svg:height="0.175cm" svg:x="4.128cm" svg:y="12.387cm">
          <draw:text-box>
            <text:p text:style-name="P7"><text:span text:style-name="T17">-1</text:span></text:p>
          </draw:text-box>
        </draw:frame>
        <draw:frame draw:style-name="gr100" draw:text-style-name="P20" draw:layer="layout" svg:width="0.172cm" svg:height="0.175cm" svg:x="4.128cm" svg:y="16.673cm">
          <draw:text-box>
            <text:p text:style-name="P7"><text:span text:style-name="T17">-1</text:span></text:p>
          </draw:text-box>
        </draw:frame>
        <draw:frame draw:style-name="gr102" draw:text-style-name="P19" draw:layer="layout" svg:width="0.281cm" svg:height="0.285cm" svg:x="1.887cm" svg:y="16.808cm">
          <draw:text-box>
            <text:p text:style-name="P7"><text:span text:style-name="T16">-1</text:span></text:p>
          </draw:text-box>
        </draw:frame>
        <draw:frame draw:style-name="gr97" draw:text-style-name="P15" draw:layer="layout" svg:width="0.688cm" svg:height="0.619cm" svg:x="1.679cm" svg:y="18.265cm">
          <draw:text-box>
            <text:p text:style-name="P7"><text:span text:style-name="T12">12</text:span></text:p>
          </draw:text-box>
        </draw:frame>
        <draw:frame draw:style-name="gr100" draw:text-style-name="P20" draw:layer="layout" svg:width="0.172cm" svg:height="0.175cm" svg:x="4.128cm" svg:y="16.201cm">
          <draw:text-box>
            <text:p text:style-name="P7"><text:span text:style-name="T17">-1</text:span></text:p>
          </draw:text-box>
        </draw:frame>
        <draw:frame draw:style-name="gr96" draw:text-style-name="P20" draw:layer="layout" svg:width="0.201cm" svg:height="0.175cm" svg:x="4.106cm" svg:y="17.15cm">
          <draw:text-box>
            <text:p text:style-name="P7"><text:span text:style-name="T17">+1</text:span></text:p>
          </draw:text-box>
        </draw:frame>
        <draw:frame draw:style-name="gr100" draw:text-style-name="P20" draw:layer="layout" svg:width="0.172cm" svg:height="0.175cm" svg:x="4.128cm" svg:y="15.721cm">
          <draw:text-box>
            <text:p text:style-name="P7"><text:span text:style-name="T17">-1</text:span></text:p>
          </draw:text-box>
        </draw:frame>
        <draw:frame draw:style-name="gr100" draw:text-style-name="P20" draw:layer="layout" svg:width="0.172cm" svg:height="0.175cm" svg:x="4.128cm" svg:y="18.102cm">
          <draw:text-box>
            <text:p text:style-name="P7"><text:span text:style-name="T17">-1</text:span></text:p>
          </draw:text-box>
        </draw:frame>
        <draw:frame draw:style-name="gr96" draw:text-style-name="P20" draw:layer="layout" svg:width="0.201cm" svg:height="0.175cm" svg:x="4.106cm" svg:y="19.058cm">
          <draw:text-box>
            <text:p text:style-name="P7"><text:span text:style-name="T17">+1</text:span></text:p>
          </draw:text-box>
        </draw:frame>
        <draw:frame draw:style-name="gr101" draw:text-style-name="P21" draw:layer="layout" svg:width="0.14cm" svg:height="0.166cm" svg:x="3.627cm" svg:y="11.916cm">
          <draw:text-box>
            <text:p text:style-name="P7"><text:span text:style-name="T18">●</text:span></text:p>
          </draw:text-box>
        </draw:frame>
        <draw:frame draw:style-name="gr101" draw:text-style-name="P21" draw:layer="layout" svg:width="0.14cm" svg:height="0.166cm" svg:x="3.627cm" svg:y="12.862cm">
          <draw:text-box>
            <text:p text:style-name="P7"><text:span text:style-name="T18">●</text:span></text:p>
          </draw:text-box>
        </draw:frame>
        <draw:frame draw:style-name="gr101" draw:text-style-name="P21" draw:layer="layout" svg:width="0.14cm" svg:height="0.166cm" svg:x="3.627cm" svg:y="14.76cm">
          <draw:text-box>
            <text:p text:style-name="P7"><text:span text:style-name="T18">●</text:span></text:p>
          </draw:text-box>
        </draw:frame>
        <draw:frame draw:style-name="gr101" draw:text-style-name="P21" draw:layer="layout" svg:width="0.14cm" svg:height="0.166cm" svg:x="3.627cm" svg:y="19.536cm">
          <draw:text-box>
            <text:p text:style-name="P7"><text:span text:style-name="T18">●</text:span></text:p>
          </draw:text-box>
        </draw:frame>
        <draw:frame draw:style-name="gr96" draw:text-style-name="P20" draw:layer="layout" svg:width="0.201cm" svg:height="0.175cm" svg:x="4.106cm" svg:y="17.626cm">
          <draw:text-box>
            <text:p text:style-name="P7"><text:span text:style-name="T17">+1</text:span></text:p>
          </draw:text-box>
        </draw:frame>
        <draw:frame draw:style-name="gr103" draw:text-style-name="P22" draw:layer="layout" svg:width="1.179cm" svg:height="1.059cm" svg:x="10.251cm" svg:y="7.613cm">
          <draw:text-box>
            <text:p text:style-name="P7"><text:span text:style-name="T19">72</text:span></text:p>
          </draw:text-box>
        </draw:frame>
        <draw:frame draw:style-name="gr96" draw:text-style-name="P20" draw:layer="layout" svg:width="0.201cm" svg:height="0.175cm" svg:x="4.106cm" svg:y="18.578cm">
          <draw:text-box>
            <text:p text:style-name="P7"><text:span text:style-name="T17">+1</text:span></text:p>
          </draw:text-box>
        </draw:frame>
        <draw:frame draw:style-name="gr95" draw:text-style-name="P19" draw:layer="layout" svg:width="0.324cm" svg:height="0.285cm" svg:x="1.852cm" svg:y="19.324cm">
          <draw:text-box>
            <text:p text:style-name="P7"><text:span text:style-name="T16">+1</text:span></text:p>
          </draw:text-box>
        </draw:frame>
        <draw:frame draw:style-name="gr96" draw:text-style-name="P20" draw:layer="layout" svg:width="0.201cm" svg:height="0.175cm" svg:x="4.106cm" svg:y="19.531cm">
          <draw:text-box>
            <text:p text:style-name="P7"><text:span text:style-name="T17">+1</text:span></text:p>
          </draw:text-box>
        </draw:frame>
        <draw:frame draw:style-name="gr104" draw:text-style-name="P16" draw:layer="layout" svg:width="0.38cm" svg:height="0.382cm" svg:x="1.408cm" svg:y="20.995cm">
          <draw:text-box>
            <text:p text:style-name="P7"><text:span text:style-name="T13">9</text:span></text:p>
          </draw:text-box>
        </draw:frame>
        <draw:frame draw:style-name="gr105" draw:text-style-name="P23" draw:layer="layout" svg:width="4.472cm" svg:height="0.416cm" svg:x="1.277cm" svg:y="22.271cm">
          <draw:text-box>
            <text:p text:style-name="P7"><text:span text:style-name="T20">ARMOR: light, medium, </text:span></text:p>
          </draw:text-box>
        </draw:frame>
        <draw:frame draw:style-name="gr106" draw:text-style-name="P23" draw:layer="layout" svg:width="1.289cm" svg:height="0.416cm" svg:x="1.277cm" svg:y="22.832cm">
          <draw:text-box>
            <text:p text:style-name="P7"><text:span text:style-name="T20">shields</text:span></text:p>
          </draw:text-box>
        </draw:frame>
        <draw:frame draw:style-name="gr107" draw:text-style-name="P23" draw:layer="layout" svg:width="5.027cm" svg:height="0.416cm" svg:x="1.277cm" svg:y="23.39cm">
          <draw:text-box>
            <text:p text:style-name="P7"><text:span text:style-name="T20">WEAPONS: simple, martial</text:span></text:p>
          </draw:text-box>
        </draw:frame>
        <draw:frame draw:style-name="gr108" draw:text-style-name="P23" draw:layer="layout" svg:width="2.559cm" svg:height="0.416cm" svg:x="1.277cm" svg:y="24.511cm">
          <draw:text-box>
            <text:p text:style-name="P7"><text:span text:style-name="T20">TOOLS: none</text:span></text:p>
          </draw:text-box>
        </draw:frame>
        <draw:frame draw:style-name="gr109" draw:text-style-name="P23" draw:layer="layout" svg:width="5.395cm" svg:height="0.416cm" svg:x="1.277cm" svg:y="25.63cm">
          <draw:text-box>
            <text:p text:style-name="P7"><text:span text:style-name="T20">LANGUAGES: Common, Orc</text:span></text:p>
          </draw:text-box>
        </draw:frame>
        <draw:frame draw:style-name="gr110" draw:text-style-name="P24" draw:layer="layout" svg:width="1.534cm" svg:height="0.424cm" svg:x="14.623cm" svg:y="13.86cm">
          <draw:text-box>
            <text:p text:style-name="P7"><text:span text:style-name="T21">RACIAL</text:span></text:p>
          </draw:text-box>
        </draw:frame>
        <draw:frame draw:style-name="gr111" draw:text-style-name="P25" draw:layer="layout" svg:width="5.133cm" svg:height="1.278cm" svg:x="14.623cm" svg:y="14.379cm">
          <draw:text-box>
            <text:p text:style-name="P7"><text:span text:style-name="T22">Darkvision: Passive</text:span></text:p>
            <text:p text:style-name="P7"><text:span text:style-name="T22">Relentless Endurance: Death</text:span></text:p>
            <text:p text:style-name="P7"><text:span text:style-name="T22">Savage Attacks: Crits</text:span></text:p>
          </draw:text-box>
        </draw:frame>
        <draw:frame draw:style-name="gr112" draw:text-style-name="P24" draw:layer="layout" svg:width="2.453cm" svg:height="0.424cm" svg:x="14.605cm" svg:y="16.51cm">
          <draw:text-box>
            <text:p text:style-name="P7"><text:span text:style-name="T21">BARBARIAN</text:span></text:p>
          </draw:text-box>
        </draw:frame>
        <draw:frame draw:style-name="gr113" draw:text-style-name="P26" draw:layer="layout" svg:width="5.844cm" svg:height="5.617cm" svg:x="14.605cm" svg:y="17.029cm">
          <draw:text-box>
            <text:p text:style-name="P7"><text:span text:style-name="T22">Rage: Bonus action</text:span></text:p>
            <text:p text:style-name="P7"><text:span text:style-name="T22">Rage Damage: +2</text:span></text:p>
            <text:p text:style-name="P7"><text:span text:style-name="T22">Rages: 4</text:span></text:p>
            <text:p text:style-name="P7"><text:span text:style-name="T22"/></text:p>
            <text:p text:style-name="P7"><text:span text:style-name="T22">Legendary Protectors: Rage</text:span></text:p>
            <text:p text:style-name="P7"><text:span text:style-name="T22">Instinctive Pounce: Rage (bonus)</text:span></text:p>
            <text:p text:style-name="P7"><text:span text:style-name="T22"/></text:p>
            <text:p text:style-name="P7"><text:span text:style-name="T22">Spirit Shield: Harm within 30 feet</text:span></text:p>
            <text:p text:style-name="P7"><text:span text:style-name="T22"/></text:p>
            <text:p text:style-name="P7"><text:span text:style-name="T22">Reckless Attack: First attack</text:span></text:p>
            <text:p text:style-name="P7"><text:span text:style-name="T22"/></text:p>
            <text:p text:style-name="P7"><text:span text:style-name="T22">Danger Sense: Passive</text:span></text:p>
            <text:p text:style-name="P7"><text:span text:style-name="T22"/></text:p>
            <text:p text:style-name="P7"><text:span text:style-name="T22">Unarmored Defense: Determine AC</text:span><text:span text:style-name="T22"><text:line-break/></text:span><text:span text:style-name="T22"><text:line-break/></text:span><text:span text:style-name="T22">Feral Instinct: Initiative rolls</text:span></text:p>
          </draw:text-box>
        </draw:frame>
        <draw:frame draw:style-name="gr114" draw:text-style-name="P24" draw:layer="layout" svg:width="1.369cm" svg:height="0.424cm" svg:x="14.605cm" svg:y="23.862cm">
          <draw:text-box>
            <text:p text:style-name="P7"><text:span text:style-name="T21">FEATS</text:span></text:p>
          </draw:text-box>
        </draw:frame>
        <draw:frame draw:style-name="gr115" draw:text-style-name="P26" draw:layer="layout" svg:width="5.76cm" svg:height="0.703cm" svg:x="14.618cm" svg:y="24.379cm">
          <draw:text-box>
            <text:p text:style-name="P7"><text:span text:style-name="T23">Sentinel: Bonus action, conditional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ath draw:style-name="gr2" draw:text-style-name="P2" draw:layer="layout" svg:width="5.852cm" svg:height="6.083cm" svg:x="14.435cm" svg:y="4.682cm" svg:viewBox="0 0 5853 6084" svg:d="M326 6047c50 9 131 15 217-11l176 48h-340c-15-11-33-22-53-37zM5135 6084h340c15-11 33-22 53-37-49 9-131 15-217-11zM5475 0h-340l176 48c86-26 168-20 217-11-20-15-38-26-53-37zM94 5681v-2270c-9-3-16-12-16-23 0-15 14-27 28-27 17 0 29 12 29 27 0 11-6 20-15 23v2270c0 156 93 270 175 341 35 10 138 31 245-4h3 3l240 66h4282l243-66h3c107 35 210 14 245 4 84-71 174-185 174-341v-2270c-9-3-15-12-15-23 0-15 12-27 27-27 16 0 28 12 28 27 0 11-6 20-14 23v2270c0 202-139 334-237 403h67c71-65 210-216 264-432v-5220c-54-216-193-367-264-432h-67c98 68 237 201 237 403v2231c8 6 14 15 14 24 0 17-12 28-28 28-15 0-27-11-27-28 0-9 6-18 15-23v-2232c0-156-90-269-174-341-35-10-138-29-245 4h-3-2l-241-66h-4282l-243 66h-3c-107-35-208-14-243-4-84 72-177 185-177 341v2231c9 6 15 15 15 24 0 17-12 28-29 28-14 0-28-11-28-28 0-9 7-18 16-23v-2232c0-202 142-335 238-403h-66c-70 65-212 216-266 432v5220c54 216 196 367 266 432h66c-96-69-238-201-238-403zM719 0h-340c-15 11-33 22-53 37 50-9 131-15 217 11zM240 0h-94c0 0-75 129-146 161v208c60-176 170-303 240-369zM5615 6084h92c0 0 75-129 146-161v-208c-60 176-170 303-238 369zM0 5715v208c71 32 146 161 146 161h94c-70-66-180-193-240-369zM5853 369v-208c-71-32-147-161-147-161h-91c68 66 178 193 238 369z">
          <text:p/>
        </draw:path>
        <draw:path draw:style-name="gr2" draw:text-style-name="P2" draw:layer="layout" svg:width="13.728cm" svg:height="1.74cm" svg:x="0.331cm" svg:y="0.713cm" svg:viewBox="0 0 13729 1741" svg:d="M2974 1449l820 61-820 61-820-61zM7887 1680l820 61 820-61-820-63zM11919 1080l786-60-970-72 1484-111-1320-98 1830-138-3117-232 837-63-1528-115-1359 103-611-80 1498-114-1201-89-837 61-974-72-907 69 922 69-1017 78-1016-78 589-46-704-52-2251 171 797 60-2529 188 1489 112-787 59 971 72-1483 110 1320 100-1831 136 2517 188-1152 86 1216 92 314-23 913 67 1359-101 611 80-1584 117 2174 164 477-37-858-64 1224-90 855 64 562-43 797 60 2252-168-797-60 2529-188z">
          <text:p/>
        </draw:path>
        <draw:path draw:style-name="gr2" draw:text-style-name="P2" draw:layer="layout" svg:width="11.15cm" svg:height="1.412cm" svg:x="4.372cm" svg:y="2.758cm" svg:viewBox="0 0 11151 1413" svg:d="M2418 1177l666 51-666 49-667-49zM6407 1364l666 49 667-49-667-49zM9682 877l638-47-787-61 1206-90-1074-81 1486-110-2531-190 681-52-1243-92-1103 83-496-66 1217-90-975-74-681 52-789-59-738 55 750 56-826 61-825-61 477-35-572-43-1827 136 647 48-2057 154 1213 91-641 47 789 60-1207 90 1076 80-1490 112 2045 153-936 71 988 73 257-18 742 55 1103-83 496 64-1285 97 1764 133 386-29-695-52 993-75 695 52 456-35 647 50 1830-137-649-48 2055-154z">
          <text:p/>
        </draw:path>
        <draw:path draw:style-name="gr2" draw:text-style-name="P2" draw:layer="layout" svg:width="9.196cm" svg:height="1.164cm" svg:x="11.86cm" svg:y="1.289cm" svg:viewBox="0 0 9197 1165" svg:d="M1995 971l549 41-549 40-552-40zM5285 1125l549 40 549-40-549-41zM7985 723l527-40-649-47 993-74-884-67 1225-93-2087-156 560-43-1023-76-911 67-408-52 1003-75-805-61-561 41-650-47-608 44 617 47-681 51-681-51 395-30-471-34-1512 112 536 40-1696 127 998 75-526 38 650 51-995 74 885 67-1226 92 1685 125-771 59 815 59 211-15 613 46 911-69 408 55-1060 78 1455 109 320-23-574-43 819-61 572 43 376-28 535 40 1508-113-534-40 1694-127z">
          <text:p/>
        </draw:path>
        <draw:polygon draw:style-name="gr1" draw:text-style-name="P1" draw:layer="layout" svg:width="1.982cm" svg:height="0.155cm" svg:x="5.308cm" svg:y="1.501cm" svg:viewBox="0 0 1983 156" draw:points="1018,156 1983,69 1018,0 0,77">
          <text:p/>
        </draw:polygon>
        <draw:polygon draw:style-name="gr1" draw:text-style-name="P1" draw:layer="layout" svg:width="1.322cm" svg:height="0.103cm" svg:x="5.836cm" svg:y="1.354cm" svg:viewBox="0 0 1323 104" draw:points="682,104 1323,47 682,0 0,53">
          <text:p/>
        </draw:polygon>
        <draw:polygon draw:style-name="gr1" draw:text-style-name="P1" draw:layer="layout" svg:width="0.977cm" svg:height="0.077cm" svg:x="5.49cm" svg:y="1.293cm" svg:viewBox="0 0 978 78" draw:points="502,78 978,35 502,0 0,41">
          <text:p/>
        </draw:polygon>
        <draw:polygon draw:style-name="gr1" draw:text-style-name="P1" draw:layer="layout" svg:width="0.916cm" svg:height="0.07cm" svg:x="6.508cm" svg:y="1.223cm" svg:viewBox="0 0 917 71" draw:points="472,71 917,33 472,0 0,36">
          <text:p/>
        </draw:polygon>
        <draw:polygon draw:style-name="gr1" draw:text-style-name="P1" draw:layer="layout" svg:width="1.319cm" svg:height="0.101cm" svg:x="5.587cm" svg:y="1.645cm" svg:viewBox="0 0 1320 102" draw:points="680,102 1320,47 680,0 0,52">
          <text:p/>
        </draw:polygon>
        <draw:polygon draw:style-name="gr1" draw:text-style-name="P1" draw:layer="layout" svg:width="1.36cm" svg:height="0.105cm" svg:x="1.873cm" svg:y="1.113cm" svg:viewBox="0 0 1361 106" draw:points="702,106 1361,46 702,0 0,52">
          <text:p/>
        </draw:polygon>
        <draw:polygon draw:style-name="gr1" draw:text-style-name="P1" draw:layer="layout" svg:width="1.045cm" svg:height="0.081cm" svg:x="2.147cm" svg:y="1.197cm" svg:viewBox="0 0 1046 82" draw:points="540,82 1046,37 540,0 0,41">
          <text:p/>
        </draw:polygon>
        <draw:polygon draw:style-name="gr1" draw:text-style-name="P1" draw:layer="layout" svg:width="1.045cm" svg:height="0.081cm" svg:x="1.85cm" svg:y="1.495cm" svg:viewBox="0 0 1046 82" draw:points="537,82 1046,37 537,0 0,40">
          <text:p/>
        </draw:polygon>
        <draw:polygon draw:style-name="gr1" draw:text-style-name="P1" draw:layer="layout" svg:width="0.924cm" svg:height="0.072cm" svg:x="2.066cm" svg:y="1.608cm" svg:viewBox="0 0 925 73" draw:points="477,73 925,32 477,0 0,37">
          <text:p/>
        </draw:polygon>
        <draw:polygon draw:style-name="gr5" draw:text-style-name="P1" draw:layer="layout" svg:width="5.276cm" svg:height="5.204cm" svg:x="14.723cm" svg:y="5.024cm" svg:viewBox="0 0 5277 5205" draw:points="5277,5205 0,5205 0,0 5277,0">
          <text:p/>
        </draw:polygon>
        <draw:polygon draw:style-name="gr3" draw:text-style-name="P3" draw:layer="layout" svg:width="4.982cm" svg:height="0.56cm" svg:x="14.867cm" svg:y="5.412cm" svg:viewBox="0 0 4983 561" draw:points="4983,479 4983,0 84,0 0,84 0,561 4899,561">
          <text:p/>
        </draw:polygon>
        <draw:path draw:style-name="gr116" draw:text-style-name="P5" draw:layer="layout" svg:width="0.669cm" svg:height="1.437cm" svg:x="20.288cm" svg:y="1.965cm" svg:viewBox="0 0 670 1438" svg:d="M0 90v1348c517-3 583 0 670-114v-1324c-164 87-334 90-670 90z">
          <text:p/>
        </draw:path>
        <draw:path draw:style-name="gr6" draw:text-style-name="P5" draw:layer="layout" svg:width="0.676cm" svg:height="0.081cm" svg:x="20.267cm" svg:y="2.075cm" svg:viewBox="0 0 677 82" svg:d="M0 82c573-3 625-44 677-82">
          <text:p/>
        </draw:path>
        <draw:path draw:style-name="gr6" draw:text-style-name="P5" draw:layer="layout" svg:width="0.664cm" svg:height="0.151cm" svg:x="20.288cm" svg:y="3.16cm" svg:viewBox="0 0 665 152" svg:d="M0 134c693 78 635-128 665-134">
          <text:p/>
        </draw:path>
        <draw:path draw:style-name="gr4" draw:text-style-name="P4" draw:layer="layout" svg:width="2.815cm" svg:height="1.26cm" svg:x="6.54cm" svg:y="1.248cm" svg:viewBox="0 0 2816 1261" svg:d="M2689 628c-4-4 2-9 7-6 4 3-2 9-7 6zM2757 730c1 5 3 11 3 15 26 17 44 48 41 74 0 8-4 12-11 14 5 6 8 15 11 24 8 40-46 52-64 22-5-5-8-11-12-16-17-6-57-6-98-3-31 49-66 97-109 136-24 22-69 11-78-19-6 4-11 7-15 10-19 14-42-7-32-26 4-9 7-15 10-23-6 0-15-3-20-7-12 13-29 15-41 9-1 3-3 4-6 7 0 2-2 2-3 4 9 30-3 65-38 73-77 17-140-6-207-34 0 11-6 20-15 25-3 4-8 9-14 12-179 84-372 132-557 199-20 9-35-3-41-17-31 17-63-14-46-43-17 13-31 23-48 34-10 8-23 6-32 1-14 11-26 22-38 34-24 18-64-3-52-35 3-6 6-14 9-20-12 14-26 29-40 43-15 17-39 9-50-8-3 3-6 6-8 9-20 17-47 2-50-19-2 4-6 7-9 12-20 26-54-3-49-28 0-3 1-6 1-9-6 6-12 14-20 20-18 15-53 0-47-26 0-3 3-6 3-8-6 5-11 9-15 14-17 12-40 6-45-12-3 3-6 6-9 9-15 14-49 11-49-15 2-20 3-40 6-60-26 17-53 32-84 41-15 6-34-15-20-27 5-5 9-9 14-14-5 2-8 3-14 5-11 3-18-2-23-11-17 9-33 15-50 23 4 26 10 50 15 75 2 6 0 9-3 12 6 3 11 6 15 11 2 3 3 6 2 9 0 1-2 3-2 5 0 1-3 4-6 4 3 8 3 15 0 22-1 4-9 6-12 1-3-8-3-15-3-23h-2c0 0-3 3-4 3-11 3-25 3-37 0-9-3-6-18 5-18 7 0 13 0 21 1 0-3 3-4 3-6 0-4 6-4 6-1s0 6 0 7c2-1 3-3 6-4 0-2 0-5-1-8-5 0-8 0-11-3-5 6-14 6-18-1-10-20-17-42-23-63 0 0-2-2-2-5-26 11-52 19-79 26-7 2-14 0-19-3-10 3-21-3-29-14-3 2-6 3-9 5-33 12-56-38-27-54 39-18 74-36 111-52 5-1 9-3 14-1 0-2 0-2 0-2-9-18-14-36-15-53-3-11-2-23 6-29 4-11 12-20 24-29 26-51 63-106 84-161-15-14-30-31-42-47-30-4-59-8-83-22-9 3-17 6-28 11-7 17-13 32-21 49-3 21-9 40-18 56-3 5-8 5-11 2-2 6-3 12-6 18 4 0 7 3 6 8 0 8-3 14-5 20-1 6-10 12-16 9-11-3-20-6-29-11 0 0-2 0-3 0-2 0-3-1-5-1 2 6-3 12-10 9-37-20-71-52-97-86-3-1-6-3-9-3-55-37-104-84-153-127-58-53-124-97-176-154 0-1 2-4 3-3 113 57 205 153 312 220 3-2 5-3 9-3 10-3 14 6 11 14 3 1 3 3 6 4 5 3 8 5 14 8s9 8 9 14c17 13 34 30 45 44 15 2 30 3 45 5 5-2 10-2 13 1 1 0 1 2 1 3 0 0 2 2 0 5 2 3 0 4 0 6 0 3-1 5-3 6 3 0 8-1 11-3v-2c0-1 0-1 0-3-3-1-6-4-6-9-3-3-8-9-6-18 0-12 1-26 4-38-6-2-10-5-15-8-11-5-26-9-37-18-6 4-18 4-23-3-23-31-29-79-32-118-3-17-6-46-3-69-5-4-8-10-6-18 9-34 55-49 86-54 9-1 23-1 35 2 9-12 15-26 21-40v-1c-4 0-6-2-9-5 0-1-1-3-3-6-3 0-5-2-6-6 0 0 0-2 0-3-6-6-9-14-14-20-3-3-6-6-11-8-4 2-9 2-13 0 0 5 0 8-2 12 0 7-6 7-9 2-3-3-6-9-6-14h-2l2 2c0 3-2 3-3 4 1 3 1 5 3 8 3 6-3 11-8 6-3-3-4-4-6-8-2 7-12 8-15 2-6-11-14-23-13-35-7-17-10-37-7-57 0-10 1-21 6-32-8 0-9-12-2-12 2 0 2 0 5 0 0 0 2 0 3 0 5-32 44-46 77-34v2c1-2 4-2 6 1l1 2c12 7 23 17 30 29 16 15 22 40 19 63 1 6 4 10 6 15 0 1 0 3 0 3 4 3 7 6 12 11 2 1 3 4 5 7 1 2 1 2 1 2 14 17 25 33 32 52v1c39 28 77 62 98 106 15 34 37 69 51 104 6 8 10 15 15 25 6 10 12 19 15 30 2 3 2 4 0 7 0 0 2 2 2 3 1 2 3 2 4 2 22 9 45 17 62 32 15 15 15 34 7 49 3 4 5 11 2 18-2 0-2 2-2 3 0 20-6 39-23 51-9 21-21 41-35 58 3 0 6 0 8 0 3 0 6 3 6 5v-2c1 0 3-3 3-3 6-14 14-29 20-43 3-1 6 0 6 3-2 8-6 17-9 26 1 0 3-3 4-4 8-8 23-2 20 9 0 1 0 3-1 4 1 2 1 5 1 8-3 9-6 17-10 26 0 2 1 3 1 6 0 0 2 2 2 3 4 6 7 14 12 23-2-3-2-3-2-6-3-11-4-23-6-35-1-11 14-14 17-3 0-2 0-2 0-2 6 23 14 43 20 63 6-9 14-15 20-20-8-18-15-35-26-52-5-11-3-18 0-24 3-19 9-34 15-49 0-2 0-2 2-2-14-57-17-112 33-93 11-19 26-35 45-49-2-8-2-15-2-23 0-2-1-2-1-2-13 6-28 8-46-1-19-8-34-24-45-44-4 0-6-3-6-6-1-3-1-5-1-8-11-21-17-47-14-67 0-11 15-11 17 0 1 4 3 9 3 12 1-4 3-9 6-14-2 0-3-1-3-1-3-5-2-11-3-17-2-3 0-5 3-5-2-3-3-6-3-9-2-3 0-6 1-6-3-12-7-21-12-32-18-23-35-46-52-69-17-21-35-43-49-69-9 0-18 0-29 0-9 5-23 14-23 14-1 0-3 2-5 3-3 3-6 6-7 9 1 6 3 12 4 19 0 4 0 7-1 9 6 24 12 43 27 61 4 3-1 8-6 6-3-1-6-4-9-6-21-14-35-40-49-61-12-23-21-48-21-72 0-2 0-2 1-2 2 5 3 8 5 11 0 0 0-1 0-3-2 0-3-3-3-6 0-14 3-34 9-49-3-2-5-5-3-8 5-9 17-12 26-15 8-6 15-9 23-14 8-3 14-6 20-12v-2c0-6-2-10-5-16 0 0 0-2 2-2 4 2 7 6 9 11 3 0 6 0 6 3 38 55 77 115 110 174 8 11 14 23 20 35 8 16 15 34 23 49 2-3 3-4 3-7-1-5-3-8-3-12 0-2-1-7-1-10-8-6-14-18-7-29 8-9 16-18 22-29 3-11 9-21 14-32-2-15-3-32 1-46 0-4 6-3 6 0 0 0 0 2 0 3 2-4 2-9 2-12h-2c-9 0-18-6-26-11-3-1-7-3-12-6 0 6-2 12-6 17-3 3-8 3-11 0-17-11-12-49-12-67 0-8 1-16 3-22 0-3 0-3 0-6 2 0 3-1 3-3 5-11 11-20 20-26 0-1 0-3 1-3 2-3 5-5 8-6v-3c5-3 8-8 12-9 2-5 5-11 5-16 3-7 3-15 1-21-7-6-12-12-18-20-3-3 0-9 5-9 20 1 38 9 55 18 0-6 4-9 10-7 28 7 45 29 57 53 9 12-9 29-20 20-3 0-3 0-6 0-12 0-21-8-31-14 2 3 5 5 7 8 4 0 10 3 12 9 1 8 1 14 3 21 0-1 0-1 0-1 6-9 26-6 24 6-1 8 2 14-1 21 0 5-2 10-3 14-5 11-8 19-14 28-5 6-11 6-15 4-2 5-5 8-6 13 1 0 1-2 3-2 1-3 4-3 9-3 1 0 3 0 6 2 2-2 3-2 6 1 5 2 8 3 14 6 3 2 6 2 9 2 5-6 14-3 14 3 1 9 0 14-5 17 6 1 12 4 17 9-3-8-5-14-6-23 0-8 11-11 14-3 18 47 38 95 56 141 5-28 25-54 31-83 3-8 11-14 18-15-3-5-3-11-4-17 0-3 0-3-2-5-3-3-6-6-9-10-11-4-18-11-18-25-31-29-20-84-2-116 3-5 8-6 14-5 3-23 14-38 32-52 6-4 14-4 20 0 6-6 12-12 18-17 5-3 11 0 14 5 2 6 3 11 3 15 5 0 11 0 17 0 9 3 17 11 17 20s0 18-2 29c20 19 16 57 6 89 8 17 14 41 8 60 3 0 5 1 6 3 5 4 26 23 32 38 11 12 23 26 34 38 6 8 12 14 20 22 0-2-2-4-2-5 0-17 14-28 28-31-3-15-2-30 6-44-14-26 6-52 34-61 9-5 21 3 24 14 6 23 11 44 25 61 7-3 16-2 21 6 6 12 12 23 18 35 0-9-1-17 0-26 0-9 13-9 16-3s6 12 7 20c2-3 5-5 8-6-2-5-3-9-3-14-6-20-11-38-17-58-3-5-9-11-14-17-6-8-1-15 6-20h-1c0-9 14-14 15-6 2 3 3 6 3 9 28 23 48 52 68 81 1-4 4-6 9-7-6-8-14-14-16-23h-1c0-2 0-2 0-2 0 0 0-1 0-3 0 0 1 2 1 3 17-29 33-35 45-20 3 2 4 3 6 5 5 6 9 12 12 18 3 8 6 14 9 23 2 2 3 11 3 11 3 12 8 18 8 29 0 3 0 6-1 9 7-6 12-11 15-12 23-14 67-43 67-43 0 0 9 11 22-12 10-20 53-78 44-98-3 1-8 3-11 3-3 1-4-2-3-3 14-11 31-18 48-23 4-25 7-49 15-72-11-29-8-64-6-95 0-3 3-3 3 0 1 20 3 40 6 61-2-12 0-24 3-38 3-12 3-24 6-38 0-2 3 0 3 0 0 6 0 12-1 18 3-6 4-11 7-15 2-2 2 0 2 0-3 12-6 23-6 35 3-14 7-26 12-38 0-2 2 0 2 0-5 18-7 35-8 52-3 12-3 23-3 35 26 25 49 54 73 81 3 0 8 0 11 0 12 0 11 19-2 17-1 0-1 0-4 0-9 21-37 76-66 121 3 56 0 113 14 170 0 0 1 1 3 1 12 12 18 23 35 28 6 1 12 3 20 3 29-26 70 15 64 47 0 2 2 2 2 3 6 10 9 17 14 26 7-1 10 5 16 5 11 1 17 26 22 32 4 6 9 11 17 15 1 2 9 9 12 9 0 0 3-3 3-6 1-4 3-9 3-12 2-6 6-9 12-9-6-3-12-9-14-17-7-32 34-70 66-84 40-17 80 8 80 54 0 4 0 9-2 12h2c0 1 1 3 3 4 12-12 27-24 46-18 3 0 9 2 12 3 20 6 32 22 40 40 3-2 6 0 6 3s1 5 1 6c2 2 5 3 8 3 3-1 6-3 9-4 0-5 2-11 5-16 8-9 12-14 21-21 2 0 2 0 3 0 5-6 11-11 17-14 5-3 11-5 17-6v-2c8-16 23-15 34-7 4 1 6 6 10 7h2c20 2 26 42 1 45 5 10 11 20 16 29 0-6 3-14 3-23 0-3 3-5 6-3 12-66 38-132 66-187 3-6 12-3 10 3-9 58-18 121-33 181 0 1 0 3 0 6-2 3-2 6-3 9h1c8-6 17-8 26-9 17 0 31 12 40 30 6-4 14-3 20 1 6-1 12-1 17 2 3 3 6 3 9 6 5 0 8-1 12-1 0-5 0-8 0-14 2 6 3 9 5 12 6 0 10 3 14 6-2-1-2-3-2-4 0-12 14-15 18-5 11 20 26 46 48 55 0-12 0-23-3-35-5-11-9-20-14-32 0-1 0-1-2-3-4-3-10-4-13-3-13 3-11-20 1-15 6 3 14 1 19 6 1 2 1 2 1 3 5-3 8-3 12 0 20 24 42 53 52 81 11 13-13 33-24 18-3-3-3-5-5-6-1 0-1 1-1 3-6 12-17 15-26 12zM2769 687c0 8 0 14 2 22 1-3 4-6 4-9-1-5-3-8-6-13zM858 200v1c0-1 0-1 0-1zM872 172c-3 2-8 5-10 8-1 3-3 8-3 12 2-6 3-12 8-15 2-3 3-3 5-5zM650 258c0 1 0 1 0 1zM729 307c-1-2-1-3-4-5v2c1 1 1 3 3 3zM732 267h-1zM743 284c-1 0-1-2-3-3 0 1 2 3 3 3zM777 342c-3-8-8-15-14-23 5 6 8 11 11 17 1 1 3 3 3 6zM893 613c0-2 0-5 0-8-5-3-8-6-9-9-3-6-8-14-11-18 0-2 0-2 0-2 0 3 0 6 0 9 5 11 12 20 20 28zM916 628c0 0-2-1-2-3-1 0-1 2-3 2 2 1 3 1 5 1zM945 278c0-2 0-3 0-5 0 0 0 2-1 3-2 2-4 5-7 5 0 1 0 1 0 3 3-3 5-3 8-6zM439 304v-2zM428 712c-1 0-1-3-3-3 0 0 0 1 0 3 2 0 2 0 3 0zM447 810c-11 0-22 0-32 0 4 1 9 3 15 4 0-1 0-1 1-1 7-2 10-3 14-3zM474 836c-1 0-1 0-1 0-2 0-3 0-3 0 0 0 3 0 4 0zM501 805h-1c0 0 1 0 1 2 0-2 0-2 0-2zM538 619c-1 0-3-3-3-5 0 3 0 7-2 10 2-2 4-2 5-5zM1696 498c0-1 0-3 0-4 0 1 0 3 0 4zM1872 331c0-4 0-6 0-10-1 0-1 1-1 1 0 3 1 6 1 9zM954 1059c0 0 0-1 2-1-2 0-2 0-2 0 0 1 0 1 0 3 0-2 0-2 0-2zM1490 943c3 0 6-2 9-2 0-1 0-1 0-3-2 0-3-1-3-1-3 1-5 4-6 6zM1741 558zM1981 550c2-1 3-3 5-4 0 0 0-2-2-2 0 3-1 5-3 6zM1865 125c1 15 1 32 3 49 21-5 44-6 64-6-21-25-40-52-61-78 0 10-2 21-5 32 0 1 0 1-1 3zM1854 82c0 3 0 8 2 11 0-2 0-2 0-3 0-2 0-5 0-7-2 0-2-1-2-1zM1842 180c6-2 12-3 18-5-3-15-3-32-3-49-1 0-1 0-1-1-2 0-2-2-2-2-3 19-6 39-12 57zM1689 457c3 9 4 15 6 23 0-5 0-11 1-17 2-9 16-14 20-3 5 15 11 35 3 49h-1c6 4 12 7 18 11 15 7 26-4 32-16-21-9-36-40-13-53 12-8 24-9 33-5 8-3 19-9 28-3 1 0 3 3 4 5 8 3 14 7 20 12 8 4 14 12 19 21 0 2 0 2 0 2 3-5 7-8 12-9-2-37-3-74-6-111-2-10-2-18-3-29-11 14-22 25-33 33 0 0-29-11-38 3-10 12-30 61-41 64-6 3-34 11-61 23zM1543 337c2 4 2 7 3 10 2 0 2 0 3 0-1-3-4-6-6-10zM1410 334c0 5 0 10 2 14 1 0 3 0 4 0-3-4-4-9-6-14zM1196 512c0 0 0-2 2-2-2 0-2 0-2 0zM1098 451c0 3 3 7 3 12 5 12 14 32 20 53 6-24 14-47 21-71 2-7 5-13 8-19 8-21 20-43 32-61 0-6 0-9 0-14v-1c-1 0-3 0-3 0-11 10-18 21-27 33-8 25-19 48-34 65-6 4-14 6-20 3zM1014 370h1c0 0 0-2-1-2zM1005 345c1 3 3 6 6 9-2-3-3-6-3-10h-2c-1 0-1 1-1 1zM996 678c4 3 7 8 9 14 1-6 4-11 7-15-6 1-12 3-16 1zM971 345c0 2 2 3 2 6 1 0 1 0 1 0 0 0 2 0 3 0-3-3-3-4-6-6zM956 602c0-3 3-6 3-9 0 0-2 0-3-2 0 5 0 8 0 11zM792 952zM772 931c0 1 2 1 2 3 0-2 1-5 1-8 3-3 6-8 9-11 0-1 2-1 2-3-2 2-2 2-3 3-2 5-6 11-11 16zM760 914c1 1 3 3 3 3 0 0 0-2 0-3 0 0-2 0-3 0zM716 723c1 1 1 1 1 4 2 0 2 0 3 0v-1c-1-2-3-2-4-3zM667 1021c4 8 6 15 9 23 4 0 10-2 15-3 11-5 22-9 32-11 22-8 43-15 66-23-9-14-17-29-26-44-5-6-9-14-12-20-2 0-3-2-5-2-1-1-1-4 0-6-1-3-3-6-3-9-6 6-12 11-18 15-5 5-11 11-17 16 0 1-3 1-3 1-8 6-17 12-26 17 0 3 0 6-2 9 0 0 2 0 2 2 0 3 0 6 0 9v1c1 5 0 8-3 8-2 5-3 9-5 12 0 3-3 5-4 5zM2468 675c0-1-2-3-2-6 0 2 0 3 0 5 0 1 0 1 0 3 0 0 2 0 2-2zM2494 667c-3-4-7-7-8-9 0 3 0 8 3 11 0 0 3-2 5-2zM2599 646l-3-2v2c2 0 3 0 3 0zM2737 701c-11-9-20-20-31-32-1 2-6 2-7-2 0-1-2-1-2-4 0 3 0 3-1 6-2 2-2 5-2 8v1c0 2 0 3 0 5 2 3 0 4-3 6 0 9-6 15-14 18 17 5 31 8 43 16 5-2 8-5 12-8-12-3-23-8-33-15-5-3-5-11 1-11 8 0 14 1 22 6 7 3 10 6 15 6z">
          <text:p/>
        </draw:path>
        <draw:path draw:style-name="gr4" draw:text-style-name="P4" draw:layer="layout" svg:width="1.395cm" svg:height="1.958cm" svg:x="5.364cm" svg:y="0.765cm" svg:viewBox="0 0 1396 1959" svg:d="M18 600c0 0 0 2-2 2 0 1 2 1 2 1-9 8-5 23 1 31 2 1 2 3 5 1 0 2 0 2 0 2-2 0-2 0-3 0-2 4-6 9-11 12-3 3-6 3-9 6-2 2 0 5 1 5 2 0 2 0 3 0-1 4 4 15 5 20 3 7 5 18 11 24 0 2 0 2 0 3 1 3 3 8 6 12 0 2 1 0 0-1 0-3-2-6-3-9h1l2 1c0 2 0 5 0 6 0 2 1 2 1 0 2-1 2-4 3-7 0-2 2-3 2-5 3 5 6 9 8 14 1 1 3 1 3 0 1-5 1-9 1-14 0 3 2 5 2 8-2 3 1 4 3 3 6-2 9-6 7-12-1-2-1-5-1-6 3 1 5 1 6 1 0 3 0 3 0 6 0 2 0 3 0 3 0 2 0 5 0 6 2 2 2 2 3 2 0 1 2 3 3 1 0-1 3-1 3-3 0-1 2-1 2-3 0-1 0-3 0-6 1 2 3 2 3 3 3 0 4 2 6 3-2 5-2 11 0 17 0 0 0 2 1 2 2 4 2 9 4 13-2 3-5 7-8 10-3 4-6 7-11 9 0-3-6-3-6 0 0 1 0 3 0 3-1 0-1 0-3 1 0-1 0-4 0-4 0-3-3-5-5-2-1 2-1 5-1 9-2 0-2 0-2 2 0-2 0-3 0-3 0-3-1-5-4-3 0-2 0-3 0-3-2-2-5-2-5 0 0 11 0 21 3 30 3 7 5 16 12 17 0 2 2 0 2 0 0 2 3 2 3 2 6-6 12-11 20-16 26-7 50-10 78-9 15 2 31 6 44 11 2 0 5 2 5 2 5 4 8 10 12 16 0 23 0 48-6 72 0 2-5 8-8 14v-1c2-10 2-19-1-28 0-3-5-3-5 0 0 0 0 1-1 3 0 2 0 3 0 3-5 23-16 40-29 60-8 12-17 24-19 38-1 2-4 3-4 6-2 0 0 3 1 2 2-2 3-2 5-5 3 3 6 3 8 0 4-3 7-8 12-12 3-3 6-5 9-8 3 3 8 3 11 0 4-3 7-9 12-14-12 28-29 54-49 77 0 0 0 1 1 1 25-18 40-41 54-67 0 2 0 3 0 5 0 1 0 3 0 3-3 1-5 4-5 7-10 17-21 31-35 45-1 1 0 3 2 3 9-8 18-15 26-23-2 4-5 9-8 14-1 1 2 3 3 1 14-14 25-27 34-43 3 0 6-1 8-6 1-3 1-4 1-7h2c1 9 7 19 12 30 0 0-2 2-2 3 6 17 16 29 28 42 0 18-2 36-3 56-17 43-16 92-23 138-3-3-6-3-9-6-2 0-2 0-5 0-1-2-6-2-9 0-3 0-5 0-8 0s-3 3-1 6c1 0 3 1 4 3 0 1 0 5 0 6v2c0-2 0-5 0-8 0-2-3-3-4-2-2-4-3-9-5-15h-1c-4 8-2 17-2 26-6 34-6 71-11 107-3 8-6 17-7 26-11 0-29 0-40 5 0 1-2 1-3 1-8-1-17-1-26-1-2 0-3 0-5 0-6 0-15 3-20 7-3 4-4 8-4 11 0 2 0 3 0 5 0 1-2 3-2 3-1 4 3 6 5 3 3-3 6-6 9-9 0-2 2-2 3-2 3-1 6-1 9-1 6 1 11 1 17 4-3 2-6 6-8 11-1 6-1 11 5 14 0 1 3 1 3 0 3-2 6-8 9-11 14 3 28 6 40 6 0 2-3 3-3 5-11 9-20 20-28 30-3 3 0 8 5 5 12-8 26-14 38-23 3-3 8-5 11-6 3 0 6-2 9-3 3 0 6 0 8 0 3-2 6-3 7-3 2 0 2 1 5 1 0 2 2 2 3 2 3 1 6 3 8 3 6 0 9-8 4-9 2-2 2-2 2-2 1 0 3 0 3-1 0-2 1-2 3-3 3-2 0-8-3-8 1-2 3-2 3-3 3-8 5-19 6-28 6-6 11-12 12-21 20-8 40-37 29-57 2-1 2-3 5-3 2-1 5-1 6-3 6-1 8-6 8-11 1-1 3-1 4-3 3-3-1-7-4-6 0 0 0-1 0-3-12-11-28-18-43-26 1-1 3-3 3-3v2c2-5 3-11 9-14 6-5 17-8 20-17 2-3-1-6-3-8-3-1-6-1-9 0 0-7 0-12 0-19 1 0 1-2 1-2 2-5 2-9 2-14 3-12 8-26 12-41 3-11 8-22 11-34 20 17 43 34 67 46 14 14 31 29 51 34 7 9 16 15 27 15 2 0 3-1 2-3-3-1-6-3-9-6 1 1 4 3 7 6 3 2 8 5 12 8 11 20 22 41 30 61 3 9 15 3 13-5-4-13-9-27-17-39 19 9 37 16 56 15 1 6 4 12 6 18 1 2 1 3 1 5-6 24-12 47-17 72-4 17-9 35-4 52 1 1 3 1 3 1 3-6 6-10 7-15-1 5-3 9-4 14-5 9-8 18-12 26-2 1-2 3-2 6-35 35-78 67-116 101-3 3 3 7 6 6 49-26 98-57 136-96 0 1 0 1-1 4v2c-31 27-65 50-98 73-2 2-2 3 1 5-15 9-29 17-44 26-3 1 0 4 3 3 49-26 104-40 151-66-1 3-1 8-3 12-3 5-3 8-4 14 0 3 1 3 3 3 0 2 0 2 0 3-2 9-5 20-8 29-4 12-9 25-14 37-1 1-3 3-3 5-7 16-10 33-12 52-9 3-14 9-17 16 0-1-3-4-6-1-9 18-3 38 5 55 3 6 10 6 15 1 0 2 3 5 3 7h-1c-11 1-10 15-2 18 46 17 101 15 150 18-2 9-3 17-2 26-4-1-7-3-9-3-6-3-12 5-7 11 4 6 10 11 18 14 0 1 0 1 0 1-3 0-9 0-12 0-2 0-2 2-2 2-4-2-9-3-12-5-6-4-14 5-6 11 9 6 18 9 29 14 0 1 0 1 0 1 0 2 0 3 3 5 0 0 3 1 3 3 2 0 2 0 3 1l2 2c-2 0-2 3 1 5 40 33 92 50 141 70 43 15 85 35 129 46 2 1 3 3 5 4 9 7 18 17 29 19 2 0 3 1 3 1 2 0 3 3 3 5 2 0 5 0 5-2 0-1 1-1 1-1 2-2 2-3 2-5-3-9-9-15-17-20-1-1-3-1-3-3v-1c-3-14-17-20-31-25-9-6-21-12-32-18-30-20-62-40-94-55-15-8-31-20-46-31 0-1 0-3-2-4-7-11-18-19-29-28-7-6-13-14-21-20 0-1 0-3 2-4 1-2 1-5 4-8 11 3 22 5 32 6 2 2 3 3 6 5 14 4 28 3 45 1 3 0 9 2 13 2 8 9 22 15 31 21 17 11 32 23 45 38 2 2 4 3 5 3 2 2 3 5 6 7 8 6 15 10 23 18 3 3 8-3 5-6-3-6-8-11-14-14-11-12-14-29-21-43-2-3-5-6-5-9 3 3 6 8 9 9 6 11 12 23 20 31 9 9 20 15 31 18-2 3 0 6 3 6 6 0 6 0 12-1 8 0 8-11 0-11-15 0-26-12-37-23s-20-23-27-37c-2-1-2-1-3 0-2-6-5-10-8-15-3-6-10-15-16-20 13-7 0-26-11-18-6 3-11 9-15 15-2 0-2 3-2 3-15 2-31 3-46 3-3 0-6 0-9 0-5-1-9-3-14-4 0-2-1-3-3-3-14-5-26-10-41-13 15-27 26-58 40-84 3-7 6-14 9-21 14-20 26-43 29-63 6 2 12 3 20 5 3 3 7 6 11 9 1 0 3 1 4 1 6 5 11 11 15 19 0 0 0 1-1 1-3 5 0 11 6 9 0 2 0 2 0 2-9 9 6 23 14 12 3-1 7-4 10-6 0 2 0 2 0 3 0 3 3 3 3 0 0-1 0-3 0-6 3 0 5-3 8-3h1c0 1 3 1 3 0 0-2 0-2 0-3 6-3 6-9 2-14 1-4 1-9 1-14 2-1 3-1 5-3 3 11 4 20 6 29 0 2 5 2 3-1 0-9-1-20-3-31 3-3 6-7 6-12 0 0 0-2 0-3 0-11-1-22-4-32 7-2 13-8 16-17 5-14-4-28-18-32 0 0-2 0-3 0 0-8 0-15 0-22-3-36-3-72-18-110-5-9-8-18-13-26-8-20-16-38-27-55 16 3 33 6 49 8 18 9 35 21 50 33 3 4 5 7 8 10 3 6 12 1 9-5 3-1 3-3 3-6 2 0 2 0 3 0 8 0 11-8 8-14 1-1 3-3 3-3 6-1 12-1 18-3 2 2 3 3 5 3 0 0 0 2 1 2 2 0 5 1 7 1 26 9 52 20 76 35 3 3 8-1 8-4 3 0 6-3 9-8 1-3 3-8 6-12 3-2 6-3 8-3 24-3 47-5 70-14 0 3 5 6 9 6 2 2 3 3 3 3 3 3 8-1 5-4v-2c6-1 12-3 17-3 18 3 36 8 55 12 1 0 3-3 3-3 6-3 7-9 7-14 22 8 45 19 66 30 2 1 3-2 2-4-34-21-71-39-106-56-3 0-3-2-4-2-2 0-2 0-2-1-32-11-61-23-93-32 6 0 12 1 18 1 32 3 66 9 98 8 2 0 3-3 0-3-20-8-41-16-66-20 0-2 0-2 2-2 3-1 0-6-2-6-29 0-58-1-87-6-1 0-3 0-6-1 0-2-3-5-6-7-28-15-54-33-83-47 11 0 22-2 32-3 2 0 2 0 2 0 41-5 79-15 119-26 2-2 2-6-1-5-2 0-5 2-6 2 0-2 0-2-2-2-18 5-38 8-57 11 5-3 8-6 11-9 6 0 14 0 20 0 3 0 6-2 6-3 2-2 3-2 6-3 0 1 0 3 2 3 4 0 10-2 15-3 3 0 3-5 0-5-9 0-17 0-24 2-2-2-2-2-3-2-5-1-8-3-11-3-2-3-3-6-6-6-2 0-2 0-2 0h-3c0 0-3 2-8 2-27-11-55-16-82-20-20-10-40-17-60-25-1 0-3 0-3 2-3-2-6-5-8-5-9-6-21-12-30-17 55 8 115 11 168-12 3 0 2-5-1-5-46 7-91 5-135-1 41 3 84 1 118-17 1 0 1 0 0 0-34 15-75 3-110-3-48-9-96-18-142-35-72-28-136-83-217-75-5 0-8 3-10 7-1-1-4-1-7-1 0-2 0-3-2-3h-1c-2-2-3-3-5-5-15-10-23-23-34-36 13 0 28 0 42-5 3 3 9 5 12 6 8 2 14 0 20 0 0 6 3 9 9 11 6 7 17 7 21-3h2c6 0 14-2 20-2s14-1 20-3c7-1 14-3 20-4 3 1 6 1 6-2 1 0 1 0 3 0 4-1 3-9-2-9-1 0-1 0-1 0 0-3 0-3 0-6 1 0 3-2 4-5 2-3 2-4 2-6 1 0 1 2 3 3 9 15 23 20 38 12 5-3 8-9 8-13 6 0 11-2 14-5 4-5 7-9 9-15 1-10 3-14 9-19 2 2 3 2 5 2l1 1c-1 2-3 5-3 8-3 6 3 12 9 12 13 0 25-6 35-14 7-4 0-15-7-10-3 3-8 4-14 6 3-3 6-6 8-8 0 0 0-1 1-1 2 3 8 3 11 0 0-2 0-2 1-3 2 1 5 4 10 6 7 1 17-2 19-8 3-11 3-21 0-30 6 0 9-2 15-5 2 0 2 0 2 0 1 0 3 0 3 0 3-2 4-3 6-3 3-2 6-5 6-8 6 2 14 3 22 5 1 0 1 0 1 0 6 1 9 0 11-3 0 0 1 0 1 1h2c6 6 12-1 9-6 2 0 3 0 3 0 3 2 6-1 8-4 0-8-3-11-9-14-5-3-10 3-7 6h2c-2 0-3 0-3 1-3 0-3 2-3 2-2-2-3-3-6-5-2 0-2 0-5-1-1 0-3 0-4-2-2 0-2 0-4 0-12-1-24-6-36-10 43-62 336-483 413-606 0 0 12-38 12-44s-18 9-18 9l-454 622h1c-4-1-9-3-13-4 0-2 1-2 1-2 0-4-1-9-6-12-3-3-6-2-9-2-3-3-8-4-12-3-2 2-5 3-8 5-5 0-8 1-9 3-19 0-22 26-3 31 1 0 3 1 6 1-3 11-8 20-14 29 0 2 0 3 0 3-1 0-3 0-3 0 3-7 6-15 9-21 2-5-4-5-6-3-5 6-9 12-14 17 0-2 0-3 0-5 0-12-17-14-21-5-5 10-9 17-14 25-1-3-6-3-8 0-1 3-4 8-7 12 0 0-2 0-3 2 0-5-5-11-11-10-23 4-46 8-69 11-9 2-9 12-3 17 0 0 0 2 0 3 0 2 0 3-1 5-2-5-5-6-11-5-2 0-3 0-3 0-2 0-2 0-2 0-1 0-1 0-3 2h-1c0-2 0-2-2-3-26-5-49-7-75-5 5-3 5-11 2-14-9-9-20-15-31-20 3 2 6 2 9 2 8 0 11-11 5-15 1-2 0-5 0-5-40-20-89-2-129 3-3 2-4 3-4 3-8 2-14 5-20 9-3 0-5 0-8 2 6-5 12-9 19-14 18-9 38-14 59-15 22-3 54 0 72-14-1 0-1 0-3 0 3-2 6-3 8-3 0 0 0-3-2-3-29 0-61-12-93-12 1-2 0-4 0-4 0-1 0-1-2-3-12-24-58-9-76 2-17 11-32 26-41 44-2 0-2-1-2-1-3-3-6-3-9-2-3 2-5 2-6 5h-2c0-2 0-2 2-3 1-3-2-8-5-11 0-3-6-3-8 0l-1 3c-17 11-28 32-35 49-2 0-5 0-6 3-2 3-2 5-2 6-4 0-9 3-9 8 0 3 0 5 0 6-3 0-5 2-6 2-3-2-8-3-11-5 3-6 6-12 8-17 3-4-3-11-6-6-5 3-8 9-11 12 0-4 0-9-3-13 20-14 32-36 27-63-1-9-4-19-9-28-3-14-7-26-15-38-2-2-3 0-3 0 3 5 3 9 6 14-6-9-14-17-23-23 3 0 5 0 6 0 3 0 3-3 2-5-43-14-109-33-155-15-4 0-6 1-9 3 0 2 0 2-2 2 0 1 0 1-1 1 0 2-2 2-2 3 0-1 0-3 2-3 0-3-5-5-6-3-6 11-14 20-20 31-6 7-11 13-14 23 0 3 3 4 5 4zM27 632h1c0 2-1 2-1 2zM549 1679c-2-2-2-2-2-3 2 0 3 0 5 0-2 0-2 1-2 3-1 0-1 0-1 0zM579 1683l-1-1c1 1 4 3 7 3-1 0-3 0-4 0-2 0-2 0-2-2zM1182 1206c1 3 1 8 6 9 9 5 18 8 29 11v1c-20-6-40-12-58-18-2-3-2-6-3-9 9 3 18 5 26 6zM201 920c-1 0-1 0-1 0 0-2 1-3 1-3h2c-2 1-2 1-2 3zM45 570v1c-3 0-3 3-3 6 0 0-1 0-3 0 2 0 2-3 3-3 0-1 2-3 3-4zM1022 1243c-1 0-1-2-1-2 1 0 3 0 5 0-2 2-2 2-2 2zM226 678v-1zM674 1511c2 0 3 0 3-2 3 3 5 5 6 6 2 3 6-1 5-3-2-3-3-3-5-5 2-1 2-1 3-1 2 1 5 3 6 3 5 2 10 0 14-3 0 0 2 0 5 0-12 6-26 9-37 15v2c0-5 0-8 0-12zM711 1495v-1c3 1 7 1 11 1-5 0-8 0-11 0zM890 1180c0 0 0-1 0-3 0 2 0 3 0 3zM157 643c0-3 0-6 0-8 0 2 1 2 3 2 0 1 0 3 0 3 0 1-2 1-3 3zM122 660c0-2 0-3 0-3 0-2 0-2 0-2l1-1c-1 1-1 3-1 6zM137 603c0-1 2-3 2-4 1 4 1 9 4 15-1-2-1-3-3-3-1-3-3-5-3-8zM117 622c0 1 0 1 2 1-2 0-2 0-2 2 0-2-1-2-1-2 1 0 1 0 1-1zM729 1059c3 5 5 8 6 11-1 0-1 0-1 0-2-3-2-6-5-11zM812 1396c0 3 0 6 0 7 0-1 0-4 0-7zM666 1442zM812 1491c0 1 0 1-2 1 0 0-1 0-1-1 1 0 3 0 3 0zM835 1238c0 2 1 2 1 3h-1c0 0 0-1 0-3zM270 770l2-3c0 0 0 3-2 3zM241 805zM200 756l1 2c-1 0-1 0-1 0 0-2 0-2 0-2zM186 706zM97 712c2 0 2-3 2-5 0-1 0-3 0-3 3 3 6 5 11 5 0 1 0 3 0 3l-2 1c-3-3-8-3-11-1zM131 707c-2 2-3 3-3 5 0-2 0-3 0-3 0 0 1-2 3-2zM371 680c0-2 2-2 3-3-1 1-3 1-3 4 0-1 0-1 0-1zM1033 1244c0-1-1-1-1-1 1 0 1 0 1 1zM567 1645c3-7 6-17 8-26 24-33 53-67 73-104 5 0 9 0 14-1 0 4 1 9 1 12 0 6 8 8 10 3h1c14 3 26 0 40-3 17-5 35-11 52-17l1 2c2 3 4 4 5 6-9 23-20 46-29 69-14 26-26 52-37 79-3 6-4 14-6 23-11-3-20-6-29-9-35-11-69-23-104-34zM207 770h-1zM186 749c-3-2-3-4-5-5h2c0 0 1 3 3 5zM174 732c0 1 1 1 3 3-2 0-2 0-2 0-1-2-1-2-1-3zM157 686c-9 4-15 9-23 17 2-2 3-5 3-6 3 0 5-2 6-5 3 0 6-3 11-6 0 0 1 0 3 0zM65 589c0-1 0-1 0-1zM108 560c2 0 2 0 2 0zM749 712zM876 684c0 2-1 5-3 5 0 0-1 0-3-2 2 0 3-1 3-1 2 0 3 0 3-2zM876 724c-1 0-1 0-3 0 0-1-3-3-5-3-1-3-1-6-1-11 1 0 3-1 3-3 0 2-2 5-2 8s4 8 8 9zM1114 1194c8 0 14 1 22 3-2 0-5 0-8 1-3-1-9-3-14-4zM1157 1229h2c0 2-2 2-2 2zM1206 1243c-11 1-21 3-32 4 1-1 3-1 5-3 1-1 1-1 3-3 6-3 15-1 24 2zM946 1471c0 0-2 0-2-2 2 0 2 2 2 2zM824 1532c-3 8-8 14-12 21 3-7 6-13 9-21 2 0 3 0 3 0zM177 761c-11-5-23-9-34-14 0-6-1-12-3-14-12-24 14-44 35-38l2 2v1c-2 6 0 11 3 17-3-2-6-5-11-6-3-2-6-2-9 1-9 17 3 37 17 51zM51 683h-1c1 0 1 0 1 0zM42 681c0 0 0-1 0-3 0 2 0 2 0 3zM31 611c2 1 2 1 2 1 0 2 2 2 2 0 0-4 0-9 3-12 0 0 18-6 23-3 3 5 1 11 0 14-4 9-7 18-11 29-12-6-19-17-19-29zM61 554c1 0 1 0 1-1 2 0 3 0 3-2 0 2-3 3-3 3-3 2-5 2-8 5 2-3 5-5 7-5zM91 547c9-2 17-2 26-2-9 2-17 3-23 2 0 0-1 0-1 1 0-1-2-1-2-1zM552 707c-3 2-6 2-9 3-11-1-22-3-34-4 14-2 29 0 43 1zM832 701c1-3 1-4 1-6v3c-1 3-1 5 0 6-1 0-3 2-3 3 0-1 0-1 0-1 0-2 0-3 2-5zM899 667h-1c-2 0-2-1-4-1-4-2-10 1-12 6 0 2-1 3-1 3-2 0-2 0-2 0-3 2-3 5-3 6-3-1-6-3-8-3-3 0-6 0-9 0 2-7 3-15 5-23 12 5 23 8 35 12zM781 758zM665 860c0 2 1 3 3 3-2 0-3-1-5-1 0 0 2 0 2-2zM668 865c3 0 5 0 8 0v1c-2-1-5-1-8-1zM761 1826c-7-2-16-5-24-8 0-1 0-1 0-3 3 2 8 3 12 6 3 2 8 3 12 5zM714 1760c0-3 0-6 0-9 0 0 1 0 1 1 0 2-1 5-1 8zM296 1201c0 2 0 2 0 2zM188 776c-4-1-7-3-10-4 3 1 8 1 11 3 0 1 2 1 3 1-1 0-3 0-4 0zM62 801c0-2 0-2 0-2h2c0 0-2 0-2 2zM405 660c0-2 0-3-2-3 17-11 34-20 54-20 6 0 14 0 21 0-10 3-20 4-27 6-16 3-31 9-46 17zM640 730c-16 3-35 5-53 3 18-1 35-3 53-3zM844 651c3 1 6 1 9 3-1 7-4 17-9 24-2 0-3 0-6 0 4-9 6-18 6-27zM728 784h-2c2 0 3 0 3 0h2c-2 0-2 0-3 0zM1003 1015c4 1 10 6 16 6h2c-2 1-2 3-2 3-1 0-3 0-4 0-8-5-14-9-23-15 4 1 8 4 11 6zM1107 1047c-2-2-2-2-2-2-3 0-3-1-6-1h-2c3 0 7 1 10 3zM929 1558h-1zM905 1743v-1c2 1 3 4 5 6-2-2-5-3-5-5zM901 1731c1 1 1 3 1 6-1-3-3-3-4-6 0-2 1-3 0-5 1 2 1 3 3 5zM757 1780c-5-3-9-3-14-5-3-1-6-3-9-4 3-5 4-10 6-14 5 6 9 12 15 18 0 2 2 2 2 5zM569 1687c1-5-2-11-8-14-2 0-3 0-3 0 0 0 1 0 3-2 4 5 11 8 17 11-3-2-8 0-8 5-1 0-1 0-1 0zM426 1146v2zM218 1371h-1c1-1 1-1 1-3 0 2 0 2 0 3zM155 773c-12-1-23 0-33 2 0-2 0-2 0-2 3-1 6-5 9-6 9 0 17 3 24 6zM53 778c1 1 1 1 1 1 2 0 2 0 2 0 0 2-2 3-2 3v-1c0-2-1-2-1-3zM87 756c0 0 0 2 0 3h-2c0-1 2-3 2-3zM44 697c0-2-2-2-2-2h2zM24 640c0 0 1 1 1 3-4 12-4 26-4 40-2-2-2-5-2-6-1-3-3-8-4-11-2 0-2 0-2-2 0-1 0-1 0-3-1-1-3-1-3-3 6-3 11-12 14-18zM18 605c0 1 1 1 1 3 0 0-1 0-1 1 0 3 1 5 1 8-1-3-3-9-1-12zM547 1347c3 1 3 6 0 6s-4 0-6 0c-3 0-3-5 0-5s3-1 6-1zM947 1810c-1-3 2-6 5-4 9 9 20 15 29 23 0 0-1 3-1 1-13-4-22-12-33-20zM992 684c0 2 1 3 0 0z">
          <text:p/>
        </draw:path>
        <draw:polygon draw:style-name="gr8" draw:text-style-name="P1" draw:layer="layout" svg:width="11.075cm" svg:height="2.139cm" svg:x="9.224cm" svg:y="1.596cm" svg:viewBox="0 0 11076 2140" draw:points="11076,2140 0,2140 0,0 11076,0">
          <text:p/>
        </draw:polygon>
        <draw:path draw:style-name="gr4" draw:text-style-name="P4" draw:layer="layout" svg:width="0.754cm" svg:height="1.89cm" svg:x="1.83cm" svg:y="0.715cm" svg:viewBox="0 0 755 1891" svg:d="M753 570c-2-1-2-1-2-3 0-3-3-6-6-12-5-6-11-6-17-3-6-5-12-10-17-14 3-6-3-12-9-12l-1-2c-17-20-39-37-60-52 0-4 0-9 0-12-2-6-3-11-3-14-2-3-2-4-3-6v-2c-2-3-3-7-6-9-2-1-2-3-5-3 0-3-3-3-5-4 0-2 0-2 0-2v2c-1 0-1 0-3-2 0 0 2 0 2-1 0 1 0 1 1 1v-1c2 0 2-2 2-2-2 0-2 2-2 2 0-2 0-2 0-4 2-4-1-10-7-12-6 0-12 2-17 3-2 0-2 0-2 0 4-9 7-20 11-29v-1-2-1c0 0 0-2 2-2 0-3-2-6-3-8 1 2 4 2 6 0 0 0 1 0 1-1h2c-3 5-3 9-5 12-1 5-4 9-6 14-3 0 0 3 2 1 6-7 10-16 13-26 0-1 0-3-1-4v-2c1-1 1-4 0-6-2-1-3-3-6-1-2 1-5 1-8 3-1 3-3 6 0 9 0 0 0 1 2 1-3-1-6-1-8 2-8 11-12 21-15 32l-441-330c-28-18-58-38-81-50-3-2-3-2-7-3 0-2 0-2 0-2-2 0-2 0-2 0-6-5-10-8-15-12-2 0-3 1-2 3 2 0 2 1 5 3-9-5-12-6-12-6 0 26 94 98 94 98l436 356c-1 3-3 7-4 12-2 3-3 9-5 12-6 8-9 17-14 26v2c-1 0-3 1-3 1-1 2-1 3-3 5v3c-3 1 0 6 3 6 3 2 3 0 5 0 3-3 6-3 7-6 2-2 2-3 2-3 0 0 0-2 0-3 6-5 11-12 15-20 2-2 2-3 5-6 0-3 3-5 4-8 2 5 3 11 5 14s3 5 6 6c-8 28-12 55-14 83-4 9-7 21-13 30-3 5-7 11-11 17 0 0-2 0-2 2-3 1-4 3-6 6 0-2-1 0-1 0h-2c-1 1-3 4-3 6-1 3-3 6-4 8-2 0-2 1-2 1-2 3-3 8-6 11 0-2-2-2-3 0 0 3 0 9 0 12-2 5-3 9-3 14-2 6-3 12-6 18-8-3-17 6-22 11 0 0 0 1-1 3-2 0-2 0-2 0-4 3-9 9-12 14-3 3-6 9-11 13 0 2 0 2-1 4-2 1-2 1-3 3-5 0-8 1-13 4 2-6 5-14 5-21 0-3-5-5-8-3 2-2 2-5 2-5 9-18 12-37 9-55 0-2 0-3-2-3 2-2 2-3 2-5 11-24 8-53-20-68-1 0-1 0-3 0 0-2 0-2 0-2 0-2-1-3-3-3 0-2 0-2-2-3-1-3-3-6-4-8-2-3-3-1-3-1-6-6-14-11-23-16-2-1-3 2-2 3-12-4-26-7-41-4-3 0-1 4 0 4 6 0 11 2 15 2-27 3-58 21-70 43-2 1 0 1 0 1 8-9 17-15 27-21-12 12-22 26-30 37-3 1 0 4 3 1 6-6 12-12 18-18-6 9-12 18-18 26-3 3-6 4-11 6-17 9-35 18-53 26-22 9-75 29-88-3 0-2-1-2-1 0 0 41 63 23 84 17 20-6 38-14 57-23-20 15-35 35-49 56-23 20-46 34-72 17 15 20 40 14 60 2l-2 1c-6 8-12 16-20 23-18 19-46 17-58-7 8 18 15 35 35 35-3 3-6 6-8 10-3-1-4-3-7-6-8-9-12-21-17-30 0-2-3-2-3 0 3 15 9 32 20 43-9-3-19-11-20-26-2-2-3-2-3 0 0 15 9 27 23 35-3 6-5 12-8 18 0 2-1 5-3 6 0-1-1-3-3-6-6-15-11-34-15-50 0-2-2-2-2 0 5 23 5 47 17 69-5 15-8 33-9 50 0 2 0 3 0 5 0 1 0 1 0 1 0 6 0 14 1 20 0 2 2 2 2 0 0-9 1-20 3-31 5-4 8-7 12-10-1 10-1 23 0 32 0 1 0 1 0 0 2-12 3-25 6-37 13-9 28-14 42-20 6-1 12-3 18-6-6 11-12 22-17 32 0 2 3 2 3 0 13-20 26-36 43-53 11-11 22-20 32-29 0 6 2 12 2 18-8 12-20 17-28 29-1 0-1 0-1 0-22 20-39 46-35 75h1c-3 6-6 11-9 15-8 10-15 20-15 31 0 1 0 3 0 3-4 6-7 11-8 15-6 9-11 19-8 28-1 3-3 4-3 6-1 0-3 0-4 1-3 0-7 2-8 4-5 1-9 1-11 6-7-2-15-3-20-5-9-1-16-3-24 0-5 0-8-1-12-3-3-2-5-3-8-5 6-12 0-29-11-41-3-3-9 0-6 5 2 4 3 9 3 13-1 0-1-1-3-1 0-3-3-3-6-3-3-2-3-2-5-2-7-3-10-12-13-20 0-6 2-12 3-18 0-3 2-6 2-8 1-7 4-13 0-18-2-1-3-1-5-1 0-2-3 0-3 1 0 0 0 2 0 3v2c-1 1-3 4-3 4-3 8-5 16-6 23-3 8-5 17-3 26-2 0-2 0-2 0-1 3-3 6-3 9-1-1-1-3-3-4 0-3-1-5-3-8 0-3-1-7-3-12 0 0-1 0-3-2 0-1 0-1 0-3 2-3-5-4-5 0 0 2 0 3 0 5-4 6-1 17 2 23 0 3 3 6 5 8-2 0-2-2-3-2-2-2-5 0-4 3 4 3 5 8 8 11-3-2-6-6-12-8-3-3-6 2-5 5 14 18 28 53 55 55 1 0 3 0 3 0 3 1 6 3 8 4 1 0 1 2 3 2 6 6 12 9 20 12 1 0 1 0 3 0 6 3 12 6 18 8 9 7 20 15 31 21 1 2 3 2 4 2 23 12 49 15 75 7 6-1 6-7 6-10 3-5 8-6 14-9 3-2 5-5 3-8 3-3 3-3 3-6 2 0 3-2 3-2 0 2 0 2 0 3 0 2 0 5 0 5-3 4 0 8 2 9 0 14 1 28 1 41 0 2 0 2 0 3v2c0 1-1 3-1 5-2 0-3 0-3 1-10 25-26 44-42 66-15 24-29 52-41 78-14 26-26 52-37 79-4 14-9 28-13 40-5 14-7 29-11 45-2-2-3 0-5 1-3 17 2 32 17 43 6 44 21 87 35 127 17 46 14 96 28 142 0 2 1 2 3 3-5 8-11 17-17 25-3 6-2 11 0 15-6 11-14 23-23 34 0 0 0 1-1 3-11 8-5 23 10 20 0 1 0 3 2 3 1 3 4 4 9 4-2 7 6 8 8 5 1-3 3-6 4-8 5-1 9-4 12-4 11-3 19-8 28-14 5 3 9 3 12-2 5-7 11-15 17-22 6-8 11-14 17-22 3-6 1-12-3-15 1 0 4-2 6-5 8-20 15-40 23-59 27-43 41-94 53-143 5-9 8-18 11-26 5-15 23-53 8-69v-1c0-3 0-5 0-8 0-1 0-3 0-3 0-6 1-9 1-15-1-3-1-8-1-11 0-1 0-1 0-3 0-3-3-5-5-3v-2c-3-4-6-9-10-12-2-1-2-3-2-4-2-3-3-7-3-8 5-14 9-26 12-40 3-4 5-7 8-12 1 3 4 3 7 0 23-15 42-44 57-69 3-3 6-6 8-9 3-3 4-6 7-9 11-13 25-31 23-48 5-6 10-15 11-21 6-6 11-11 14-17 6 0 12 0 20 0 10-1 23-9 32-15 18-16 32-42 56-49 10-2 10-14 2-19-11-7-34-18-37-33 0-2 0-2 0-2-3-9-7-20-9-29-3-8-3-20-6-29 0-9-3-20-3-29-2-5-6-6-11-6-17 6-32 11-47 18-3 0-19 6-17 14 1 0 3 2 3 2 0 1-3 1-3 1-2-9-3-17-6-26v-1c0-2 0-5 1-8 2 0 2 0 3-3 8-20 8-43 8-64 0-2 0-4-1-5 0-3 0-8 0-11 12-23 26-44 33-67l2-2v-1c1-3 1-6 1-8 5-4 11-9 14-14 8-6 15-10 20-16 4-2 9-3 11-7h1c2 0 3-1 3-3 0-1 0-4-1-7 3 1 6 0 6-5-2-15-5-29-9-44 1 0 1 0 1 0 6-11 11-23 15-34 5-9 8-18 11-26 3 0 5-1 6-3 5-12 8-26 11-38 12-5 15-20 17-34 0-4-2-12-5-18 0-2 0-2-1-3 3-11 4-25 6-37 3-9 3-20 6-31l32 8c26 20 52 37 78 57 0 0 2 0 2 1 1 2 1 5 4 8 5 6 20 6 19-5 1-1 1-1 1-3 2-3 0-7-1-9zM534 513zM188 1716c1 8 3 17 6 23 0 8 0 14 0 20-1 0-3 3-3 3 0-14-2-29-3-46zM185 1837c3-6 6-11 9-17 0 5 0 8 0 14 0 1 0 3 0 5-3-2-6-2-9-2zM606 440c1 2 3 2 3 0 1 3 3 6 4 9l-1 2c-2-3-5-5-6-8-2-1-3-3-5-6 2 1 3 3 5 3z">
          <text:p/>
        </draw:path>
        <draw:path draw:style-name="gr4" draw:text-style-name="P4" draw:layer="layout" svg:width="1.262cm" svg:height="1.678cm" svg:x="2.37cm" svg:y="0.91cm" svg:viewBox="0 0 1263 1679" svg:d="M19 717c6 3 10 9 18 12 2 0 3 0 3-2 3 2 5 5 8 2 9-6-2-20-8-26 8 6 14 12 20 17 2 1 6 0 5-2 0-1 0-1-2-1 2 0 3 0 3 0-7 10-15 21-18 29-3 0-6 3-6 6 0 0-2 0-2 2 0 1-1 4-1 7s3 6 6 8c1 0 3 0 4 0 2 0 2 1 5 0 0 1 0 1 2 3 3 0 4-3 4-5v-1c2 0 3 0 3-2 3-3 2-7 0-9 0-1-1-3-3-3 3-3 8-6 9-9 9-8 19-17 28-26 4-5 9-11 15-17 5 1 8 0 14-3 0-2 0-2 0-2-3-1-5-3-6-4 1 0 3-2 4-3l814-152c0 0 99-24 124-35 0 0-95-3-141 6-43 8-636 115-754 135 11-9 20-19 29-28 3-4 8-7 11-12 5-9-5-17-12-15l1-2c5-4 9-6 16-3 3 0 6 2 9 3-2 0-3 2-5 3-4 2 0 9 3 11 6 0 12-2 17-3 8-2 14 1 18-3 2-2 2-3 3-5 2-3 4-6 5-9 3-6 6-14 9-20 2 0 2-1 2-3 3 3 4 3 7 3 5 2 8-3 8-9 0-3 2-3 3-6 3-2 6-5 9-6 2 0 5 3 6 3 2 3 5 3 8 0 8-6 17-14 26-20 3 0 6-2 9-3 2 0 2 0 5 0 8-3 17-6 26-8 6 26 6 83 6 83l550-100-1-3c1-7-5-20-8-27-3-14-6-29-1-45 1 0 1-1 1-4 3-20-11-40-21-55-13-19-28-34-48-43-3-3-4 0-4 3-6 0-16 3-20 6-8 2-14 2-22 2-9-3-16-8-26-10-5-1-7-1-10-1 0-2-1-5-3-6 0-19 0-37 0-55 0-23 6-42 15-62 3 0 3-1 3-4-2-23-15-43-7-67 7-20 30-28 47-26 12 1 23 7 30 15 3 12 8 23 14 32-3 2-3 5-1 6 1 0 1 0 1 0 3 8 8 12 12 18 0 2 2 2 2 2 0 3 0 6 1 9-9-11-19-18-30-26 9-12 1-30-8-41s-23-14-37-8c-37 14-23 64 2 86-17 4-29 26-33 41-6 14-5 29 2 43 0 5 2 8 3 11v1c-1 0-1 2-1 2 0 1 0 1 0 3 0 3 1 6 3 8 23 15 61 16 81-5 6 8 11 15 17 21 0 2 1 2 3 2 0 0 1 0 1-2 2-1 2-1 2-4 11-32 12-69 17-103 4-33 9-67 4-101-1-1-1-3-1-3-3-29-29-58-49-78-21-21-46-32-75-21-3-2-10-2-15-2-9 0-18 5-26 8 0 1 0 3 0 3 2 0 2 0 2 0-28 3-49 43-55 66-10 33-13 69-5 104-5 3-8 6-12 10-2 5-5 8-8 11-1 2-3 3-3 3h-1c-2-1-5 0-4 2 0 1 0 1 2 3-2 0-2 0-2 0-1 3 0 6 4 6h1c0 3 2 5 3 6 2 8 8 6 11 2 3 0 4 0 6 0 20 4 34 24 44 39 10 14 19 25 26 39 0 1-1 3-1 4-17-29-58-93-81-69-8-6-14-15-20-24-2-3-8-3-8 1 0 8 0 14 2 19-3 0-5-2-8-3-9-14-18-25-32-34-9-6-17-5-23 3-9 9-9 23-6 35-17-4-37-3-52-3-29 2-57 8-81 23-2-1-3-1-5-1-9 3-14 13-18 23 0 0 0-2-2-2 0-3-3-3-4-1-6 7-10 16-14 24 0-1-2-3-2-5-1-1-3-4-4-1-5 5-8 12-11 17-3 3-6 7-8 10 0-1-1-3-1-4 0-6-8-6-9-2-9 14-19 25-28 37 0-6 0-14-4-20 0 0-2 0-2-1-1-2-3-2-3 1-11 3-17 17-26 25-12 12-28 21-43 32-18 14-38 26-56 41-7 5-16 9-19 15-3 5 0 17 0 23 0 0-1 2-3 2-4 4-9 9-15 14-5 4-9 7-12 13-2-1-2-1-4-1-4-3-10-6-15-8-7-6-15-9-24-9v-1h-2v1c-3 0-6 3-3 6-14 20-24 45-35 66-14 23-26 49-32 77-11 7-23 16-35 21-3 1-5 3-5 6 2 9 0 18-2 26-4 3-4 9-1 15 0 2 0 2 0 3-2 2-2 5 0 7 5 4 11 9 17 12zM43 763c2 1 0 1 0 0zM400 307h1c-1 0-1 1-1 1zM449 264c1 0 3-2 4-2-1 2-1 2-1 2-2 0-3 1-5 3-3 3-4 5-6 6 3-3 6-6 8-9zM97 651c-3 0-3 2-5 2l-1-2c0 0 1 0 1-2 0 2 2 2 5 2zM167 602c3 0 3 0 5 0-2 2-3 3-5 3 0 0 0-1 0-3zM872 346c0-1 0-1-1-1h1zM800 343c-1 0-1-1-1-1 1 0 3 0 4 0-1 1-3 1-3 1zM605 230c0-1 0-3 0-3 0-1 0-1 0-3 0 2 3 3 3 5 0 0-2 0-3 1zM288 533c2 0 2 0 3 0-1 0-3 0-3 2 0-2 0-2 0-2zM311 527c-1 0-1 0-3 2 0-2 0-2 0-2 0 0 2 0 3 0zM886 366c-2-1-2-3-3-4 3 1 3 3 4 6zM900 189h1c-1 0-1 0-1 0zM855 189v-2zM860 198v-1c1 0 1 1 3 1-2 0-2 0-3 0zM834 265h1c-1 0-1 0-1 0zM889 299c1 0 3-3 3-5 0 4 0 5 0 8-2 0-2-1-3-3zM903 189v-2c0 2 0 2 0 3 0-1 0-1 0-1zM663 244c0-2 0-3 0-3 0 0 0 1 1 3zM97 530c-2 5-5 9-6 14 1-5 3-9 6-14zM17 659c0-2 0-2 0-2h2c-2 0-2 0-2 2zM34 697c2 0 2 0 2 0 0 1 0 1 1 3-1-2-1-2-3-3zM912 461c0 0 0-1 1-3 0 2 0 3 0 5zM823 11c-8-1-15-4-23-4-1 0-1 0-3 0 9 0 17 1 26 4zM761 14c-2 0-2 0-2 0zM421 290c-3 1-3 1-4 3 1-3 3-5 4-8 0 2 0 2 0 2 0 1 0 1 0 3zM118 487c-1 2-3 5-6 5 2-2 3-3 3-5 2 0 3 0 3 0zM1261 552c-8-14-28-16-43-11-9 3-22 9-23 20 0 1 0 1 0 1-2 2-3 2-6 5-2 0-2 0-5 0 0 0 0-2 0-3v-2c0-1 2-3 3-4 11 4 16-16 5-20-2-2-3-2-5-2-6-3-10-6-15-9-3-3-9-3-11 2-3 4-6 9-6 13-9 8-12 20-20 29 0 2 0 2 0 2-6 5-12 9-20 12-4-1-9-1-13-3-7-3-14-3-20-4v-2c-5-9-28-12-37-14-9-1-20-4-31-6-6-6-16-4-24 0-2 0-3 0-3 0-3 0-3 3-3 3l-2 2c0-2 0-5 0-5-3-8-17-18-17-18l-581 113c0 12-18 17-18 17 0 0-6 9-9 14-3 4-5 10-3 15 1 3 14 11 18 20 5 9-18 14-18 14l-3 21c-6 6-12 12-17 20-3 6-6 15-9 23-2 7-5 15-2 21 2 2 3 5 5 5 0 6 0 12 0 18 0 3 0 5-2 6 0 3-1 5-1 8-2 0-5 0-6 0-6 0-8 8-6 12 6 11 6 20 6 31-9 6-16 12-16 24 0 5 2 11 2 17 3 6 3 14 9 17 0 1 0 1 0 1 3 2 8 0 8-1 0-2 0-2 0-2 3-1 6-3 9-4 1 0 3 1 3 1 3 3 6 5 9 8 11 14 11 40 11 55 0 22-2 43 0 64 0 22 1 42 3 62-2 1-3 3-3 4-3 14 0 29 0 43-2 14-3 28-3 41-2 28 3 54 7 80 0 3 5 3 7 3 1 3 4 3 7 3 6 3 14 3 22 6 6 2 12 3 18 5 3 20 9 38 17 56-28 17-57 29-84 43-23 11-63 25-80 49-9-1-18-1-24 3-11 8-20 23-25 34-4 3-9 6-12 9-6 6-12 11-14 18-3 0-9 3-6 8-1-3 0-3-3 0-3 5 3 9 8 9 6 8 16 14 27 20 8 6 17 9 26 14 3 1 5 3 8 4 0 4 3 5 6 2 1 0 1 0 1 0 4 0 5-3 5-5 3-1 6-4 9-7 9 6 17 14 23 21 3 6 8 12 11 15 6 8 12 15 18 20 2 3 3 6 5 8 6 7 9 15 17 19 3 2 4 2 6 0 17 2 33-1 50-3 11-1 20-4 29-7 8-2 14-2 22-5 1 2 6 0 6-1 0-2 0-2 0-3 1-2 0-5 0-5-2-6-6-9-11-14-3-1-7-3-12-4-3-2-6-4-8-4-3-3-6-4-9-6-3-1-4-1-6-1 3-13 3-24-5-30-1 0-1-2-1-2-3-6-8-14-11-21-6-8-7-15-11-23 2 0 2 0 2 0 6 0 12 1 17 3 9 0 18 6 27 0l2 1c3 2 6-1 6-4 0-6 3-11 6-15 0-2 0-2 0-3 5-7 11-13 15-17 8-5 16-8 23-11 17-6 34-12 51-20 18-9 37-20 55-29 17-9 40-17 55-29 9 0 15-2 21-6 0 0 0 1 2 1 3 3 6 5 8 8 4 12 12 23 24 31 5 6 8 12 11 18 3 9 6 17 9 24 9 22 15 43 20 66 5 20 8 40 15 59 2 2 3 5 5 5 0 20 0 38 11 57 6 12 23 4 23-8 8 8 20 8 25-2 2 0 2 0 2 0 1 11 18 14 24 3 3-4 6-10 9-15 0 0 2-1 3-1 22-13 42-28 60-43 9-9 0-23-11-21-15 3-26 9-38 18 0-1 0-3 0-3 0-3 0-4 1-6 2-6 5-9 7-14 7-1 13-9 18-15 0-3 1-6 3-9 3-3 5-5 5-8 4-6 6-12 1-18-1 0-1-2-3-3 0 0 0-2-1-2 0 0 0-1-2-1 0-5 0-8-2-11 7-17 2-43 2-60-3-27-8-55-12-81-3-21-6-43-11-63 0-12-3-24-6-36 0-2 0-5 0-6-3-17-5-37-9-54 0-15 0-32-2-46v-1c2-2 2-2 3-3 2-3 3-7 5-10 1-1 3-4 3-7 1-2 3-2 3-3 6-29-9-80-34-98-1 0-1 0-3 0-6-5-12-6-20-11 7-3 11-11 3-17-9-12-24-15-39-21 0-11-7-20-15-28-5-4-11-9-18-12-4-3-7-6-11-11-3-12-9-24-17-35 0-6 0-12 0-18 2 0 2-2 3-3 0-3 0-6 2-9 0-2 1-2 1-5 0 0 0-3 0-5 3 0 3-1 6-1 2 3 5 1 6-2 2-6 2-15 2-23 0-1 1-1 1-4 0-19 2-37 0-54 2 0 2 0 2-1 1-5 0 0 5-11 4-9-2-6-2-14 0-9 12-15 6-37-6-21 3-12 3-21-1-9 3-12 3-12 0 0 2-5 5-19 0-13 7-13 7-13 0 0-1 10 13 4s24-38 24-38l4-9 22-14 3 9c1 8 14 25 18 31 2 3 3 6 6 11 0 1 2 3 5 4 1 6 3 9 6 12 11 13 29 28 46 22 0 0 0 1 0 3 0 3 3 3 4 3 5-2 10-5 16-3 7 0 15 3 23 4 7 2 21 10 32 7 1 1 6 1 6-2 3-8 6-14 14-17 6-1 12-1 18-4 2-2 3-2 3-5 14-3 26-5 40-6 20-3 46-3 66-11 0 0 1-1 1-3 2 0 2 0 5 2 3-2 7 0 12 0 5 3 11 0 17-2 4 0 8 2 12 3 2 0 3 0 3 0 6 3 16 3 25 2 6 0 12-2 18-5 9-1 18-3 26-6 5-2 6-6 3-9-1-5 3-11 3-17 0-3 2-5 3-6 2-5 0-11 0-15-1-4-3-7-6-8 0-2 0-2 0-2 0-1 0-1 2-1 1-3 1-5 4-8-1 0-1 0-3 0 0-1 0-3-1-4-2-3-2-8-3-11 7-3 10-11 6-18zM658 1251c0-2 0-2 0-2 2 5 3 11 5 16 0 1 0 1 0 1 0 2 0 3 0 3-2-6-3-12-5-18zM328 1520zM841 1220c2 2 2 2 2 3 0 2 0 3 0 5 0-3 0-5-2-8zM386 939c2 0 2 1 3 1 0 0 0 3 0 5-1-2-1-5-3-6zM392 1611c0 2 0 2 0 2-1 0-1 0-1 0 0 0 1 0 1-2zM848 1245c1 3 1 4 1 6 0-2-1-5-1-6zM808 1058l1-2c0 2-1 2-1 2zM233 1563v1l-2-1c-1 0-4-2-6-3 3 1 6 3 8 3zM394 1303h-2zM400 1303h1c-1 0-1 0-1 0zM835 1064zM809 1662c-3-2-3-2 0 0zM1002 567c0 0 0-2-1-2 1 0 1 0 3 2zM999 565c-1-1-3-1-5-1h2c0 0 2 0 3 1zM1241 637c1 0 1 0 1-1 2-2 2-2 2-2v2c0 1-2 1-3 1zM1236 648c2-2 2-3 5-6 0 1 0 3 1 3-1 1-4 3-6 3z">
          <text:p/>
        </draw:path>
        <draw:polygon draw:style-name="gr5" draw:text-style-name="P1" draw:layer="layout" svg:width="1.255cm" svg:height="1.487cm" svg:x="1.102cm" svg:y="2.129cm" svg:viewBox="0 0 1256 1488" draw:points="0,166 0,1488 1256,1324 1256,0">
          <text:p/>
        </draw:polygon>
        <draw:line draw:style-name="gr6" draw:text-style-name="P5" draw:layer="layout" svg:x1="1.131cm" svg:y1="3.519cm" svg:x2="2.358cm" svg:y2="3.345cm">
          <text:p/>
        </draw:line>
        <draw:line draw:style-name="gr6" draw:text-style-name="P5" draw:layer="layout" svg:x1="1.131cm" svg:y1="2.382cm" svg:x2="2.358cm" svg:y2="2.225cm">
          <text:p/>
        </draw:line>
        <draw:polygon draw:style-name="gr7" draw:text-style-name="P6" draw:layer="layout" svg:width="0.857cm" svg:height="1.449cm" svg:x="1.5cm" svg:y="2.003cm" svg:viewBox="0 0 858 1450" draw:points="858,126 0,0 0,1325 858,1450">
          <text:p/>
        </draw:polygon>
        <draw:path draw:style-name="gr5" draw:text-style-name="P1" draw:layer="layout" svg:width="7.728cm" svg:height="1.553cm" svg:x="1.5cm" svg:y="1.894cm" svg:viewBox="0 0 7729 1554" svg:d="M7729 1440c-2177 396-5549-398-7729 0v-1325c2180-398 5552 398 7729 0z">
          <text:p/>
        </draw:path>
        <draw:path draw:style-name="gr6" draw:text-style-name="P5" draw:layer="layout" svg:width="7.744cm" svg:height="0.226cm" svg:x="1.515cm" svg:y="3.112cm" svg:viewBox="0 0 7745 227" svg:d="M7745 87c0 0-722 308-4044 11-2348-208-3520-25-3701 8">
          <text:p/>
        </draw:path>
        <draw:path draw:style-name="gr6" draw:text-style-name="P5" draw:layer="layout" svg:width="7.722cm" svg:height="0.231cm" svg:x="1.506cm" svg:y="1.998cm" svg:viewBox="0 0 7723 232" svg:d="M7723 110c0 0-700 283-4022-12-2348-209-3519-24-3701 6">
          <text:p/>
        </draw:path>
        <draw:path draw:style-name="gr8" draw:text-style-name="P1" draw:layer="layout" svg:width="0.075cm" svg:height="2.586cm" svg:x="9.15cm" svg:y="1.373cm" svg:viewBox="0 0 76 2587" svg:d="M0 0v2587c37-92 76-128 76-128v-2334c0 0-39-36-76-125z">
          <text:p/>
        </draw:path>
        <draw:path draw:style-name="gr9" draw:text-style-name="P5" draw:layer="layout" svg:width="1.798cm" svg:height="0.364cm" svg:x="9.224cm" svg:y="1.509cm" svg:viewBox="0 0 1799 365" svg:d="M0 365c0 0 38-365 297-365h778c0 0 252 87 724 87">
          <text:p/>
        </draw:path>
        <draw:path draw:style-name="gr9" draw:text-style-name="P5" draw:layer="layout" svg:width="1.798cm" svg:height="0.364cm" svg:x="9.224cm" svg:y="3.457cm" svg:viewBox="0 0 1799 365" svg:d="M0 0c0 0 38 365 297 365h778c0 0 252-86 724-86">
          <text:p/>
        </draw:path>
        <draw:path draw:style-name="gr9" draw:text-style-name="P5" draw:layer="layout" svg:width="1.797cm" svg:height="0.364cm" svg:x="18.502cm" svg:y="1.509cm" svg:viewBox="0 0 1798 365" svg:d="M1798 365c0 0-37-365-297-365h-776c0 0-252 87-725 87">
          <text:p/>
        </draw:path>
        <draw:path draw:style-name="gr9" draw:text-style-name="P5" draw:layer="layout" svg:width="1.797cm" svg:height="0.364cm" svg:x="18.502cm" svg:y="3.457cm" svg:viewBox="0 0 1798 365" svg:d="M1798 0c0 0-37 365-297 365h-776c0 0-252-86-725-86">
          <text:p/>
        </draw:path>
        <draw:path draw:style-name="gr6" draw:text-style-name="P5" draw:layer="layout" svg:width="9.528cm" svg:height="0.068cm" svg:x="9.998cm" svg:y="1.596cm" svg:viewBox="0 0 9529 69" svg:d="M9529 0c-182 32-404 69-606 69h-8317c-202 0-424-37-606-69">
          <text:p/>
        </draw:path>
        <draw:path draw:style-name="gr6" draw:text-style-name="P5" draw:layer="layout" svg:width="9.528cm" svg:height="0.067cm" svg:x="9.998cm" svg:y="3.668cm" svg:viewBox="0 0 9529 68" svg:d="M0 68c182-33 404-68 606-68h8317c202 0 424 35 606 68">
          <text:p/>
        </draw:path>
        <draw:path draw:style-name="gr8" draw:text-style-name="P1" draw:layer="layout" svg:width="0.075cm" svg:height="2.586cm" svg:x="20.299cm" svg:y="1.373cm" svg:viewBox="0 0 76 2587" svg:d="M76 0v2587c-38-92-76-128-76-128v-2334c0 0 38-36 76-125z">
          <text:p/>
        </draw:path>
        <draw:line draw:style-name="gr10" draw:text-style-name="P5" draw:layer="layout" svg:x1="9.348cm" svg:y1="2.357cm" svg:x2="20.207cm" svg:y2="2.357cm">
          <text:p/>
        </draw:line>
        <draw:line draw:style-name="gr10" draw:text-style-name="P5" draw:layer="layout" svg:x1="9.348cm" svg:y1="3.276cm" svg:x2="20.207cm" svg:y2="3.276cm">
          <text:p/>
        </draw:line>
        <draw:path draw:style-name="gr4" draw:text-style-name="P4" draw:layer="layout" svg:width="6.35cm" svg:height="13.658cm" svg:x="0.952cm" svg:y="13.415cm" svg:viewBox="0 0 6351 13659" svg:d="M6175 0h-5999l-176 177v13306l176 176h5999l176-176v-13306zM6304 197v138c-16-43-36-89-65-133v-3h-1c-40-60-98-115-179-150h96zM5990 13611h-5630c-92-23-167-73-222-151v-13258c49-69 119-127 223-153h5630c92 23 167 73 222 151v13258c-49 69-119 127-223 153zM49 414c9-50 29-111 63-171v13174c-6-9-13-20-19-32-23-49-36-98-44-138zM6239 243c6 9 13 20 19 31 23 49 36 98 46 139v12833c-11 50-31 111-65 171zM196 49h96c-81 35-139 90-179 150h-1v3c-29 44-49 90-63 133v-138zM49 13461v-136c14 43 34 89 63 133v2h1c40 61 98 116 179 151h-96zM6155 13611h-96c81-35 139-90 179-151h1v-2c29-44 49-90 65-133v136z">
          <text:p/>
        </draw:path>
        <draw:path draw:style-name="gr4" draw:text-style-name="P4" draw:layer="layout" svg:width="13.017cm" svg:height="7.851cm" svg:x="7.62cm" svg:y="13.052cm" svg:viewBox="0 0 13018 7852" svg:d="M12842 0h-12666l-176 176v7499l176 177h12666l176-177v-7499zM12971 196v138c-16-43-36-89-65-133v-2h-1c-40-61-98-116-179-150h96zM12657 7805h-12299c-91-23-165-75-220-152v-7454c47-67 118-125 222-150h12298c92 22 167 72 222 150v7453c-49 67-119 127-223 153zM48 413c10-50 29-111 62-171v7370c-4-12-12-21-16-32-23-49-37-98-46-139zM12906 240c6 11 13 22 19 33 23 49 36 97 46 139v7027c-11 49-31 112-65 171zM196 49h95c-81 34-138 89-179 150h-2v2c-27 44-49 90-62 133v-138zM48 7655v-136c13 44 35 90 62 133v1h2c41 62 98 118 179 152h-95zM12822 7805h-96c81-34 139-90 179-152h1v-1c29-43 49-89 65-133v136z">
          <text:p/>
        </draw:path>
        <draw:path draw:style-name="gr4" draw:text-style-name="P4" draw:layer="layout" svg:width="13.028cm" svg:height="8.448cm" svg:x="7.62cm" svg:y="4.395cm" svg:viewBox="0 0 13029 8449" svg:d="M12853 0h-12677l-176 177v8093l176 179h12677l176-179v-8093zM12980 197v136c-14-43-34-88-63-131v-3h-2c-41-62-97-117-179-150h95zM12669 8400h-12311c-91-22-165-74-220-153v-8047c47-67 118-125 222-151h12309c92 23 167 73 222 151v8046c-49 69-119 129-222 154zM48 414c10-50 29-113 62-171v7961c-4-9-12-20-16-30-23-49-37-98-46-140zM12917 242c6 10 12 21 17 32 23 49 38 98 46 139v7620c-11 49-29 112-63 171zM196 49h95c-81 33-138 88-179 150h-2v3c-27 43-49 88-62 131v-136zM48 8250v-138c13 43 35 89 62 134v1h2c41 64 98 119 179 153h-95zM12831 8400h-95c82-34 138-89 179-153h2v-1c29-45 49-91 63-134v138z">
          <text:p/>
        </draw:path>
        <draw:path draw:style-name="gr4" draw:text-style-name="P4" draw:layer="layout" svg:width="13.017cm" svg:height="5.958cm" svg:x="7.62cm" svg:y="21.113cm" svg:viewBox="0 0 13018 5959" svg:d="M12842 0h-12666l-176 176v5607l176 176h12666l176-176v-5607zM12971 197v136c-16-42-36-88-65-131v-3h-1c-40-61-98-117-179-150h96zM12657 5910h-12299c-91-21-165-73-220-150v-5560c47-67 118-127 222-151h12298c92 21 167 72 222 150v5561c-49 66-119 126-223 150zM48 413c10-49 29-112 62-171v5475c-4-9-12-20-16-33-23-49-37-98-46-139zM12906 242c6 9 13 20 19 30 23 49 36 98 46 139v5132c-11 51-31 112-65 174zM196 49h95c-81 33-138 89-179 150h-2v3c-27 43-49 89-62 131v-136zM48 5762v-139c13 43 35 91 62 136v1h2c41 61 98 117 179 150h-95zM12822 5910h-96c81-33 139-89 179-150h1v-1c29-45 49-93 65-136v139z">
          <text:p/>
        </draw:path>
        <draw:path draw:style-name="gr4" draw:text-style-name="P4" draw:layer="layout" svg:width="6.35cm" svg:height="9.118cm" svg:x="0.952cm" svg:y="4.058cm" svg:viewBox="0 0 6351 9119" svg:d="M6175 337h-341c-37-68-64-144-64-225v-25h-1951c-204-58-421-87-643-87s-438 29-641 87h-1954v25c0 81-27 157-64 225h-341l-176 180v8091l176 176h343c35 67 62 142 62 222v24h1954c203 60 419 89 641 89s439-29 643-89h1951v-24c0-80 27-155 62-222h343l176-176v-8091zM2261 236c20 0 37-17 37-37 0-3 0-3-2-6 51-20 101-40 153-58h1454c52 18 102 38 153 58 0 1-2 3-2 6 0 20 17 37 39 37 10 0 21-5 27-14 40 17 78 37 115 57h-2119c37-20 75-40 116-57 6 9 17 14 29 14zM1974 337h-1348c30-46 110-129 298-129h1284c-81 38-159 81-234 129zM2078 300h2195c22 11 43 25 64 37h-2323c21-12 42-26 64-37zM4377 337c-75-48-153-91-234-129h1288c187 0 268 83 297 129zM5779 337h-25c-21-34-69-95-173-129h152c9 46 26 89 46 129zM5722 135c0 18 3 35 6 52h-1600c-5-14-19-26-35-26-13 0-22 4-28 12-32-12-64-26-98-38zM3176 20c193 0 381 23 560 67h-1120c181-44 367-67 560-67zM2385 135c-32 12-64 26-96 38-8-8-17-12-28-12-17 0-32 12-35 26h-1603c3-17 6-34 6-52zM618 208h155c-104 34-152 95-172 129h-29c20-40 37-83 46-129zM49 537l147-150h96c-81 32-139 89-179 151h-1v2c-29 44-49 90-63 133zM49 754c9-51 29-112 63-173v7961c-6-9-13-20-19-32-23-47-36-96-44-139zM196 8735l-147-147v-138c14 43 34 89 63 132v3h1c40 61 98 116 179 150zM4093 8882c-22 0-37 17-37 38 0 2 0 3 0 5-49 21-101 41-153 58h-1454c-52-17-102-37-151-58 0-2 1-3 1-5 0-21-18-38-38-38-12 0-21 6-29 15-41-18-79-38-116-58h2119c-37 20-75 40-113 58-8-9-17-15-29-15zM4371 8784h1351c-30 46-112 126-295 126h-1284c78-37 156-80 228-126zM4273 8819h-2195c-20-12-40-24-60-35h2315c-20 11-40 23-60 35zM1980 8784c72 46 150 89 228 126h-1288c-184 0-264-80-296-126zM574 8784h26c21 35 69 93 168 126h-150c-9-45-24-86-44-126zM629 8983c0-18-3-35-6-52h1603c3 15 18 26 35 26 11 0 20-5 28-12 32 12 64 26 96 38zM3176 9099c-193 0-379-24-560-69h1120c-179 45-367 69-560 69zM3967 8983c34-12 66-26 98-38 6 7 17 12 28 12 16 0 30-11 35-26h1600c-3 17-6 34-6 52zM5733 8910h-155c101-33 150-91 170-126h29c-20 40-35 81-44 126zM360 8735c-92-21-167-72-222-150v-8045c49-70 119-128 223-153h5630c92 22 167 72 222 151v8046c-49 67-119 125-223 151zM6304 8588l-149 147h-96c81-34 139-89 179-150h1v-3c29-43 49-89 65-132zM6304 8371c-11 49-31 112-65 171v-7961c6 11 13 20 19 32 23 49 36 98 46 138zM6304 673c-16-43-36-89-65-133v-2h-1c-40-62-98-119-179-151h96l149 150z">
          <text:p/>
        </draw:path>
        <draw:path draw:style-name="gr116" draw:text-style-name="P5" draw:layer="layout" svg:width="5.276cm" svg:height="0.282cm" svg:x="14.723cm" svg:y="4.889cm" svg:viewBox="0 0 5277 283" svg:d="M5277 283c-168-123-245-283-245-283h-4787c0 0-77 160-245 283">
          <text:p/>
        </draw:path>
        <draw:line draw:style-name="gr117" draw:text-style-name="P5" draw:layer="layout" svg:x1="14.928cm" svg:y1="4.953cm" svg:x2="19.76cm" svg:y2="4.953cm">
          <text:p/>
        </draw:line>
        <draw:path draw:style-name="gr117" draw:text-style-name="P5" draw:layer="layout" svg:width="2.228cm" svg:height="0.173cm" svg:x="16.247cm" svg:y="4.953cm" svg:viewBox="0 0 2229 174" svg:d="M2229 0c-326 109-707 174-1114 174s-791-65-1115-174">
          <text:p/>
        </draw:path>
        <draw:path draw:style-name="gr4" draw:text-style-name="P4" draw:layer="layout" svg:width="0.092cm" svg:height="0.092cm" svg:x="17.315cm" svg:y="5.079cm" svg:viewBox="0 0 93 93" svg:d="M93 48c0 25-20 45-46 45-25 0-47-20-47-45 0-27 22-48 47-48 26 0 46 21 46 48z">
          <text:p/>
        </draw:path>
        <draw:path draw:style-name="gr116" draw:text-style-name="P5" draw:layer="layout" svg:width="5.276cm" svg:height="0.283cm" svg:x="14.723cm" svg:y="10.081cm" svg:viewBox="0 0 5277 284" svg:d="M0 0c168 124 245 284 245 284h4787c0 0 77-160 245-284">
          <text:p/>
        </draw:path>
        <draw:line draw:style-name="gr117" draw:text-style-name="P5" draw:layer="layout" svg:x1="19.792cm" svg:y1="10.298cm" svg:x2="14.962cm" svg:y2="10.298cm">
          <text:p/>
        </draw:line>
        <draw:path draw:style-name="gr117" draw:text-style-name="P5" draw:layer="layout" svg:width="2.228cm" svg:height="0.171cm" svg:x="16.247cm" svg:y="10.127cm" svg:viewBox="0 0 2229 172" svg:d="M0 172c326-111 708-172 1115-172s788 61 1114 172">
          <text:p/>
        </draw:path>
        <draw:path draw:style-name="gr4" draw:text-style-name="P4" draw:layer="layout" svg:width="0.092cm" svg:height="0.092cm" svg:x="17.315cm" svg:y="10.081cm" svg:viewBox="0 0 93 93" svg:d="M0 47c0-26 23-47 47-47 26 0 46 21 46 47 0 25-20 46-46 46-24 0-47-21-47-46z">
          <text:p/>
        </draw:path>
        <draw:frame draw:style-name="gr14" draw:text-style-name="P8" draw:layer="layout" svg:width="2.305cm" svg:height="0.289cm" svg:x="2.473cm" svg:y="3.267cm">
          <draw:text-box>
            <text:p text:style-name="P7"><text:span text:style-name="T1">CHARACTER NAME</text:span></text:p>
          </draw:text-box>
        </draw:frame>
        <draw:frame draw:style-name="gr118" draw:text-style-name="P8" draw:layer="layout" svg:width="0.62cm" svg:height="0.289cm" svg:x="9.373cm" svg:y="3.274cm">
          <draw:text-box>
            <text:p text:style-name="P7"><text:span text:style-name="T1">EYES</text:span></text:p>
          </draw:text-box>
        </draw:frame>
        <draw:frame draw:style-name="gr119" draw:text-style-name="P8" draw:layer="layout" svg:width="0.518cm" svg:height="0.289cm" svg:x="9.373cm" svg:y="2.353cm">
          <draw:text-box>
            <text:p text:style-name="P7"><text:span text:style-name="T1">AGE</text:span></text:p>
          </draw:text-box>
        </draw:frame>
        <draw:frame draw:style-name="gr120" draw:text-style-name="P8" draw:layer="layout" svg:width="0.997cm" svg:height="0.289cm" svg:x="16.764cm" svg:y="2.353cm">
          <draw:text-box>
            <text:p text:style-name="P7"><text:span text:style-name="T1">WEIGHT</text:span></text:p>
          </draw:text-box>
        </draw:frame>
        <draw:frame draw:style-name="gr121" draw:text-style-name="P8" draw:layer="layout" svg:width="0.942cm" svg:height="0.289cm" svg:x="13.353cm" svg:y="2.353cm">
          <draw:text-box>
            <text:p text:style-name="P7"><text:span text:style-name="T1">HEIGHT</text:span></text:p>
          </draw:text-box>
        </draw:frame>
        <draw:frame draw:style-name="gr122" draw:text-style-name="P8" draw:layer="layout" svg:width="0.599cm" svg:height="0.289cm" svg:x="16.764cm" svg:y="3.281cm">
          <draw:text-box>
            <text:p text:style-name="P7"><text:span text:style-name="T1">HAIR</text:span></text:p>
          </draw:text-box>
        </draw:frame>
        <draw:frame draw:style-name="gr123" draw:text-style-name="P8" draw:layer="layout" svg:width="0.574cm" svg:height="0.289cm" svg:x="13.353cm" svg:y="3.274cm">
          <draw:text-box>
            <text:p text:style-name="P7"><text:span text:style-name="T1">SKIN</text:span></text:p>
          </draw:text-box>
        </draw:frame>
        <draw:frame draw:style-name="gr57" draw:text-style-name="P10" draw:layer="layout" svg:width="0.595cm" svg:height="0.239cm" svg:x="14.891cm" svg:y="5.126cm">
          <draw:text-box>
            <text:p text:style-name="P7"><text:span text:style-name="T3">NAME</text:span></text:p>
          </draw:text-box>
        </draw:frame>
        <draw:frame draw:style-name="gr70" draw:text-style-name="P11" draw:layer="layout" svg:width="1.357cm" svg:height="0.268cm" svg:x="13.603cm" svg:y="26.715cm">
          <draw:text-box>
            <text:p text:style-name="P7"><text:span text:style-name="T5">TREASURE</text:span></text:p>
          </draw:text-box>
        </draw:frame>
        <draw:frame draw:style-name="gr124" draw:text-style-name="P11" draw:layer="layout" svg:width="3.194cm" svg:height="0.268cm" svg:x="2.882cm" svg:y="26.718cm">
          <draw:text-box>
            <text:p text:style-name="P7"><text:span text:style-name="T5">CHARACTER BACKSTORY</text:span></text:p>
          </draw:text-box>
        </draw:frame>
        <draw:frame draw:style-name="gr125" draw:text-style-name="P11" draw:layer="layout" svg:width="3.359cm" svg:height="0.268cm" svg:x="2.812cm" svg:y="12.462cm">
          <draw:text-box>
            <text:p text:style-name="P7"><text:span text:style-name="T5">CHARACTER APPEARANCE</text:span></text:p>
          </draw:text-box>
        </draw:frame>
        <draw:frame draw:style-name="gr126" draw:text-style-name="P11" draw:layer="layout" svg:width="4.286cm" svg:height="0.268cm" svg:x="12.432cm" svg:y="20.537cm">
          <draw:text-box>
            <text:p text:style-name="P7"><text:span text:style-name="T5">ADDITIONAL FEATURES &amp; TRAITS</text:span></text:p>
          </draw:text-box>
        </draw:frame>
        <draw:path draw:style-name="gr4" draw:text-style-name="P4" draw:layer="layout" svg:width="0.124cm" svg:height="0.126cm" svg:x="5.241cm" svg:y="1.608cm" svg:viewBox="0 0 125 127" svg:d="M68 46c11 0 11 14 0 14h-14v-14zM77 72c23-4 19-41-9-41h-30v65h16v-21h7l15 21h18v-4zM62 115c31 0 48-23 48-52 0-27-17-49-48-49-29 0-47 22-47 49 0 29 18 52 47 52zM125 63c0 35-23 64-63 64-39 0-62-29-62-64 0-34 23-63 62-63 40 0 63 29 63 63z">
          <text:p/>
        </draw:path>
        <draw:path draw:style-name="gr4" draw:text-style-name="P4" draw:layer="layout" svg:width="1.721cm" svg:height="0.655cm" svg:x="3.57cm" svg:y="1.079cm" svg:viewBox="0 0 1722 656" svg:d="M1562 75c-43-23-89-35-150-37h-124c-98 0-145-1-179-9-29-8-55-24-57-24l-6-5v9c0 3 8 69 86 127 15 11 26 22 26 60v26c18-11 37-20 58-28-8 6-17 16-23 25 14-8 31-15 58-20 37-8 66-5 80-2v-9h69c90 0 142 57 142 158s-52 159-142 159h-28c25 21 40 52 40 87 0 24-8 46-22 64 86 0 141-15 201-55 26-17 49-38 67-62 40-51 64-123 64-195 0-116-59-217-160-269zM1190 506c5-4 5-12 3-18l-20-55 49 29c6 3 9 6 14 11l30-3c23-2 45 1 65 9v-156c-11 3-20 9-25 12l-12 11-14-11c-9-6-21-9-37-9-22 0-45 9-59 26-9 11-17 21-26 32v124c12 9 26 9 32-2zM571 499l-20 26 8-75c6-63 44-107 70-132-6 0-11 2-17 3l-69 14 49-49c17-17 40-29 61-41 2 0 5-2 8-3-24-72-73-130-142-167-45-23-91-35-152-37h-124c-99 0-145-1-179-9-29-8-55-24-55-24l-9-5 2 9c0 3 7 69 87 127 15 11 26 22 26 60v356c0 41-8 52-26 63-19 10-58 33-58 33l-14 8h323c90 0 145-14 208-55 7-6 15-12 23-20-5-29-3-56 0-82zM1331 220v-16c-11 4-26 9-34 12 11 0 23 3 34 4zM355 505h-69v-317h69c92 0 144 57 144 158s-52 159-144 159z">
          <text:p/>
        </draw:path>
        <draw:path draw:style-name="gr4" draw:text-style-name="P4" draw:layer="layout" svg:width="0.838cm" svg:height="0.813cm" svg:x="4.15cm" svg:y="1.018cm" svg:viewBox="0 0 839 814" svg:d="M685 575c9 1 27 12 27 30 0 11-4 19-15 25-3 3-9 4-15 6 3-9 6-20 4-31-1-21-1-30-1-30zM670 340c-92 5-172 83-214 138 10 3 16 5 24 11 9 8 20 18 35 29 11-25 35-73 72-116 35-40 95-43 125-20 22-19 91-35 127-25-22-24-70-56-122-56-43 0-67 21-73 12-8-14 29-32 29-32-51 3-89 63-104 55-10-3 13-32 13-32-46 26-84 84-93 119 43-53 127-90 181-83zM456 637c-18-15-46-38-66-55-23 40-73 92-124 92-93 0-139-130-35-237-6-3-12-3-14-3-9 0-18 3-24 6l-40 29 9-52c0-3 3-6 3-9-23 12-47 29-55 38l-41 44 4-61c2-6 2-10 3-15 2-9 5-21 4-26 0-2-2-3-4-3-18 15-70 61-76 130 0 0 9-15 18-18 5-2 11 1 5 18-2 6-52 142 47 237 0 0-10-27-4-35 3-5 7-6 14 3 4 5 7 11 12 15 9 11 18 19 27 26 31 22 72 39 118 39 123 0 187-86 226-158-1 0-6-3-7-5zM810 653c0-60-56-106-122-100 18 3 44 23 44 52 0 46-56 60-88 54 33-25 29-92-13-115 14 37-27 75-67 41-23-18-75-61-98-79-24-20-51-8-62-17-12-8-5-34-20-44-14-8-29-4-44-10-16-4-26-15-25-30-6 10-6 29 5 43 12 12 29 19 38 35 9 18-8 43 37 76 21 17 52 45 76 63 35 32 17 70 21 104 6 40 37 63 58 67-18-16-24-58 2-84 0 34 24 86 79 101 59 14 121-18 133-41-22 9-64-2-82-17 69 9 128-38 128-99zM358 368c0 0-9-29-38-40 6 22 14 40 38 40zM26 363c31-29 90-47 95-62 3-17-28-43-40-48 43-3 64 5 64 5-10-15-15-40-7-62 23 57 105 66 127 112-3-20-22-41-45-55-12-30-3-88 11-103-5 82 110 128 135 186-14-49-68-81-94-112-7-20-1-56 8-67-3 56 55 98 87 128 37 36 46 68 41 94 8 1 19 9 17 23 13-3 25-17 28-25 7 40-18 83-45 95 0 0 8-20-4-34-12-15-46-15-58-13 0 0 15-22 9-31-8-14-72-9-103 3 11-1 34 2 43 5-4 6-18 35-9 44s20-6 20-6c0 0-11 32-3 40 6 6 23 1 23 1-11 26-49 43-75 43 9-3 24-20 27-31-7 4-26 5-33 5 9-3 26-26 21-52-7-35-58-41-84-23 9-24 32-47 52-55-11-5-24-8-38-9 15-14 56-26 78-25-32-7-90 2-118 34 9 0 32 5 40 8-37 6-86 41-101 56 3-21 9-38 4-52-7-18-29-26-73-17zM95 174c-6-70 26-108 41-124 32-32 77-53 142-50 103 6 152 76 152 153 0 37-18 88-44 123-2-3-4-3-5-6-5-4-11-9-17-15-17-16-35-34-49-52 29-53 12-125-47-125-35 0-65 30-61 73-10 20-14 52-13 78-17-11-30-23-38-41l-21-54-17 56c-5 13-5 28-3 42h-2c-6-11-17-31-18-58z">
          <text:p/>
        </draw:path>
        <draw:frame draw:style-name="gr127" draw:text-style-name="P11" draw:layer="layout" svg:width="3.38cm" svg:height="0.268cm" svg:x="12.764cm" svg:y="12.462cm">
          <draw:text-box>
            <text:p text:style-name="P7"><text:span text:style-name="T5">ALLIES &amp; ORGANIZATIONS</text:span></text:p>
          </draw:text-box>
        </draw:frame>
        <draw:frame draw:style-name="gr128" draw:text-style-name="P11" draw:layer="layout" svg:width="1.073cm" svg:height="0.268cm" svg:x="16.923cm" svg:y="10.43cm">
          <draw:text-box>
            <text:p text:style-name="P7"><text:span text:style-name="T24">SYMBOL</text:span></text:p>
          </draw:text-box>
        </draw:frame>
        <draw:frame draw:style-name="gr18" draw:text-style-name="P9" draw:layer="layout" svg:width="10.556cm" svg:height="0.23cm" svg:x="6.1cm" svg:y="27.301cm">
          <draw:text-box>
            <text:p text:style-name="P7"><text:span text:style-name="T25">TM &amp; © 2014 Wizards of the Coast LLC. Permission is granted to photocopy this document for personal use.</text:span></text:p>
          </draw:text-box>
        </draw:frame>
        <draw:frame draw:style-name="gr86" draw:text-style-name="P14" draw:layer="layout" svg:width="1.966cm" svg:height="0.496cm" svg:x="4.374cm" svg:y="2.469cm">
          <draw:text-box>
            <text:p text:style-name="P7"><text:span text:style-name="T11">Th'Anton</text:span></text:p>
          </draw:text-box>
        </draw:frame>
        <draw:frame draw:style-name="gr129" draw:text-style-name="P13" draw:layer="layout" svg:width="0.4cm" svg:height="0.357cm" svg:x="9.454cm" svg:y="1.931cm">
          <draw:text-box>
            <text:p text:style-name="P7"><text:span text:style-name="T10">17</text:span></text:p>
          </draw:text-box>
        </draw:frame>
        <draw:frame draw:style-name="gr130" draw:text-style-name="P13" draw:layer="layout" svg:width="0.595cm" svg:height="0.357cm" svg:x="13.444cm" svg:y="1.931cm">
          <draw:text-box>
            <text:p text:style-name="P7"><text:span text:style-name="T10">6'3"</text:span></text:p>
          </draw:text-box>
        </draw:frame>
        <draw:frame draw:style-name="gr129" draw:text-style-name="P13" draw:layer="layout" svg:width="0.4cm" svg:height="0.357cm" svg:x="16.835cm" svg:y="1.931cm">
          <draw:text-box>
            <text:p text:style-name="P7"><text:span text:style-name="T10">??</text:span></text:p>
          </draw:text-box>
        </draw:frame>
        <draw:frame draw:style-name="gr129" draw:text-style-name="P13" draw:layer="layout" svg:width="0.4cm" svg:height="0.357cm" svg:x="9.419cm" svg:y="2.852cm">
          <draw:text-box>
            <text:p text:style-name="P7"><text:span text:style-name="T10">??</text:span></text:p>
          </draw:text-box>
        </draw:frame>
        <draw:frame draw:style-name="gr129" draw:text-style-name="P13" draw:layer="layout" svg:width="0.4cm" svg:height="0.357cm" svg:x="13.427cm" svg:y="2.852cm">
          <draw:text-box>
            <text:p text:style-name="P7"><text:span text:style-name="T10">??</text:span></text:p>
          </draw:text-box>
        </draw:frame>
        <draw:frame draw:style-name="gr129" draw:text-style-name="P13" draw:layer="layout" svg:width="0.4cm" svg:height="0.357cm" svg:x="16.835cm" svg:y="2.852cm">
          <draw:text-box>
            <text:p text:style-name="P7"><text:span text:style-name="T10">??</text:span></text:p>
          </draw:text-box>
        </draw:frame>
        <draw:frame draw:style-name="gr131" draw:text-style-name="P23" draw:layer="layout" svg:width="2.491cm" svg:height="0.416cm" svg:x="1.298cm" svg:y="13.741cm">
          <draw:text-box>
            <text:p text:style-name="P7"><text:span text:style-name="T20">Homesteader</text:span></text:p>
          </draw:text-box>
        </draw:frame>
        <draw:frame draw:style-name="gr132" draw:text-style-name="P23" draw:layer="layout" svg:width="1.822cm" svg:height="0.416cm" svg:x="1.298cm" svg:y="14.866cm">
          <draw:text-box>
            <text:p text:style-name="P7"><text:span text:style-name="T20">Outlander</text:span></text:p>
          </draw:text-box>
        </draw:frame>
        <draw:frame draw:style-name="gr105" draw:text-style-name="P23" draw:layer="layout" svg:width="4.472cm" svg:height="0.416cm" svg:x="1.298cm" svg:y="15.995cm">
          <draw:text-box>
            <text:p text:style-name="P7"><text:span text:style-name="T20">Wanderer 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ath draw:style-name="gr2" draw:text-style-name="P2" draw:layer="layout" svg:width="13.728cm" svg:height="1.74cm" svg:x="0.331cm" svg:y="0.713cm" svg:viewBox="0 0 13729 1741" svg:d="M2974 1449l820 61-820 61-820-61zM7887 1680l820 61 820-61-820-63zM11919 1080l786-60-970-72 1484-111-1320-98 1830-138-3117-232 837-63-1528-115-1359 103-611-80 1498-114-1201-89-837 61-974-72-907 69 922 69-1017 78-1016-78 589-46-704-52-2251 171 797 60-2529 188 1489 112-787 59 971 72-1483 110 1320 100-1831 136 2517 188-1152 86 1216 92 314-23 913 67 1359-101 611 80-1584 117 2174 164 477-37-858-64 1224-90 855 64 562-43 797 60 2252-168-797-60 2529-188z">
          <text:p/>
        </draw:path>
        <draw:path draw:style-name="gr2" draw:text-style-name="P2" draw:layer="layout" svg:width="11.15cm" svg:height="1.412cm" svg:x="4.372cm" svg:y="2.758cm" svg:viewBox="0 0 11151 1413" svg:d="M2418 1177l666 51-666 49-667-49zM6407 1364l666 49 667-49-667-49zM9682 877l638-47-787-61 1206-90-1074-81 1486-110-2531-190 681-52-1243-92-1103 83-496-66 1217-90-975-74-681 52-789-59-738 55 750 56-826 61-825-61 477-35-572-43-1827 136 647 48-2057 154 1213 91-641 47 789 60-1207 90 1076 80-1490 112 2045 153-936 71 988 73 257-18 742 55 1103-83 496 64-1285 97 1764 133 386-29-695-52 993-75 695 52 456-35 647 50 1830-137-649-48 2055-154z">
          <text:p/>
        </draw:path>
        <draw:path draw:style-name="gr2" draw:text-style-name="P2" draw:layer="layout" svg:width="9.196cm" svg:height="1.164cm" svg:x="11.86cm" svg:y="1.289cm" svg:viewBox="0 0 9197 1165" svg:d="M1995 971l549 41-549 40-552-40zM5285 1125l549 40 549-40-549-41zM7985 723l527-40-649-47 993-74-884-67 1225-93-2087-156 560-43-1023-76-911 67-408-52 1003-75-805-61-561 41-650-47-608 44 617 47-681 51-681-51 395-30-471-34-1512 112 536 40-1696 127 998 75-526 38 650 51-995 74 885 67-1226 92 1685 125-771 59 815 59 211-15 613 46 911-69 408 55-1060 78 1455 109 320-23-574-43 819-61 572 43 376-28 535 40 1508-113-534-40 1694-127z">
          <text:p/>
        </draw:path>
        <draw:path draw:style-name="gr133" draw:text-style-name="P27" draw:layer="layout" svg:width="6.251cm" svg:height="22.972cm" svg:x="7.663cm" svg:y="4.297cm" svg:viewBox="0 0 6252 22973" svg:d="M6252 471c-74-95-144-217-144-350v-26h-2294c-217-63-445-95-681-95-235 0-465 32-681 95h-2310v26c0 133-68 255-142 350h64c17-23 33-47 48-72h50 8l3-7c3-8 63-169 332-169h1603c-95 46-188 97-277 155l14 18c41-26 83-52 125-76h2326c43 24 86 50 127 76l12-18c-88-58-182-109-278-155h1593c269 0 329 161 332 169l1 7h57c14 25 29 49 46 72zM182 223h164c-132 42-179 127-190 153h-32c26-47 46-99 58-153zM2293 147c-33 12-67 26-101 40-7-10-18-14-30-14-19 0-34 12-37 27h-1938c3-18 6-35 6-53zM3727 95h-1187c189-48 388-72 593-72 204 0 404 24 594 72zM3904 147c54 18 109 38 161 59 0 2 0 5 0 5 0 23 17 40 40 40 12 0 23-5 29-14 41 18 81 40 121 61h-2243c38-21 79-43 119-61 8 9 18 14 31 14 21 0 39-17 39-40 0 0-1-3-1-5 53-21 107-41 162-59zM6063 200h-1921c-5-15-19-27-37-27-12 0-23 4-31 14-33-14-67-28-102-40h2085c2 18 3 35 6 53zM6128 376h-28c-12-26-60-111-191-153h161c12 54 32 106 58 153zM2 22506c73 93 140 216 140 347v26h2310c216 61 446 94 681 94 236 0 464-33 681-94h2294v-26c0-131 69-254 142-347h-67c-14 23-29 44-43 69h-60l-3 7c-1 8-63 169-332 169h-1588c96-46 188-97 277-155l-12-18c-42 26-83 52-126 75h-2326c-42-23-85-49-127-77l-12 20c89 57 182 109 277 155h-1606c-269 0-329-161-332-169l-3-7h-55c-14-25-29-46-46-69zM6070 22751h-164c130-42 177-127 190-153h32c-26 47-46 99-58 153zM3972 22827c35-12 69-26 102-40 8 8 19 14 31 14 18 0 32-12 37-29h1921c-3 18-4 37-6 55zM2540 22879h1187c-190 48-390 72-594 72-205 0-404-24-593-72zM2362 22827c-55-18-109-38-162-61 0 0 1-3 1-5 0-21-18-39-39-39-13 0-23 6-31 15-40-20-81-40-119-60h2243c-40 20-80 40-121 60-6-9-17-15-29-15-23 0-40 18-40 39 0 2 0 5 0 5-52 23-107 43-161 61zM187 22772h1938c5 17 18 29 37 29 12 0 23-6 30-14 34 14 68 28 103 40h-2102c0-18-3-37-6-55zM124 22598h28c12 26 59 111 189 153h-159c-12-54-32-106-58-153z">
          <text:p/>
        </draw:path>
        <draw:polygon draw:style-name="gr134" draw:text-style-name="P1" draw:layer="layout" svg:width="6.673cm" svg:height="22.211cm" svg:x="7.452cm" svg:y="4.678cm" svg:viewBox="0 0 6674 22212" draw:points="6674,168 6504,0 168,0 0,168 0,22044 168,22212 6504,22212 6674,22044">
          <text:p/>
        </draw:polygon>
        <draw:path draw:style-name="gr133" draw:text-style-name="P27" draw:layer="layout" svg:width="6.252cm" svg:height="22.972cm" svg:x="1.001cm" svg:y="4.297cm" svg:viewBox="0 0 6253 22973" svg:d="M6253 471c-75-95-144-217-144-350v-26h-2295c-216-63-445-95-679-95-236 0-466 32-681 95h-2310v26c0 133-69 255-144 350h66c17-23 32-47 47-72h51 7l3-7c2-8 63-169 332-169h1601c-95 46-187 97-277 155l14 18c41-26 82-52 125-76h2327c44 24 87 50 127 76l14-18c-89-58-182-109-279-155h1593c268 0 329 161 332 169l2 7h55c15 25 30 49 47 72zM182 223h164c-130 42-179 127-190 153h-32c26-47 46-99 58-153zM2296 147c-35 12-70 26-104 40-6-10-17-14-29-14-18 0-32 12-39 27h-1936c3-18 5-35 6-53zM3727 95h-1186c190-48 390-72 594-72 203 0 402 24 592 72zM3906 147c53 18 107 38 160 59 0 2-1 5-1 5 0 23 18 40 40 40 12 0 24-5 30-14 42 18 81 40 121 61h-2245c38-21 79-43 121-61 8 9 19 14 31 14 21 0 40-17 40-40 0 0-2-3-2-5 54-21 107-41 162-59zM6065 200h-1922c-6-15-20-27-38-27-11 0-23 4-29 14-34-14-69-28-103-40h2086c1 18 3 35 6 53zM6129 376h-29c-12-26-58-111-190-153h161c12 54 32 106 58 153zM3 22506c72 93 141 216 141 347v26h2310c215 61 445 94 681 94 234 0 463-33 679-94h2295v-26c0-131 69-254 141-347h-64c-17 23-31 44-46 69h-58l-3 7c-2 8-63 169-332 169h-1589c97-46 190-97 277-155l-12-18c-41 26-84 52-127 75h-2327c-43-23-85-49-127-77l-12 20c89 57 182 109 277 155h-1605c-268 0-329-161-332-169l-2-7h-55c-15-25-29-46-46-69zM6071 22751h-164c130-42 179-127 190-153h32c-26 47-46 99-58 153zM3973 22827c34-12 69-26 103-40 7 8 18 14 29 14 18 0 33-12 38-29h1922c-3 18-5 37-6 55zM2541 22879h1186c-190 48-389 72-592 72-204 0-404-24-594-72zM2362 22827c-54-18-107-38-161-61 0 0 2-3 2-5 0-21-19-39-40-39-12 0-23 6-31 15-42-20-83-40-121-60h2245c-40 20-79 40-121 60-6-9-18-15-30-15-22 0-40 18-40 39 0 2 1 5 1 5-53 23-107 43-160 61zM188 22772h1936c7 17 21 29 39 29 12 0 23-6 29-14 34 14 69 28 104 40h-2102c-1-18-3-37-6-55zM124 22598h29c12 26 58 111 190 153h-161c-12-54-32-106-58-153z">
          <text:p/>
        </draw:path>
        <draw:polygon draw:style-name="gr134" draw:text-style-name="P1" draw:layer="layout" svg:width="6.674cm" svg:height="22.211cm" svg:x="0.79cm" svg:y="4.678cm" svg:viewBox="0 0 6675 22212" draw:points="6675,168 6505,0 170,0 0,168 0,22044 170,22212 6505,22212 6675,22044">
          <text:p/>
        </draw:polygon>
        <draw:path draw:style-name="gr133" draw:text-style-name="P27" draw:layer="layout" svg:width="6.252cm" svg:height="22.972cm" svg:x="14.336cm" svg:y="4.297cm" svg:viewBox="0 0 6253 22973" svg:d="M6253 471c-75-95-144-217-144-350v-26h-2295c-216-63-445-95-679-95-236 0-466 32-681 95h-2310v26c0 133-69 255-144 350h66c17-23 32-47 47-72h51 7l3-7c2-8 63-169 332-169h1603c-96 46-188 97-276 155l12 18c41-26 84-52 127-76h2324c44 24 87 50 127 76l14-18c-89-58-182-109-279-155h1593c268 0 329 161 332 169l2 7h55c15 25 30 49 47 72zM182 223h164c-130 42-179 127-190 153h-32c26-47 46-99 58-153zM2296 147c-35 12-70 26-104 40-6-10-17-14-29-14-18 0-32 12-38 27h-1937c3-18 5-35 6-53zM3727 95h-1186c190-48 390-72 594-72 203 0 402 24 592 72zM3906 147c53 18 107 38 160 59 0 2-1 5-1 5 0 23 18 40 40 40 12 0 24-5 30-14 42 18 81 40 121 61h-2243c38-21 78-43 119-61 8 9 19 14 31 14 21 0 40-17 40-40 0 0-2-3-2-5 54-21 107-41 162-59zM6065 200h-1922c-6-15-20-27-38-27-11 0-23 4-29 14-34-14-69-28-103-40h2086c1 18 3 35 6 53zM6129 376h-29c-12-26-58-111-190-153h161c12 54 32 106 58 153zM3 22506c72 93 141 216 141 347v26h2310c215 61 445 94 681 94 234 0 463-33 679-94h2295v-26c0-131 69-254 141-347h-64c-17 23-31 44-46 69h-58l-3 7c-2 8-63 169-332 169h-1589c97-46 190-97 277-155l-12-18c-41 26-84 52-127 75h-2324c-43-23-86-49-127-77l-14 20c90 57 182 109 278 155h-1607c-268 0-329-161-332-169l-2-7h-55c-15-25-29-46-46-69zM6071 22751h-164c130-42 179-127 190-153h32c-26 47-46 99-58 153zM3973 22827c34-12 69-26 103-40 7 8 18 14 29 14 18 0 33-12 38-29h1922c-3 18-5 37-6 55zM2541 22879h1186c-190 48-389 72-592 72-204 0-404-24-594-72zM2362 22827c-54-18-107-38-161-61 0 0 2-3 2-5 0-21-19-39-40-39-12 0-23 6-31 15-41-20-81-40-119-60h2243c-40 20-79 40-121 60-6-9-18-15-30-15-22 0-40 18-40 39 0 2 1 5 1 5-53 23-107 43-160 61zM188 22772h1937c6 17 20 29 38 29 12 0 23-6 29-14 34 14 69 28 104 40h-2102c-1-18-3-37-6-55zM124 22598h29c12 26 58 111 190 153h-161c-12-54-32-106-58-153z">
          <text:p/>
        </draw:path>
        <draw:polygon draw:style-name="gr134" draw:text-style-name="P1" draw:layer="layout" svg:width="6.674cm" svg:height="22.211cm" svg:x="14.125cm" svg:y="4.678cm" svg:viewBox="0 0 6675 22212" draw:points="6675,168 6505,0 170,0 0,168 0,22044 170,22212 6505,22212 6675,22044">
          <text:p/>
        </draw:polygon>
        <draw:path draw:style-name="gr133" draw:text-style-name="P27" draw:layer="layout" svg:width="0.318cm" svg:height="0.235cm" svg:x="7.452cm" svg:y="12.586cm" svg:viewBox="0 0 319 236" svg:d="M117 116c0-2 0-5 0-8h202l-27-17c-133 0-225-70-225-70-19-14-42-21-67-21v236c30 0 56-12 76-29 26-17 106-67 216-67l27-17h-202c0-3 0-4 0-7z">
          <text:p/>
        </draw:path>
        <draw:path draw:style-name="gr1" draw:text-style-name="P1" draw:layer="layout" svg:width="0.108cm" svg:height="0.179cm" svg:x="7.434cm" svg:y="12.613cm" svg:viewBox="0 0 109 180" svg:d="M19 0c-6 0-12 0-19 3v176c7 1 13 1 19 1 49 0 90-40 90-91 0-49-41-89-90-89z">
          <text:p/>
        </draw:path>
        <draw:path draw:style-name="gr133" draw:text-style-name="P27" draw:layer="layout" svg:width="0.32cm" svg:height="0.235cm" svg:x="13.805cm" svg:y="12.586cm" svg:viewBox="0 0 321 236" svg:d="M201 116c0-2 2-5 2-8h-203l26-17c136 0 226-70 226-70 20-14 43-21 69-21v236c-31 0-57-12-78-29-25-17-106-67-217-67l-26-17h203c0-3-2-4-2-7z">
          <text:p/>
        </draw:path>
        <draw:path draw:style-name="gr1" draw:text-style-name="P1" draw:layer="layout" svg:width="0.107cm" svg:height="0.179cm" svg:x="14.035cm" svg:y="12.613cm" svg:viewBox="0 0 108 180" svg:d="M91 0c6 0 12 0 17 3v176c-5 1-11 1-17 1-49 0-91-40-91-91 0-49 42-89 91-89z">
          <text:p/>
        </draw:path>
        <draw:path draw:style-name="gr133" draw:text-style-name="P27" draw:layer="layout" svg:width="0.318cm" svg:height="0.236cm" svg:x="7.452cm" svg:y="20.542cm" svg:viewBox="0 0 319 237" svg:d="M117 119c0-3 0-6 0-9h202l-27-18c-133 0-225-72-225-72v2c-19-14-42-22-67-22v237c30 0 56-11 76-28 26-18 106-67 216-67l27-17h-202c0-3 0-5 0-6z">
          <text:p/>
        </draw:path>
        <draw:path draw:style-name="gr1" draw:text-style-name="P1" draw:layer="layout" svg:width="0.108cm" svg:height="0.18cm" svg:x="7.434cm" svg:y="20.57cm" svg:viewBox="0 0 109 181" svg:d="M19 0c-6 0-12 1-19 1v177c7 2 13 3 19 3 49 0 90-41 90-91 0-51-41-90-90-90z">
          <text:p/>
        </draw:path>
        <draw:path draw:style-name="gr133" draw:text-style-name="P27" draw:layer="layout" svg:width="0.32cm" svg:height="0.236cm" svg:x="13.805cm" svg:y="20.542cm" svg:viewBox="0 0 321 237" svg:d="M201 119c0-3 2-6 2-9h-203l26-18c136 0 226-72 226-72v2c20-14 43-22 69-22v237c-31 0-57-11-78-28-25-18-106-67-217-67l-26-17h203c0-3-2-5-2-6z">
          <text:p/>
        </draw:path>
        <draw:path draw:style-name="gr1" draw:text-style-name="P1" draw:layer="layout" svg:width="0.107cm" svg:height="0.18cm" svg:x="14.035cm" svg:y="20.57cm" svg:viewBox="0 0 108 181" svg:d="M91 0c6 0 12 1 17 1v177c-5 2-11 3-17 3-49 0-91-41-91-91 0-51 42-90 91-90z">
          <text:p/>
        </draw:path>
        <draw:path draw:style-name="gr133" draw:text-style-name="P27" draw:layer="layout" svg:width="0.32cm" svg:height="0.236cm" svg:x="0.79cm" svg:y="18.579cm" svg:viewBox="0 0 321 237" svg:d="M120 119c0-3 0-5 0-8h201l-28-18c-133 0-223-72-223-72-20-12-43-21-70-21v237c31 0 57-11 79-28 24-17 104-66 214-66l28-17h-201c0-1 0-4 0-7z">
          <text:p/>
        </draw:path>
        <draw:path draw:style-name="gr1" draw:text-style-name="P1" draw:layer="layout" svg:width="0.107cm" svg:height="0.179cm" svg:x="0.773cm" svg:y="18.608cm" svg:viewBox="0 0 108 180" svg:d="M17 0c-5 0-11 0-17 2v175c6 2 12 3 17 3 51 0 91-42 91-91s-40-89-91-89z">
          <text:p/>
        </draw:path>
        <draw:path draw:style-name="gr133" draw:text-style-name="P27" draw:layer="layout" svg:width="0.32cm" svg:height="0.236cm" svg:x="7.144cm" svg:y="18.579cm" svg:viewBox="0 0 321 237" svg:d="M202 119c0-3 0-5 0-8h-202l28-18c134 0 224-72 224-72 20-12 43-21 69-21v237c-30 0-56-11-78-28-24-17-104-66-215-66l-28-17h202c0-1 0-4 0-7z">
          <text:p/>
        </draw:path>
        <draw:path draw:style-name="gr1" draw:text-style-name="P1" draw:layer="layout" svg:width="0.107cm" svg:height="0.179cm" svg:x="7.374cm" svg:y="18.608cm" svg:viewBox="0 0 108 180" svg:d="M90 0c6 0 12 0 18 2v175c-6 2-12 3-18 3-50 0-90-42-90-91s40-89 90-89z">
          <text:p/>
        </draw:path>
        <draw:path draw:style-name="gr133" draw:text-style-name="P27" draw:layer="layout" svg:width="0.32cm" svg:height="0.237cm" svg:x="0.79cm" svg:y="10.113cm" svg:viewBox="0 0 321 238" svg:d="M120 119c0-3 0-6 0-9h201l-28-17c-133 0-223-72-223-72-20-12-43-21-70-21v238c31 0 57-12 79-29 24-17 104-67 214-67l28-17h-201c0-1 0-3 0-6z">
          <text:p/>
        </draw:path>
        <draw:path draw:style-name="gr1" draw:text-style-name="P1" draw:layer="layout" svg:width="0.107cm" svg:height="0.179cm" svg:x="0.773cm" svg:y="10.142cm" svg:viewBox="0 0 108 180" svg:d="M17 0c-5 0-11 0-17 1v177c6 2 12 2 17 2 51 0 91-40 91-91 0-49-40-89-91-89z">
          <text:p/>
        </draw:path>
        <draw:path draw:style-name="gr133" draw:text-style-name="P27" draw:layer="layout" svg:width="0.32cm" svg:height="0.237cm" svg:x="7.144cm" svg:y="10.113cm" svg:viewBox="0 0 321 238" svg:d="M202 119c0-3 0-6 0-9h-202l28-17c134 0 224-72 224-72 20-12 43-21 69-21v238c-30 0-56-12-78-29-24-17-104-67-215-67l-28-17h202c0-1 0-3 0-6z">
          <text:p/>
        </draw:path>
        <draw:path draw:style-name="gr1" draw:text-style-name="P1" draw:layer="layout" svg:width="0.107cm" svg:height="0.179cm" svg:x="7.374cm" svg:y="10.142cm" svg:viewBox="0 0 108 180" svg:d="M90 0c6 0 12 0 18 1v177c-6 2-12 2-18 2-50 0-90-40-90-91 0-49 40-89 90-89z">
          <text:p/>
        </draw:path>
        <draw:path draw:style-name="gr133" draw:text-style-name="P27" draw:layer="layout" svg:width="0.32cm" svg:height="0.237cm" svg:x="14.125cm" svg:y="10.578cm" svg:viewBox="0 0 321 238" svg:d="M119 118c0-2 0-5 0-8h202l-28-17c-133 0-226-72-226-72v2c-18-14-41-23-67-23v238c29 0 55-12 77-29 25-17 106-65 216-65l28-19h-202c0-1 0-4 0-7z">
          <text:p/>
        </draw:path>
        <draw:path draw:style-name="gr1" draw:text-style-name="P1" draw:layer="layout" svg:width="0.107cm" svg:height="0.179cm" svg:x="14.108cm" svg:y="10.607cm" svg:viewBox="0 0 108 180" svg:d="M17 0c-5 0-11 0-17 2v177c6 1 12 1 17 1 50 0 91-41 91-90 0-50-41-90-91-90z">
          <text:p/>
        </draw:path>
        <draw:path draw:style-name="gr133" draw:text-style-name="P27" draw:layer="layout" svg:width="0.32cm" svg:height="0.237cm" svg:x="20.479cm" svg:y="10.578cm" svg:viewBox="0 0 321 238" svg:d="M202 118c0-2 0-5 0-8h-202l28-17c134 0 224-72 224-72v2c20-14 43-23 69-23v238c-29 0-56-12-78-29-24-17-104-65-215-65l-28-19h202c0-1 0-4 0-7z">
          <text:p/>
        </draw:path>
        <draw:path draw:style-name="gr1" draw:text-style-name="P1" draw:layer="layout" svg:width="0.107cm" svg:height="0.179cm" svg:x="20.709cm" svg:y="10.607cm" svg:viewBox="0 0 108 180" svg:d="M90 0c5 0 11 0 18 2v177c-7 1-13 1-18 1-49 0-90-41-90-90 0-50 41-90 90-90z">
          <text:p/>
        </draw:path>
        <draw:path draw:style-name="gr133" draw:text-style-name="P27" draw:layer="layout" svg:width="0.32cm" svg:height="0.234cm" svg:x="14.125cm" svg:y="16.579cm" svg:viewBox="0 0 321 235" svg:d="M119 116c0-3 0-4 0-7h202l-28-17c-133 0-226-72-226-72-18-12-41-20-67-20v235c29 0 55-9 77-27 25-17 106-67 216-67l28-17h-202c0-3 0-6 0-8z">
          <text:p/>
        </draw:path>
        <draw:path draw:style-name="gr1" draw:text-style-name="P1" draw:layer="layout" svg:width="0.107cm" svg:height="0.179cm" svg:x="14.108cm" svg:y="16.607cm" svg:viewBox="0 0 108 180" svg:d="M17 0c-5 0-11 1-17 1v177c6 2 12 2 17 2 50 0 91-40 91-89s-41-91-91-91z">
          <text:p/>
        </draw:path>
        <draw:path draw:style-name="gr133" draw:text-style-name="P27" draw:layer="layout" svg:width="0.32cm" svg:height="0.234cm" svg:x="20.479cm" svg:y="16.579cm" svg:viewBox="0 0 321 235" svg:d="M202 116c0-3 0-4 0-7h-202l28-17c134 0 224-72 224-72 20-12 43-20 69-20v235c-29 0-56-9-78-27-24-17-104-67-215-67l-28-17h202c0-3 0-6 0-8z">
          <text:p/>
        </draw:path>
        <draw:path draw:style-name="gr1" draw:text-style-name="P1" draw:layer="layout" svg:width="0.107cm" svg:height="0.179cm" svg:x="20.709cm" svg:y="16.607cm" svg:viewBox="0 0 108 180" svg:d="M90 0c5 0 11 1 18 1v177c-7 2-13 2-18 2-49 0-90-40-90-89s41-91 90-91z">
          <text:p/>
        </draw:path>
        <draw:path draw:style-name="gr133" draw:text-style-name="P27" draw:layer="layout" svg:width="0.32cm" svg:height="0.236cm" svg:x="14.125cm" svg:y="21.572cm" svg:viewBox="0 0 321 237" svg:d="M119 119c0-3 0-6 0-9h202l-28-17c-133 0-226-72-226-72-18-12-41-21-67-21v237c29 0 55-11 77-28 25-17 106-67 216-67l28-17h-202c0-1 0-4 0-6z">
          <text:p/>
        </draw:path>
        <draw:path draw:style-name="gr1" draw:text-style-name="P1" draw:layer="layout" svg:width="0.107cm" svg:height="0.179cm" svg:x="14.108cm" svg:y="21.601cm" svg:viewBox="0 0 108 180" svg:d="M17 0c-5 0-11 0-17 2v175c6 3 12 3 17 3 50 0 91-40 91-89 0-50-41-91-91-91z">
          <text:p/>
        </draw:path>
        <draw:path draw:style-name="gr133" draw:text-style-name="P27" draw:layer="layout" svg:width="0.32cm" svg:height="0.236cm" svg:x="20.479cm" svg:y="21.572cm" svg:viewBox="0 0 321 237" svg:d="M202 119c0-3 0-6 0-9h-202l28-17c134 0 224-72 224-72 20-12 43-21 69-21v237c-29 0-56-11-78-28-24-17-104-67-215-67l-28-17h202c0-1 0-4 0-6z">
          <text:p/>
        </draw:path>
        <draw:path draw:style-name="gr1" draw:text-style-name="P1" draw:layer="layout" svg:width="0.107cm" svg:height="0.179cm" svg:x="20.709cm" svg:y="21.601cm" svg:viewBox="0 0 108 180" svg:d="M90 0c5 0 11 0 18 2v175c-7 3-13 3-18 3-49 0-90-40-90-89 0-50 41-91 90-91z">
          <text:p/>
        </draw:path>
        <draw:polygon draw:style-name="gr1" draw:text-style-name="P1" draw:layer="layout" svg:width="5.752cm" svg:height="0.923cm" svg:x="1.463cm" svg:y="5.054cm" svg:viewBox="0 0 5753 924" draw:points="5583,924 5753,719 5753,208 5583,0 0,0 0,924">
          <text:p/>
        </draw:polygon>
        <draw:polygon draw:style-name="gr1" draw:text-style-name="P1" draw:layer="layout" svg:width="5.752cm" svg:height="0.923cm" svg:x="1.463cm" svg:y="10.971cm" svg:viewBox="0 0 5753 924" draw:points="5583,924 5753,719 5753,207 5583,0 0,0 0,924">
          <text:p/>
        </draw:polygon>
        <draw:polygon draw:style-name="gr1" draw:text-style-name="P1" draw:layer="layout" svg:width="5.752cm" svg:height="0.924cm" svg:x="1.463cm" svg:y="19.035cm" svg:viewBox="0 0 5753 925" draw:points="5583,925 5753,716 5753,205 5583,0 0,0 0,925">
          <text:p/>
        </draw:polygon>
        <draw:polygon draw:style-name="gr1" draw:text-style-name="P1" draw:layer="layout" svg:width="5.752cm" svg:height="0.923cm" svg:x="8.13cm" svg:y="5.054cm" svg:viewBox="0 0 5753 924" draw:points="5583,924 5753,719 5753,208 5583,0 0,0 0,924">
          <text:p/>
        </draw:polygon>
        <draw:polygon draw:style-name="gr1" draw:text-style-name="P1" draw:layer="layout" svg:width="5.752cm" svg:height="0.923cm" svg:x="14.732cm" svg:y="5.054cm" svg:viewBox="0 0 5753 924" draw:points="5582,924 5753,719 5753,208 5582,0 0,0 0,924">
          <text:p/>
        </draw:polygon>
        <draw:polygon draw:style-name="gr1" draw:text-style-name="P1" draw:layer="layout" svg:width="5.752cm" svg:height="0.923cm" svg:x="14.732cm" svg:y="11.043cm" svg:viewBox="0 0 5753 924" draw:points="5582,924 5753,719 5753,205 5582,0 0,0 0,924">
          <text:p/>
        </draw:polygon>
        <draw:polygon draw:style-name="gr1" draw:text-style-name="P1" draw:layer="layout" svg:width="5.752cm" svg:height="0.922cm" svg:x="14.732cm" svg:y="17.034cm" svg:viewBox="0 0 5753 923" draw:points="5582,923 5753,718 5753,207 5582,0 0,0 0,923">
          <text:p/>
        </draw:polygon>
        <draw:polygon draw:style-name="gr1" draw:text-style-name="P1" draw:layer="layout" svg:width="5.752cm" svg:height="0.923cm" svg:x="14.732cm" svg:y="21.997cm" svg:viewBox="0 0 5753 924" draw:points="5582,924 5753,719 5753,207 5582,0 0,0 0,924">
          <text:p/>
        </draw:polygon>
        <draw:polygon draw:style-name="gr1" draw:text-style-name="P1" draw:layer="layout" svg:width="5.752cm" svg:height="0.923cm" svg:x="8.13cm" svg:y="13.012cm" svg:viewBox="0 0 5753 924" draw:points="5583,924 5753,719 5753,207 5583,0 0,0 0,924">
          <text:p/>
        </draw:polygon>
        <draw:polygon draw:style-name="gr1" draw:text-style-name="P1" draw:layer="layout" svg:width="5.752cm" svg:height="0.922cm" svg:x="8.13cm" svg:y="21.006cm" svg:viewBox="0 0 5753 923" draw:points="5583,923 5753,717 5753,205 5583,0 0,0 0,923">
          <text:p/>
        </draw:polygon>
        <draw:polygon draw:style-name="gr1" draw:text-style-name="P1" draw:layer="layout" svg:width="0.456cm" svg:height="1.025cm" svg:x="1.2cm" svg:y="10.921cm" svg:viewBox="0 0 457 1026" draw:points="0,937 0,90 95,0 457,312 457,711 95,1026">
          <text:p/>
        </draw:polygon>
        <draw:polygon draw:style-name="gr1" draw:text-style-name="P1" draw:layer="layout" svg:width="0.456cm" svg:height="1.026cm" svg:x="1.2cm" svg:y="18.984cm" svg:viewBox="0 0 457 1027" draw:points="0,934 0,89 95,0 457,313 457,712 95,1027">
          <text:p/>
        </draw:polygon>
        <draw:polygon draw:style-name="gr1" draw:text-style-name="P1" draw:layer="layout" svg:width="0.457cm" svg:height="1.025cm" svg:x="7.867cm" svg:y="5.004cm" svg:viewBox="0 0 458 1026" draw:points="0,937 0,90 96,0 458,312 458,714 96,1026">
          <text:p/>
        </draw:polygon>
        <draw:polygon draw:style-name="gr1" draw:text-style-name="P1" draw:layer="layout" svg:width="0.456cm" svg:height="1.025cm" svg:x="14.469cm" svg:y="5.004cm" svg:viewBox="0 0 457 1026" draw:points="0,937 0,90 95,0 457,312 457,714 95,1026">
          <text:p/>
        </draw:polygon>
        <draw:polygon draw:style-name="gr1" draw:text-style-name="P1" draw:layer="layout" svg:width="0.456cm" svg:height="1.027cm" svg:x="14.469cm" svg:y="10.991cm" svg:viewBox="0 0 457 1028" draw:points="0,938 0,90 95,0 457,314 457,713 95,1028">
          <text:p/>
        </draw:polygon>
        <draw:polygon draw:style-name="gr1" draw:text-style-name="P1" draw:layer="layout" svg:width="0.456cm" svg:height="1.025cm" svg:x="14.469cm" svg:y="16.983cm" svg:viewBox="0 0 457 1026" draw:points="0,933 0,89 95,0 457,312 457,710 95,1026">
          <text:p/>
        </draw:polygon>
        <draw:polygon draw:style-name="gr1" draw:text-style-name="P1" draw:layer="layout" svg:width="0.456cm" svg:height="1.025cm" svg:x="14.469cm" svg:y="21.947cm" svg:viewBox="0 0 457 1026" draw:points="0,937 0,91 95,0 457,314 457,714 95,1026">
          <text:p/>
        </draw:polygon>
        <draw:polygon draw:style-name="gr1" draw:text-style-name="P1" draw:layer="layout" svg:width="0.457cm" svg:height="1.025cm" svg:x="7.867cm" svg:y="12.962cm" svg:viewBox="0 0 458 1026" draw:points="0,936 0,90 96,0 458,312 458,711 96,1026">
          <text:p/>
        </draw:polygon>
        <draw:polygon draw:style-name="gr1" draw:text-style-name="P1" draw:layer="layout" svg:width="0.457cm" svg:height="1.024cm" svg:x="7.867cm" svg:y="20.955cm" svg:viewBox="0 0 458 1025" draw:points="0,936 0,90 96,0 458,313 458,713 96,1025">
          <text:p/>
        </draw:polygon>
        <draw:path draw:style-name="gr2" draw:text-style-name="P2" draw:layer="layout" svg:width="0.562cm" svg:height="1.169cm" svg:x="1.146cm" svg:y="10.849cm" svg:viewBox="0 0 563 1170" svg:d="M150 142l309 269v350l-309 265-44-40v-801zM147 0l-147 139v893l147 138 416-360v-448z">
          <text:p/>
        </draw:path>
        <draw:path draw:style-name="gr2" draw:text-style-name="P2" draw:layer="layout" svg:width="0.562cm" svg:height="1.167cm" svg:x="1.146cm" svg:y="18.913cm" svg:viewBox="0 0 563 1168" svg:d="M150 142l309 267v352l-309 266-44-43v-801zM147 0l-147 137v893l147 138 416-360v-446z">
          <text:p/>
        </draw:path>
        <draw:path draw:style-name="gr2" draw:text-style-name="P2" draw:layer="layout" svg:width="0.563cm" svg:height="1.169cm" svg:x="7.813cm" svg:y="4.932cm" svg:viewBox="0 0 564 1170" svg:d="M150 142l309 269v350l-309 265-43-40v-803zM147 0l-147 139v892l147 139 417-361v-447z">
          <text:p/>
        </draw:path>
        <draw:path draw:style-name="gr2" draw:text-style-name="P2" draw:layer="layout" svg:width="0.561cm" svg:height="1.169cm" svg:x="14.416cm" svg:y="4.932cm" svg:viewBox="0 0 562 1170" svg:d="M148 142l309 269v350l-309 265-43-40v-803zM146 0l-146 139v892l146 139 416-361v-447z">
          <text:p/>
        </draw:path>
        <draw:path draw:style-name="gr2" draw:text-style-name="P2" draw:layer="layout" svg:width="0.561cm" svg:height="1.167cm" svg:x="14.416cm" svg:y="10.921cm" svg:viewBox="0 0 562 1168" svg:d="M148 142l309 267v352l-309 265-43-41v-799zM146 0l-146 137v894l146 137 416-359v-447z">
          <text:p/>
        </draw:path>
        <draw:path draw:style-name="gr2" draw:text-style-name="P2" draw:layer="layout" svg:width="0.561cm" svg:height="1.168cm" svg:x="14.416cm" svg:y="16.911cm" svg:viewBox="0 0 562 1169" svg:d="M148 143l309 265v352l-309 265-43-40v-800zM146 0l-146 139v890l146 140 416-360v-448z">
          <text:p/>
        </draw:path>
        <draw:path draw:style-name="gr2" draw:text-style-name="P2" draw:layer="layout" svg:width="0.561cm" svg:height="1.169cm" svg:x="14.416cm" svg:y="21.875cm" svg:viewBox="0 0 562 1170" svg:d="M148 142l309 266v351l-309 267-43-40v-801zM146 0l-146 139v893l146 138 416-362v-447z">
          <text:p/>
        </draw:path>
        <draw:path draw:style-name="gr2" draw:text-style-name="P2" draw:layer="layout" svg:width="0.563cm" svg:height="1.169cm" svg:x="7.813cm" svg:y="12.89cm" svg:viewBox="0 0 564 1170" svg:d="M150 142l309 267v352l-309 265-43-41v-800zM147 0l-147 139v892l147 139 417-361v-448z">
          <text:p/>
        </draw:path>
        <draw:path draw:style-name="gr2" draw:text-style-name="P2" draw:layer="layout" svg:width="0.563cm" svg:height="1.169cm" svg:x="7.813cm" svg:y="20.882cm" svg:viewBox="0 0 564 1170" svg:d="M150 144l309 264v353l-309 267-43-42v-801zM147 0l-147 139v893l147 138 417-360v-449z">
          <text:p/>
        </draw:path>
        <draw:polygon draw:style-name="gr1" draw:text-style-name="P1" draw:layer="layout" svg:width="0.456cm" svg:height="1.025cm" svg:x="1.2cm" svg:y="5.004cm" svg:viewBox="0 0 457 1026" draw:points="0,937 0,90 95,0 457,312 457,714 95,1026">
          <text:p/>
        </draw:polygon>
        <draw:path draw:style-name="gr2" draw:text-style-name="P2" draw:layer="layout" svg:width="0.562cm" svg:height="1.169cm" svg:x="1.146cm" svg:y="4.932cm" svg:viewBox="0 0 563 1170" svg:d="M150 142l309 269v350l-309 265-44-40v-803zM147 0l-147 139v892l147 139 416-361v-447z">
          <text:p/>
        </draw:path>
        <draw:path draw:style-name="gr1" draw:text-style-name="P1" draw:layer="layout" svg:width="6.706cm" svg:height="1.51cm" svg:x="1.939cm" svg:y="0.66cm" svg:viewBox="0 0 6707 1511" svg:d="M0 1390v-431h268c0 0 133 62 339-230h447l179-124c0 0 152-219 293-219s695-254 695-254l600-132 711 209 380 153c0 0 577 214 497 563 0 0 69-291-497-488 0 0 306 225 243 356 0 0 331 227 381 412 0 0 736 219 1028-280 0 0-104 236-203 280 0 0 687 411 1346-280 0 0-474 415-443 586l-1881-58c0 0 20-828-1152-901-1172-72-1299 515-1204 737z">
          <text:p/>
        </draw:path>
        <draw:path draw:style-name="gr1" draw:text-style-name="P1" draw:layer="layout" svg:width="1.063cm" svg:height="0.49cm" svg:x="5.169cm" svg:y="1.622cm" svg:viewBox="0 0 1064 491" svg:d="M112 378c0 0 214-792 952 113 0 0-516-1006-1064-139z">
          <text:p/>
        </draw:path>
        <draw:path draw:style-name="gr4" draw:text-style-name="P4" draw:layer="layout" svg:width="7.723cm" svg:height="2.143cm" svg:x="1.536cm" svg:y="0.661cm" svg:viewBox="0 0 7724 2144" svg:d="M5123 1583c29 122 44 254 41 398 0 0 23-170-41-398zM1658 1037l-6 10-11 6 11 7 6 10 6-10 10-7-10-6zM951 1511l-11 20-20 11 20 10 12 20 9-20 20-12-20-9zM1725 960l-14 28-29 15 29 15 15 28 16-29 26-16-28-13zM1619 1072l-6 12-9 6 9 5 6 10 6-10 11-6-11-5zM758 1520l-9 19-17 10 18 9 9 19 10-19 18-10-18-9zM825 1554l-7 14-14 7 14 6 7 14 6-14 14-7-14-8zM813 1606l-5 9-9 6 9 5 5 9 6-9 11-5-11-6zM5957 1433c1 11 9 18 20 18 10 0 18-9 18-20 0-9-9-18-20-18-9 0-18 9-18 20zM6157 1269c8 0 17-9 15-18 0-8-7-15-15-14-9 0-17 6-17 15 0 10 8 17 17 17zM6039 1347c17 0 32-15 31-32 0-18-14-32-32-32-17 0-31 15-31 32 0 18 14 32 32 32zM7075 744c9 0 17-6 17-15s-8-17-17-17-15 8-15 17 8 15 15 15zM6950 876c18 0 35-17 35-37-2-18-17-35-37-35-20 2-35 17-35 37s17 35 37 35zM6826 991c0 9 6 15 15 15s17-8 17-17-8-15-17-15-15 8-15 17zM6850 939l11-20 17-11-18-9-11-18-9 18-19 11 19 9zM6942 998l11-21 21-11-21-12-12-20-11 20-22 12 22 11zM7704 428l-12-23-11 23-21 12 21 11 11 19 12-21 20-11zM7539 489l-20 37-35 19 37 19 19 35 19-35 35-20-35-20zM7617 590l-6 11-11 7 11 5 7 12 7-12 12-6-12-6zM7540 628l-12 26-24 14 24 12 14 25 14-25 24-15-26-12zM6407 1415c-224-28-522-51-729-2-50 23-136 77-93 141 41 61 595-3 822-139zM7409 376c0 0 81 272 38 465 0 0 5-179-66-133-70 46-356 301-134 427 0 0-496 15-530 330 0 0-113-23-271-44-20 13-46 29-76 44-294 139-1042 300-826-3-100 55-144 145-91 288 0 0-173-300 277-392 0 0-104-43-47-83 0 0 419 152 797 78 38-49 32-105-50-166 0 0 127 67 85 160 103-24 202-67 288-134 0 0-135 41-199 55 0 0 121-46 271-153l-9-19-49-26 47-27 26-49 28 49 30 15c173-139 366-358 461-682zM4760 1525c-1 1-1 3-1 3 0 0 0-2 1-3zM4760 1525zM4759 1528c-3 6-8 14-11 21 0 0 6-7 11-21zM2428 1359l-10 22-22 12 23 11 11 20 12-20 20-12-21-11zM2335 1257l-12 20-18 9 18 11 13 18 10-18 18-11-18-11zM2227 1298l-17 31-29 17 29 15 17 29 17-29 29-17-31-17zM4953 977l12-23 23-12-23-14-14-23-12 25-23 12 23 12zM5892 1110l-7 14-14 8 14 7 9 14 6-14 14-7-14-8zM5661 1058l19-37 35-20-35-18-20-37-20 37-35 20 37 18zM5473 1161l9-19 19-9-19-9-9-19-9 19-18 9 18 11zM5363 1130l11 6 7 11 7-11 12-6-12-8-8-10-6 12zM5340 1084l14-26 26-15-28-14-15-28-14 28-26 14 28 15zM5227 1151l20-35 35-21-37-19-20-35-18 35-35 22 35 18zM4073 747l17-30 31-17-31-17-17-30-18 30-29 17 30 17zM3998 611l-12 22-21 12 21 12 14 23 12-23 21-12-23-12zM4555 726c-53-164-309-420-1345-515 0 0 269 26 609 138-3 6-3 12-3 18 0 26 20 48 46 48 21-1 38-17 43-36 213 79 445 189 650 347zM3971 470c0-4-5-7-8-7-5 0-8 3-8 9 0 3 3 6 8 6s8-3 8-8zM3931 440c0-6-5-11-11-11s-12 5-12 12 6 11 12 11 11-4 11-12zM3749 364c0-9-8-18-19-17-10 0-18 8-18 18 0 11 9 19 18 19 11 0 20-8 19-20zM3709 407c0-9-9-19-20-19-11 2-20 10-20 20 2 14 9 21 20 21s20-9 20-22zM3619 344c0-11-9-20-20-18-11 0-19 9-19 18 0 12 10 20 20 20 11 0 20-9 19-20zM3530 338l-17-9-9-17-9 18-17 8 17 9 9 17 9-17zM3443 359l-17-9-9-15-9 17-16 9 16 9 10 15 8-16zM3805 269c0 0-382-191-993-135 0 0-136 118-335 132 0 0-408 148-608 350 0 0 92-81 180-57 0 0 860-657 1756-290zM1912 810c38-38 280-277 280-277 0 0-268 201-441 225-78 11-226 0-406 23-110 55-276 135-284 112-3-14 12-35 30-57-160 49-327 135-482 286 0 0-85 54-64 66 20 12 42 25 42 25 0 0-108 70-77 116 29 44 286-147 286-147 0 0-116 124-208 190-95 64-92 165-75 226 0 0 35 142 210 104l-11-20-34-18 34-17 17-35 18 34 34 18-32 18-8 14c9-3 20-6 31-9 217-81 486-17 599 8 115 24 259-144 328-313 0 0 35 7 81-53 0 0-37 92-12 127 23 37 78 11 90-15l-26-51c0 0 86-44 139-153 55-107 2-220-39-265 0 0 41 39 56 60 0 0 23-193 127-278 0 0-188 117-219 131-29 12-24-37 16-75zM1711 1598c-205 225-395 136-395 136 192 172 395-136 395-136zM1636 646c0 10 6 16 16 16 7 0 15-8 15-16 0-9-8-15-17-15-8 0-14 8-14 15zM1742 556c0 14 10 23 24 23 11 0 22-11 22-23s-11-23-23-23c-14 0-23 11-23 23zM1789 602c0 9 6 15 16 15 7 0 15-6 15-15s-8-15-17-15c-8 0-14 6-14 15zM1861 532c-14 1-23 10-23 24 0 11 11 23 23 22 12 0 23-11 23-23 0-14-11-23-23-23zM1817 469l24 14 14 24 12-24 25-14-25-14-14-23-12 25zM5138 1353c-9-7-52-27-115-58 43 89 77 185 100 288-26-92-66-196-129-302-113-53-275-137-430-246 175 135 446 364 420 453 0 0-14-35-40-23-22 11-95 101-182 52 0 3-2 6-2 8 0-2 0-5 2-8-11-6-22-12-32-23 0 0 13 8 33 14 14-64-6-196-292-341 0 0-96-11-101 65 0 0-306-156-323-39-18 116 150 159 150 159l-321 11c0 0-28-161 78-297 0 0-5 70 59 50 65-21 204-165 164-254 0 0 143 49 221 120 73 64 428 313 367 526 41 12 102 15 116-69 17-104-254-349-390-459-5-3-8-6-11-9-7-5-14-9-18-14 1 2 4 3 7 6-87-70-165-150-226-240 0 0 278 274 646 407-80-99-182-197-312-286-5 9-11 20-19 29 0 0 5-14 8-37-291-196-719-353-1353-405 0 0-563-13-532 269 0 0-11 78 110 113 0 0-127-4-202-24 0 0 15-35-18-37-34 0-497 298-474 514 0 0 116 0 223-217 0 0-52 156-82 228 0 0-149 52-181 177-32 126-66 178-66 178 0 0-540 453-1011 509 0 0-208 26-355-70l84-3c0 0-326-52-465-254-138-202-285-638-234-915 0 0 32 251 127 390 0 0 90-808 771-1271 0 0-184 222-181 314 0 0-73-19-159 151-86 165-78 456 153 428 231-29 285-271 248-401 0 0 40 103 135 74 93-31 182-110 182-110 0 0-54 206 304 117l-102-12c0 0 520-397 820-518 0 0-254 144-418 281 0 0 817-483 1637-301 23 6 44 11 67 17h-3c0 0 8 1 20 4 20 7 43 11 63 17 139 37 416 100 557 69 0 0-121 43-106 84 17 43 268 132 268 132 0 0-73 21-6 91 113 106 180 210 197 294 136 110 262 242 360 398 300 96 650 87 958-233 0 0-155 207-143 251 13 43 118 49 118 49l31 63c0 0-256-132-496 23 0 0 17 47 151 21 0 0-19 14-105 28-84 15-156 26-54 128 0 0-111-21-298-84 0 0 72-3 32-40zM4424 930c7 4 21 13 38 27-25-17-38-27-38-27z">
          <text:p/>
        </draw:path>
        <draw:path draw:style-name="gr4" draw:text-style-name="P4" draw:layer="layout" svg:width="0.722cm" svg:height="0.349cm" svg:x="1.953cm" svg:y="1.599cm" svg:viewBox="0 0 723 350" svg:d="M402 0c0 0-231 164-168 221 64 56 164-51 164-51 0 0-31 78 0 87 30 11 140-110 325-56 0 0-168 6-130 111l-593 38 6-155c0 0 231-189 396-195z">
          <text:p/>
        </draw:path>
        <draw:path draw:style-name="gr4" draw:text-style-name="P4" draw:layer="layout" svg:width="0.319cm" svg:height="0.209cm" svg:x="3.184cm" svg:y="1.679cm" svg:viewBox="0 0 320 210" svg:d="M0 201c0 0 129 3 180-92 0 0 13 40 52 28 40-12 89-76 65-137 0 0 46 70 9 143 0 0-58 31-55 67z">
          <text:p/>
        </draw:path>
        <draw:path draw:style-name="gr1" draw:text-style-name="P1" draw:layer="layout" svg:width="0.049cm" svg:height="0.179cm" svg:x="2.169cm" svg:y="1.627cm" svg:viewBox="0 0 50 180" svg:d="M10 180c0 0-36-69 28-180 0 0-40 105 12 128z">
          <text:p/>
        </draw:path>
        <draw:polygon draw:style-name="gr1" draw:text-style-name="P1" draw:layer="layout" svg:width="0.167cm" svg:height="0.121cm" svg:x="2.881cm" svg:y="1.333cm" svg:viewBox="0 0 168 122" draw:points="0,108 168,0 25,122">
          <text:p/>
        </draw:polygon>
        <draw:path draw:style-name="gr8" draw:text-style-name="P1" draw:layer="layout" svg:width="0.075cm" svg:height="2.586cm" svg:x="9.15cm" svg:y="1.373cm" svg:viewBox="0 0 76 2587" svg:d="M0 0v2587c37-92 76-128 76-128v-2334c0 0-39-36-76-125z">
          <text:p/>
        </draw:path>
        <draw:polygon draw:style-name="gr5" draw:text-style-name="P1" draw:layer="layout" svg:width="1.255cm" svg:height="1.487cm" svg:x="1.102cm" svg:y="2.129cm" svg:viewBox="0 0 1256 1488" draw:points="0,166 0,1488 1256,1324 1256,0">
          <text:p/>
        </draw:polygon>
        <draw:line draw:style-name="gr6" draw:text-style-name="P5" draw:layer="layout" svg:x1="1.131cm" svg:y1="3.519cm" svg:x2="2.358cm" svg:y2="3.345cm">
          <text:p/>
        </draw:line>
        <draw:line draw:style-name="gr6" draw:text-style-name="P5" draw:layer="layout" svg:x1="1.131cm" svg:y1="2.382cm" svg:x2="2.358cm" svg:y2="2.225cm">
          <text:p/>
        </draw:line>
        <draw:polygon draw:style-name="gr7" draw:text-style-name="P6" draw:layer="layout" svg:width="0.857cm" svg:height="1.449cm" svg:x="1.5cm" svg:y="2.003cm" svg:viewBox="0 0 858 1450" draw:points="858,126 0,0 0,1325 858,1450">
          <text:p/>
        </draw:polygon>
        <draw:path draw:style-name="gr5" draw:text-style-name="P1" draw:layer="layout" svg:width="7.728cm" svg:height="1.553cm" svg:x="1.5cm" svg:y="1.894cm" svg:viewBox="0 0 7729 1554" svg:d="M7729 1440c-2177 396-5549-398-7729 0v-1325c2180-398 5552 398 7729 0z">
          <text:p/>
        </draw:path>
        <draw:path draw:style-name="gr6" draw:text-style-name="P5" draw:layer="layout" svg:width="7.744cm" svg:height="0.226cm" svg:x="1.515cm" svg:y="3.112cm" svg:viewBox="0 0 7745 227" svg:d="M7745 87c0 0-722 308-4044 11-2348-208-3520-25-3701 8">
          <text:p/>
        </draw:path>
        <draw:path draw:style-name="gr6" draw:text-style-name="P5" draw:layer="layout" svg:width="7.722cm" svg:height="0.231cm" svg:x="1.506cm" svg:y="1.998cm" svg:viewBox="0 0 7723 232" svg:d="M7723 110c0 0-700 283-4022-12-2348-209-3519-24-3701 6">
          <text:p/>
        </draw:path>
        <draw:path draw:style-name="gr116" draw:text-style-name="P5" draw:layer="layout" svg:width="0.669cm" svg:height="1.437cm" svg:x="20.288cm" svg:y="1.965cm" svg:viewBox="0 0 670 1438" svg:d="M0 90v1348c517-3 583 0 670-114v-1324c-164 87-334 90-670 90z">
          <text:p/>
        </draw:path>
        <draw:path draw:style-name="gr6" draw:text-style-name="P5" draw:layer="layout" svg:width="0.676cm" svg:height="0.081cm" svg:x="20.267cm" svg:y="2.075cm" svg:viewBox="0 0 677 82" svg:d="M0 82c573-3 625-44 677-82">
          <text:p/>
        </draw:path>
        <draw:path draw:style-name="gr6" draw:text-style-name="P5" draw:layer="layout" svg:width="0.664cm" svg:height="0.151cm" svg:x="20.288cm" svg:y="3.16cm" svg:viewBox="0 0 665 152" svg:d="M0 134c693 78 635-128 665-134">
          <text:p/>
        </draw:path>
        <draw:polygon draw:style-name="gr135" draw:text-style-name="P27" draw:layer="layout" svg:width="11.075cm" svg:height="2.139cm" svg:x="9.224cm" svg:y="1.596cm" svg:viewBox="0 0 11076 2140" draw:points="11076,2140 0,2140 0,0 11076,0">
          <text:p/>
        </draw:polygon>
        <draw:path draw:style-name="gr9" draw:text-style-name="P5" draw:layer="layout" svg:width="1.798cm" svg:height="0.364cm" svg:x="9.224cm" svg:y="1.509cm" svg:viewBox="0 0 1799 365" svg:d="M0 365c0 0 38-365 297-365h778c0 0 252 87 724 87">
          <text:p/>
        </draw:path>
        <draw:path draw:style-name="gr9" draw:text-style-name="P5" draw:layer="layout" svg:width="1.798cm" svg:height="0.364cm" svg:x="9.224cm" svg:y="3.457cm" svg:viewBox="0 0 1799 365" svg:d="M0 0c0 0 38 365 297 365h778c0 0 252-86 724-86">
          <text:p/>
        </draw:path>
        <draw:path draw:style-name="gr9" draw:text-style-name="P5" draw:layer="layout" svg:width="1.797cm" svg:height="0.364cm" svg:x="18.502cm" svg:y="1.509cm" svg:viewBox="0 0 1798 365" svg:d="M1798 365c0 0-37-365-297-365h-776c0 0-252 87-725 87">
          <text:p/>
        </draw:path>
        <draw:path draw:style-name="gr9" draw:text-style-name="P5" draw:layer="layout" svg:width="1.797cm" svg:height="0.364cm" svg:x="18.502cm" svg:y="3.457cm" svg:viewBox="0 0 1798 365" svg:d="M1798 0c0 0-37 365-297 365h-776c0 0-252-86-725-86">
          <text:p/>
        </draw:path>
        <draw:path draw:style-name="gr6" draw:text-style-name="P5" draw:layer="layout" svg:width="9.528cm" svg:height="0.068cm" svg:x="9.998cm" svg:y="1.596cm" svg:viewBox="0 0 9529 69" svg:d="M9529 0c-182 32-404 69-606 69h-8317c-202 0-424-37-606-69">
          <text:p/>
        </draw:path>
        <draw:path draw:style-name="gr6" draw:text-style-name="P5" draw:layer="layout" svg:width="9.528cm" svg:height="0.067cm" svg:x="9.998cm" svg:y="3.668cm" svg:viewBox="0 0 9529 68" svg:d="M0 68c182-33 404-68 606-68h8317c202 0 424 35 606 68">
          <text:p/>
        </draw:path>
        <draw:path draw:style-name="gr8" draw:text-style-name="P1" draw:layer="layout" svg:width="0.075cm" svg:height="2.586cm" svg:x="20.299cm" svg:y="1.373cm" svg:viewBox="0 0 76 2587" svg:d="M76 0v2587c-38-92-76-128-76-128v-2334c0 0 38-36 76-125z">
          <text:p/>
        </draw:path>
        <draw:polygon draw:style-name="gr5" draw:text-style-name="P1" draw:layer="layout" svg:width="2.62cm" svg:height="1.149cm" svg:x="9.845cm" svg:y="1.832cm" svg:viewBox="0 0 2621 1150" draw:points="2397,0 223,0 0,281 0,867 223,1150 2397,1150 2621,867 2621,281">
          <text:p/>
        </draw:polygon>
        <draw:line draw:style-name="gr117" draw:text-style-name="P5" draw:layer="layout" svg:x1="9.912cm" svg:y1="2.029cm" svg:x2="9.912cm" svg:y2="2.796cm">
          <text:p/>
        </draw:line>
        <draw:line draw:style-name="gr117" draw:text-style-name="P5" draw:layer="layout" svg:x1="9.912cm" svg:y1="2.687cm" svg:x2="10.152cm" svg:y2="2.982cm">
          <text:p/>
        </draw:line>
        <draw:line draw:style-name="gr117" draw:text-style-name="P5" draw:layer="layout" svg:x1="10.152cm" svg:y1="1.832cm" svg:x2="9.912cm" svg:y2="2.127cm">
          <text:p/>
        </draw:line>
        <draw:path draw:style-name="gr4" draw:text-style-name="P4" draw:layer="layout" svg:width="0.067cm" svg:height="0.068cm" svg:x="9.879cm" svg:y="2.373cm" svg:viewBox="0 0 68 69" svg:d="M0 34c0 21 16 35 36 35 17 0 32-14 32-35 0-18-15-34-32-34-20 0-36 16-36 34z">
          <text:p/>
        </draw:path>
        <draw:path draw:style-name="gr4" draw:text-style-name="P4" draw:layer="layout" svg:width="0.069cm" svg:height="0.068cm" svg:x="12.362cm" svg:y="2.373cm" svg:viewBox="0 0 70 69" svg:d="M70 34c0 21-17 35-36 35s-34-14-34-35c0-18 15-34 34-34s36 16 36 34z">
          <text:p/>
        </draw:path>
        <draw:line draw:style-name="gr117" draw:text-style-name="P5" draw:layer="layout" svg:x1="12.396cm" svg:y1="2.029cm" svg:x2="12.396cm" svg:y2="2.796cm">
          <text:p/>
        </draw:line>
        <draw:line draw:style-name="gr117" draw:text-style-name="P5" draw:layer="layout" svg:x1="12.397cm" svg:y1="2.687cm" svg:x2="12.159cm" svg:y2="2.982cm">
          <text:p/>
        </draw:line>
        <draw:line draw:style-name="gr117" draw:text-style-name="P5" draw:layer="layout" svg:x1="12.159cm" svg:y1="1.832cm" svg:x2="12.397cm" svg:y2="2.127cm">
          <text:p/>
        </draw:line>
        <draw:polygon draw:style-name="gr5" draw:text-style-name="P1" draw:layer="layout" svg:width="2.618cm" svg:height="1.149cm" svg:x="13.398cm" svg:y="1.832cm" svg:viewBox="0 0 2619 1150" draw:points="2397,0 223,0 0,281 0,867 223,1150 2397,1150 2619,867 2619,281">
          <text:p/>
        </draw:polygon>
        <draw:line draw:style-name="gr117" draw:text-style-name="P5" draw:layer="layout" svg:x1="13.465cm" svg:y1="2.029cm" svg:x2="13.465cm" svg:y2="2.796cm">
          <text:p/>
        </draw:line>
        <draw:line draw:style-name="gr117" draw:text-style-name="P5" draw:layer="layout" svg:x1="13.465cm" svg:y1="2.687cm" svg:x2="13.705cm" svg:y2="2.982cm">
          <text:p/>
        </draw:line>
        <draw:line draw:style-name="gr117" draw:text-style-name="P5" draw:layer="layout" svg:x1="13.705cm" svg:y1="1.832cm" svg:x2="13.465cm" svg:y2="2.127cm">
          <text:p/>
        </draw:line>
        <draw:path draw:style-name="gr4" draw:text-style-name="P4" draw:layer="layout" svg:width="0.067cm" svg:height="0.068cm" svg:x="13.432cm" svg:y="2.373cm" svg:viewBox="0 0 68 69" svg:d="M0 34c0 21 16 35 36 35 18 0 32-14 32-35 0-18-14-34-32-34-20 0-36 16-36 34z">
          <text:p/>
        </draw:path>
        <draw:path draw:style-name="gr4" draw:text-style-name="P4" draw:layer="layout" svg:width="0.069cm" svg:height="0.068cm" svg:x="15.915cm" svg:y="2.373cm" svg:viewBox="0 0 70 69" svg:d="M70 34c0 21-17 35-35 35-20 0-35-14-35-35 0-18 15-34 35-34 18 0 35 16 35 34z">
          <text:p/>
        </draw:path>
        <draw:line draw:style-name="gr117" draw:text-style-name="P5" draw:layer="layout" svg:x1="15.95cm" svg:y1="2.029cm" svg:x2="15.95cm" svg:y2="2.796cm">
          <text:p/>
        </draw:line>
        <draw:line draw:style-name="gr117" draw:text-style-name="P5" draw:layer="layout" svg:x1="15.951cm" svg:y1="2.687cm" svg:x2="15.712cm" svg:y2="2.982cm">
          <text:p/>
        </draw:line>
        <draw:line draw:style-name="gr117" draw:text-style-name="P5" draw:layer="layout" svg:x1="15.712cm" svg:y1="1.832cm" svg:x2="15.951cm" svg:y2="2.127cm">
          <text:p/>
        </draw:line>
        <draw:polygon draw:style-name="gr5" draw:text-style-name="P1" draw:layer="layout" svg:width="2.619cm" svg:height="1.149cm" svg:x="17.06cm" svg:y="1.832cm" svg:viewBox="0 0 2620 1150" draw:points="2394,0 223,0 0,281 0,867 223,1150 2394,1150 2620,867 2620,281">
          <text:p/>
        </draw:polygon>
        <draw:line draw:style-name="gr117" draw:text-style-name="P5" draw:layer="layout" svg:x1="17.127cm" svg:y1="2.029cm" svg:x2="17.127cm" svg:y2="2.796cm">
          <text:p/>
        </draw:line>
        <draw:line draw:style-name="gr117" draw:text-style-name="P5" draw:layer="layout" svg:x1="17.127cm" svg:y1="2.687cm" svg:x2="17.365cm" svg:y2="2.982cm">
          <text:p/>
        </draw:line>
        <draw:line draw:style-name="gr117" draw:text-style-name="P5" draw:layer="layout" svg:x1="17.365cm" svg:y1="1.832cm" svg:x2="17.127cm" svg:y2="2.127cm">
          <text:p/>
        </draw:line>
        <draw:path draw:style-name="gr4" draw:text-style-name="P4" draw:layer="layout" svg:width="0.069cm" svg:height="0.068cm" svg:x="17.093cm" svg:y="2.373cm" svg:viewBox="0 0 70 69" svg:d="M0 34c0 21 17 35 36 35s34-14 34-35c0-18-15-34-34-34s-36 16-36 34z">
          <text:p/>
        </draw:path>
        <draw:path draw:style-name="gr4" draw:text-style-name="P4" draw:layer="layout" svg:width="0.067cm" svg:height="0.068cm" svg:x="19.577cm" svg:y="2.373cm" svg:viewBox="0 0 68 69" svg:d="M68 34c0 21-14 35-32 35-21 0-36-14-36-35 0-18 15-34 36-34 18 0 32 16 32 34z">
          <text:p/>
        </draw:path>
        <draw:line draw:style-name="gr117" draw:text-style-name="P5" draw:layer="layout" svg:x1="19.612cm" svg:y1="2.029cm" svg:x2="19.612cm" svg:y2="2.796cm">
          <text:p/>
        </draw:line>
        <draw:line draw:style-name="gr117" draw:text-style-name="P5" draw:layer="layout" svg:x1="19.613cm" svg:y1="2.687cm" svg:x2="19.373cm" svg:y2="2.982cm">
          <text:p/>
        </draw:line>
        <draw:line draw:style-name="gr117" draw:text-style-name="P5" draw:layer="layout" svg:x1="19.373cm" svg:y1="1.832cm" svg:x2="19.613cm" svg:y2="2.127cm">
          <text:p/>
        </draw:line>
        <draw:line draw:style-name="gr136" draw:text-style-name="P5" draw:layer="layout" svg:x1="7.175cm" svg:y1="6.509cm" svg:x2="1.128cm" svg:y2="6.509cm">
          <text:p/>
        </draw:line>
        <draw:line draw:style-name="gr136" draw:text-style-name="P5" draw:layer="layout" svg:x1="7.175cm" svg:y1="7.004cm" svg:x2="1.128cm" svg:y2="7.004cm">
          <text:p/>
        </draw:line>
        <draw:line draw:style-name="gr136" draw:text-style-name="P5" draw:layer="layout" svg:x1="7.175cm" svg:y1="7.498cm" svg:x2="1.128cm" svg:y2="7.498cm">
          <text:p/>
        </draw:line>
        <draw:line draw:style-name="gr136" draw:text-style-name="P5" draw:layer="layout" svg:x1="7.175cm" svg:y1="7.992cm" svg:x2="1.128cm" svg:y2="7.992cm">
          <text:p/>
        </draw:line>
        <draw:line draw:style-name="gr136" draw:text-style-name="P5" draw:layer="layout" svg:x1="7.175cm" svg:y1="8.485cm" svg:x2="1.128cm" svg:y2="8.485cm">
          <text:p/>
        </draw:line>
        <draw:line draw:style-name="gr136" draw:text-style-name="P5" draw:layer="layout" svg:x1="7.175cm" svg:y1="8.979cm" svg:x2="1.128cm" svg:y2="8.979cm">
          <text:p/>
        </draw:line>
        <draw:line draw:style-name="gr136" draw:text-style-name="P5" draw:layer="layout" svg:x1="7.175cm" svg:y1="9.473cm" svg:x2="1.128cm" svg:y2="9.473cm">
          <text:p/>
        </draw:line>
        <draw:line draw:style-name="gr136" draw:text-style-name="P5" draw:layer="layout" svg:x1="7.175cm" svg:y1="9.966cm" svg:x2="1.128cm" svg:y2="9.966cm">
          <text:p/>
        </draw:line>
        <draw:path draw:style-name="gr1" draw:text-style-name="P1" draw:layer="layout" svg:width="0.211cm" svg:height="0.21cm" svg:x="1.142cm" svg:y="12.327cm" svg:viewBox="0 0 212 211" svg:d="M106 211c58 0 106-47 106-107 0-58-48-104-106-104s-106 46-106 104c0 60 48 107 106 107z">
          <text:p/>
        </draw:path>
        <draw:path draw:style-name="gr4" draw:text-style-name="P4" draw:layer="layout" svg:width="0.237cm" svg:height="0.236cm" svg:x="1.128cm" svg:y="12.313cm" svg:viewBox="0 0 238 237" svg:d="M118 237c-64 0-118-54-118-118 0-65 54-119 118-119 68 0 120 54 120 119 0 64-52 118-120 118zM118 26c-51 0-92 41-92 93s41 93 92 93c53 0 94-41 94-93s-41-93-94-93z">
          <text:p/>
        </draw:path>
        <draw:line draw:style-name="gr136" draw:text-style-name="P5" draw:layer="layout" svg:x1="1.425cm" svg:y1="12.544cm" svg:x2="7.177cm" svg:y2="12.544cm">
          <text:p/>
        </draw:line>
        <draw:path draw:style-name="gr1" draw:text-style-name="P1" draw:layer="layout" svg:width="0.211cm" svg:height="0.21cm" svg:x="1.142cm" svg:y="12.821cm" svg:viewBox="0 0 212 211" svg:d="M106 211c58 0 106-48 106-104 0-59-48-107-106-107s-106 48-106 107c0 56 48 104 106 104z">
          <text:p/>
        </draw:path>
        <draw:path draw:style-name="gr4" draw:text-style-name="P4" draw:layer="layout" svg:width="0.237cm" svg:height="0.236cm" svg:x="1.128cm" svg:y="12.807cm" svg:viewBox="0 0 238 237" svg:d="M118 237c-64 0-118-52-118-118 0-65 54-119 118-119 68 0 120 54 120 119 0 66-52 118-120 118zM118 25c-51 0-92 44-92 94 0 51 41 94 92 94 53 0 94-43 94-94 0-50-41-94-94-94z">
          <text:p/>
        </draw:path>
        <draw:line draw:style-name="gr136" draw:text-style-name="P5" draw:layer="layout" svg:x1="1.425cm" svg:y1="13.038cm" svg:x2="7.177cm" svg:y2="13.038cm">
          <text:p/>
        </draw:line>
        <draw:path draw:style-name="gr1" draw:text-style-name="P1" draw:layer="layout" svg:width="0.211cm" svg:height="0.211cm" svg:x="1.142cm" svg:y="13.314cm" svg:viewBox="0 0 212 212" svg:d="M106 212c58 0 106-49 106-107 0-57-48-105-106-105s-106 48-106 105c0 58 48 107 106 107z">
          <text:p/>
        </draw:path>
        <draw:path draw:style-name="gr4" draw:text-style-name="P4" draw:layer="layout" svg:width="0.237cm" svg:height="0.235cm" svg:x="1.128cm" svg:y="13.302cm" svg:viewBox="0 0 238 236" svg:d="M118 236c-64 0-118-53-118-120 0-63 54-116 118-116 68 0 120 53 120 116 0 67-52 120-120 120zM118 24c-51 0-92 43-92 92 0 52 41 96 92 96 53 0 94-44 94-96 0-49-41-92-94-92z">
          <text:p/>
        </draw:path>
        <draw:frame draw:style-name="gr20" draw:text-style-name="P8" draw:layer="layout" svg:width="0.246cm" svg:height="0.289cm" svg:x="1.365cm" svg:y="12.319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.425cm" svg:y1="13.531cm" svg:x2="7.177cm" svg:y2="13.531cm">
          <text:p/>
        </draw:line>
        <draw:path draw:style-name="gr1" draw:text-style-name="P1" draw:layer="layout" svg:width="0.211cm" svg:height="0.211cm" svg:x="1.142cm" svg:y="13.808cm" svg:viewBox="0 0 212 212" svg:d="M106 212c58 0 106-47 106-106 0-60-48-106-106-106s-106 46-106 106c0 59 48 106 106 106z">
          <text:p/>
        </draw:path>
        <draw:path draw:style-name="gr4" draw:text-style-name="P4" draw:layer="layout" svg:width="0.237cm" svg:height="0.235cm" svg:x="1.128cm" svg:y="13.796cm" svg:viewBox="0 0 238 236" svg:d="M118 236c-64 0-118-54-118-120 0-64 54-116 118-116 68 0 120 52 120 116 0 66-52 120-120 120zM118 24c-51 0-92 42-92 92 0 52 41 96 92 96 53 0 94-44 94-96 0-50-41-92-94-92z">
          <text:p/>
        </draw:path>
        <draw:frame draw:style-name="gr20" draw:text-style-name="P8" draw:layer="layout" svg:width="0.246cm" svg:height="0.289cm" svg:x="1.365cm" svg:y="12.813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.425cm" svg:y1="14.025cm" svg:x2="7.177cm" svg:y2="14.025cm">
          <text:p/>
        </draw:line>
        <draw:path draw:style-name="gr1" draw:text-style-name="P1" draw:layer="layout" svg:width="0.211cm" svg:height="0.211cm" svg:x="1.142cm" svg:y="14.301cm" svg:viewBox="0 0 212 212" svg:d="M106 212c58 0 106-46 106-104 0-59-48-108-106-108s-106 49-106 108c0 58 48 104 106 104z">
          <text:p/>
        </draw:path>
        <draw:path draw:style-name="gr4" draw:text-style-name="P4" draw:layer="layout" svg:width="0.237cm" svg:height="0.236cm" svg:x="1.128cm" svg:y="14.29cm" svg:viewBox="0 0 238 237" svg:d="M118 237c-64 0-118-55-118-119 0-66 54-118 118-118 68 0 120 52 120 118 0 64-52 119-120 119zM118 25c-51 0-92 41-92 93 0 50 41 92 92 92 53 0 94-42 94-92 0-52-41-93-94-93z">
          <text:p/>
        </draw:path>
        <draw:frame draw:style-name="gr20" draw:text-style-name="P8" draw:layer="layout" svg:width="0.246cm" svg:height="0.289cm" svg:x="1.365cm" svg:y="13.307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.425cm" svg:y1="14.52cm" svg:x2="7.177cm" svg:y2="14.52cm">
          <text:p/>
        </draw:line>
        <draw:path draw:style-name="gr1" draw:text-style-name="P1" draw:layer="layout" svg:width="0.211cm" svg:height="0.211cm" svg:x="1.142cm" svg:y="14.795cm" svg:viewBox="0 0 212 212" svg:d="M106 212c58 0 106-46 106-105s-48-107-106-107-106 48-106 107 48 105 106 105z">
          <text:p/>
        </draw:path>
        <draw:path draw:style-name="gr4" draw:text-style-name="P4" draw:layer="layout" svg:width="0.237cm" svg:height="0.237cm" svg:x="1.128cm" svg:y="14.783cm" svg:viewBox="0 0 238 238" svg:d="M118 238c-64 0-118-55-118-119 0-67 54-119 118-119 68 0 120 52 120 119 0 64-52 119-120 119zM118 26c-51 0-92 41-92 93 0 51 41 93 92 93 53 0 94-42 94-93 0-52-41-93-94-93z">
          <text:p/>
        </draw:path>
        <draw:frame draw:style-name="gr20" draw:text-style-name="P8" draw:layer="layout" svg:width="0.246cm" svg:height="0.289cm" svg:x="1.365cm" svg:y="13.801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.425cm" svg:y1="15.014cm" svg:x2="7.177cm" svg:y2="15.014cm">
          <text:p/>
        </draw:line>
        <draw:path draw:style-name="gr1" draw:text-style-name="P1" draw:layer="layout" svg:width="0.211cm" svg:height="0.211cm" svg:x="1.142cm" svg:y="15.289cm" svg:viewBox="0 0 212 212" svg:d="M106 212c58 0 106-47 106-106 0-58-48-106-106-106s-106 48-106 106c0 59 48 106 106 106z">
          <text:p/>
        </draw:path>
        <draw:path draw:style-name="gr4" draw:text-style-name="P4" draw:layer="layout" svg:width="0.237cm" svg:height="0.236cm" svg:x="1.128cm" svg:y="15.277cm" svg:viewBox="0 0 238 237" svg:d="M118 237c-64 0-118-52-118-118 0-65 54-119 118-119 68 0 120 54 120 119 0 66-52 118-120 118zM118 26c-51 0-92 41-92 93s41 93 92 93c53 0 94-41 94-93s-41-93-94-93z">
          <text:p/>
        </draw:path>
        <draw:frame draw:style-name="gr20" draw:text-style-name="P8" draw:layer="layout" svg:width="0.246cm" svg:height="0.289cm" svg:x="1.365cm" svg:y="14.295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.425cm" svg:y1="15.508cm" svg:x2="7.177cm" svg:y2="15.508cm">
          <text:p/>
        </draw:line>
        <draw:path draw:style-name="gr1" draw:text-style-name="P1" draw:layer="layout" svg:width="0.211cm" svg:height="0.212cm" svg:x="1.142cm" svg:y="15.783cm" svg:viewBox="0 0 212 213" svg:d="M106 213c58 0 106-48 106-107 0-58-48-106-106-106s-106 48-106 106c0 59 48 107 106 107z">
          <text:p/>
        </draw:path>
        <draw:path draw:style-name="gr4" draw:text-style-name="P4" draw:layer="layout" svg:width="0.237cm" svg:height="0.236cm" svg:x="1.128cm" svg:y="15.771cm" svg:viewBox="0 0 238 237" svg:d="M118 237c-64 0-118-52-118-119 0-64 54-118 118-118 68 0 120 54 120 118 0 67-52 119-120 119zM118 26c-51 0-92 42-92 92 0 53 41 93 92 93 53 0 94-40 94-93 0-50-41-92-94-92z">
          <text:p/>
        </draw:path>
        <draw:frame draw:style-name="gr20" draw:text-style-name="P8" draw:layer="layout" svg:width="0.246cm" svg:height="0.289cm" svg:x="1.365cm" svg:y="14.789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.425cm" svg:y1="16.002cm" svg:x2="7.177cm" svg:y2="16.002cm">
          <text:p/>
        </draw:line>
        <draw:path draw:style-name="gr1" draw:text-style-name="P1" draw:layer="layout" svg:width="0.211cm" svg:height="0.211cm" svg:x="1.142cm" svg:y="16.278cm" svg:viewBox="0 0 212 212" svg:d="M106 212c58 0 106-49 106-107s-48-105-106-105-106 47-106 105 48 107 106 107z">
          <text:p/>
        </draw:path>
        <draw:path draw:style-name="gr4" draw:text-style-name="P4" draw:layer="layout" svg:width="0.237cm" svg:height="0.237cm" svg:x="1.128cm" svg:y="16.264cm" svg:viewBox="0 0 238 238" svg:d="M118 238c-64 0-118-53-118-119s54-119 118-119c68 0 120 53 120 119s-52 119-120 119zM118 26c-51 0-92 41-92 93s41 93 92 93c53 0 94-41 94-93s-41-93-94-93z">
          <text:p/>
        </draw:path>
        <draw:frame draw:style-name="gr20" draw:text-style-name="P8" draw:layer="layout" svg:width="0.246cm" svg:height="0.289cm" svg:x="1.365cm" svg:y="15.283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.425cm" svg:y1="16.495cm" svg:x2="7.177cm" svg:y2="16.495cm">
          <text:p/>
        </draw:line>
        <draw:path draw:style-name="gr1" draw:text-style-name="P1" draw:layer="layout" svg:width="0.211cm" svg:height="0.21cm" svg:x="1.142cm" svg:y="16.772cm" svg:viewBox="0 0 212 211" svg:d="M106 211c58 0 106-46 106-106 0-59-48-105-106-105s-106 46-106 105c0 60 48 106 106 106z">
          <text:p/>
        </draw:path>
        <draw:path draw:style-name="gr4" draw:text-style-name="P4" draw:layer="layout" svg:width="0.237cm" svg:height="0.236cm" svg:x="1.128cm" svg:y="16.758cm" svg:viewBox="0 0 238 237" svg:d="M118 237c-64 0-118-54-118-118 0-65 54-119 118-119 68 0 120 54 120 119 0 64-52 118-120 118zM118 26c-51 0-92 41-92 93s41 93 92 93c53 0 94-41 94-93s-41-93-94-93z">
          <text:p/>
        </draw:path>
        <draw:frame draw:style-name="gr20" draw:text-style-name="P8" draw:layer="layout" svg:width="0.246cm" svg:height="0.289cm" svg:x="1.365cm" svg:y="15.777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.425cm" svg:y1="16.989cm" svg:x2="7.177cm" svg:y2="16.989cm">
          <text:p/>
        </draw:line>
        <draw:path draw:style-name="gr1" draw:text-style-name="P1" draw:layer="layout" svg:width="0.211cm" svg:height="0.21cm" svg:x="1.142cm" svg:y="17.266cm" svg:viewBox="0 0 212 211" svg:d="M106 211c58 0 106-49 106-106 0-59-48-105-106-105s-106 46-106 105c0 57 48 106 106 106z">
          <text:p/>
        </draw:path>
        <draw:path draw:style-name="gr4" draw:text-style-name="P4" draw:layer="layout" svg:width="0.237cm" svg:height="0.236cm" svg:x="1.128cm" svg:y="17.252cm" svg:viewBox="0 0 238 237" svg:d="M118 237c-64 0-118-52-118-118 0-65 54-119 118-119 68 0 120 54 120 119 0 66-52 118-120 118zM118 25c-51 0-92 43-92 94s41 94 92 94c53 0 94-43 94-94s-41-94-94-94z">
          <text:p/>
        </draw:path>
        <draw:frame draw:style-name="gr20" draw:text-style-name="P8" draw:layer="layout" svg:width="0.246cm" svg:height="0.289cm" svg:x="1.365cm" svg:y="16.27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.425cm" svg:y1="17.483cm" svg:x2="7.177cm" svg:y2="17.483cm">
          <text:p/>
        </draw:line>
        <draw:path draw:style-name="gr1" draw:text-style-name="P1" draw:layer="layout" svg:width="0.211cm" svg:height="0.211cm" svg:x="1.142cm" svg:y="17.759cm" svg:viewBox="0 0 212 212" svg:d="M106 212c58 0 106-48 106-108 0-57-48-104-106-104s-106 47-106 104c0 60 48 108 106 108z">
          <text:p/>
        </draw:path>
        <draw:path draw:style-name="gr4" draw:text-style-name="P4" draw:layer="layout" svg:width="0.237cm" svg:height="0.235cm" svg:x="1.128cm" svg:y="17.747cm" svg:viewBox="0 0 238 236" svg:d="M118 236c-64 0-118-53-118-120 0-63 54-116 118-116 68 0 120 53 120 116 0 67-52 120-120 120zM118 24c-51 0-92 43-92 92 0 52 41 95 92 95 53 0 94-43 94-95 0-49-41-92-94-92z">
          <text:p/>
        </draw:path>
        <draw:frame draw:style-name="gr20" draw:text-style-name="P8" draw:layer="layout" svg:width="0.246cm" svg:height="0.289cm" svg:x="1.365cm" svg:y="16.764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.425cm" svg:y1="17.976cm" svg:x2="7.177cm" svg:y2="17.976cm">
          <text:p/>
        </draw:line>
        <draw:path draw:style-name="gr1" draw:text-style-name="P1" draw:layer="layout" svg:width="0.211cm" svg:height="0.211cm" svg:x="1.142cm" svg:y="18.253cm" svg:viewBox="0 0 212 212" svg:d="M106 212c58 0 106-47 106-106 0-58-48-106-106-106s-106 48-106 106c0 59 48 106 106 106z">
          <text:p/>
        </draw:path>
        <draw:path draw:style-name="gr4" draw:text-style-name="P4" draw:layer="layout" svg:width="0.237cm" svg:height="0.235cm" svg:x="1.128cm" svg:y="18.241cm" svg:viewBox="0 0 238 236" svg:d="M118 236c-64 0-118-54-118-120 0-64 54-116 118-116 68 0 120 52 120 116 0 66-52 120-120 120zM118 24c-51 0-92 42-92 92 0 52 41 96 92 96 53 0 94-44 94-96 0-50-41-92-94-92z">
          <text:p/>
        </draw:path>
        <draw:frame draw:style-name="gr20" draw:text-style-name="P8" draw:layer="layout" svg:width="0.246cm" svg:height="0.289cm" svg:x="1.365cm" svg:y="17.258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.425cm" svg:y1="18.47cm" svg:x2="7.177cm" svg:y2="18.47cm">
          <text:p/>
        </draw:line>
        <draw:path draw:style-name="gr1" draw:text-style-name="P1" draw:layer="layout" svg:width="0.211cm" svg:height="0.21cm" svg:x="1.142cm" svg:y="20.32cm" svg:viewBox="0 0 212 211" svg:d="M106 211c58 0 106-48 106-105 0-60-48-106-106-106s-106 46-106 106c0 57 48 105 106 105z">
          <text:p/>
        </draw:path>
        <draw:path draw:style-name="gr4" draw:text-style-name="P4" draw:layer="layout" svg:width="0.237cm" svg:height="0.236cm" svg:x="1.128cm" svg:y="20.306cm" svg:viewBox="0 0 238 237" svg:d="M118 237c-64 0-118-52-118-118 0-65 54-119 118-119 68 0 120 54 120 119 0 66-52 118-120 118zM118 25c-51 0-92 43-92 94s41 94 92 94c53 0 94-43 94-94s-41-94-94-94z">
          <text:p/>
        </draw:path>
        <draw:frame draw:style-name="gr20" draw:text-style-name="P8" draw:layer="layout" svg:width="0.246cm" svg:height="0.289cm" svg:x="1.365cm" svg:y="17.752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.425cm" svg:y1="20.538cm" svg:x2="7.177cm" svg:y2="20.538cm">
          <text:p/>
        </draw:line>
        <draw:path draw:style-name="gr1" draw:text-style-name="P1" draw:layer="layout" svg:width="0.211cm" svg:height="0.211cm" svg:x="1.142cm" svg:y="20.813cm" svg:viewBox="0 0 212 212" svg:d="M106 212c58 0 106-49 106-107s-48-105-106-105-106 47-106 105 48 107 106 107z">
          <text:p/>
        </draw:path>
        <draw:path draw:style-name="gr4" draw:text-style-name="P4" draw:layer="layout" svg:width="0.237cm" svg:height="0.235cm" svg:x="1.128cm" svg:y="20.801cm" svg:viewBox="0 0 238 236" svg:d="M118 236c-64 0-118-54-118-120 0-64 54-116 118-116 68 0 120 52 120 116 0 66-52 120-120 120zM118 24c-51 0-92 43-92 92 0 52 41 95 92 95 53 0 94-43 94-95 0-49-41-92-94-92z">
          <text:p/>
        </draw:path>
        <draw:frame draw:style-name="gr20" draw:text-style-name="P8" draw:layer="layout" svg:width="0.246cm" svg:height="0.289cm" svg:x="1.365cm" svg:y="18.246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.425cm" svg:y1="21.03cm" svg:x2="7.177cm" svg:y2="21.03cm">
          <text:p/>
        </draw:line>
        <draw:path draw:style-name="gr1" draw:text-style-name="P1" draw:layer="layout" svg:width="0.211cm" svg:height="0.21cm" svg:x="1.142cm" svg:y="21.307cm" svg:viewBox="0 0 212 211" svg:d="M106 211c58 0 106-46 106-106 0-58-48-105-106-105s-106 47-106 105c0 60 48 106 106 106z">
          <text:p/>
        </draw:path>
        <draw:path draw:style-name="gr4" draw:text-style-name="P4" draw:layer="layout" svg:width="0.237cm" svg:height="0.236cm" svg:x="1.128cm" svg:y="21.295cm" svg:viewBox="0 0 238 237" svg:d="M118 237c-64 0-118-54-118-118 0-67 54-119 118-119 68 0 120 52 120 119 0 64-52 118-120 118zM118 24c-51 0-92 43-92 95 0 50 41 92 92 92 53 0 94-42 94-92 0-52-41-95-94-95z">
          <text:p/>
        </draw:path>
        <draw:frame draw:style-name="gr20" draw:text-style-name="P8" draw:layer="layout" svg:width="0.246cm" svg:height="0.289cm" svg:x="1.365cm" svg:y="20.313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.425cm" svg:y1="21.524cm" svg:x2="7.177cm" svg:y2="21.524cm">
          <text:p/>
        </draw:line>
        <draw:path draw:style-name="gr1" draw:text-style-name="P1" draw:layer="layout" svg:width="0.211cm" svg:height="0.211cm" svg:x="1.142cm" svg:y="21.8cm" svg:viewBox="0 0 212 212" svg:d="M106 212c58 0 106-46 106-105 0-58-48-107-106-107s-106 49-106 107c0 59 48 105 106 105z">
          <text:p/>
        </draw:path>
        <draw:path draw:style-name="gr4" draw:text-style-name="P4" draw:layer="layout" svg:width="0.237cm" svg:height="0.236cm" svg:x="1.128cm" svg:y="21.789cm" svg:viewBox="0 0 238 237" svg:d="M118 237c-64 0-118-54-118-118 0-66 54-119 118-119 68 0 120 53 120 119 0 64-52 118-120 118zM118 25c-51 0-92 42-92 94 0 50 41 92 92 92 53 0 94-42 94-92 0-52-41-94-94-94z">
          <text:p/>
        </draw:path>
        <draw:frame draw:style-name="gr20" draw:text-style-name="P8" draw:layer="layout" svg:width="0.246cm" svg:height="0.289cm" svg:x="1.365cm" svg:y="20.807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.425cm" svg:y1="22.019cm" svg:x2="7.177cm" svg:y2="22.019cm">
          <text:p/>
        </draw:line>
        <draw:path draw:style-name="gr1" draw:text-style-name="P1" draw:layer="layout" svg:width="0.211cm" svg:height="0.211cm" svg:x="1.142cm" svg:y="22.294cm" svg:viewBox="0 0 212 212" svg:d="M106 212c58 0 106-47 106-105 0-59-48-107-106-107s-106 48-106 107c0 58 48 105 106 105z">
          <text:p/>
        </draw:path>
        <draw:path draw:style-name="gr4" draw:text-style-name="P4" draw:layer="layout" svg:width="0.237cm" svg:height="0.237cm" svg:x="1.128cm" svg:y="22.282cm" svg:viewBox="0 0 238 238" svg:d="M118 238c-64 0-118-54-118-118 0-67 54-120 118-120 68 0 120 53 120 120 0 64-52 118-120 118zM118 27c-51 0-92 41-92 93 0 51 41 92 92 92 53 0 94-41 94-92 0-52-41-93-94-93z">
          <text:p/>
        </draw:path>
        <draw:frame draw:style-name="gr20" draw:text-style-name="P8" draw:layer="layout" svg:width="0.246cm" svg:height="0.289cm" svg:x="1.365cm" svg:y="21.301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.425cm" svg:y1="22.513cm" svg:x2="7.177cm" svg:y2="22.513cm">
          <text:p/>
        </draw:line>
        <draw:path draw:style-name="gr1" draw:text-style-name="P1" draw:layer="layout" svg:width="0.211cm" svg:height="0.212cm" svg:x="1.142cm" svg:y="22.788cm" svg:viewBox="0 0 212 213" svg:d="M106 213c58 0 106-48 106-106 0-59-48-107-106-107s-106 48-106 107c0 58 48 106 106 106z">
          <text:p/>
        </draw:path>
        <draw:path draw:style-name="gr4" draw:text-style-name="P4" draw:layer="layout" svg:width="0.237cm" svg:height="0.236cm" svg:x="1.128cm" svg:y="22.776cm" svg:viewBox="0 0 238 237" svg:d="M118 237c-64 0-118-52-118-119 0-64 54-118 118-118 68 0 120 54 120 118 0 67-52 119-120 119zM118 26c-51 0-92 41-92 92 0 53 41 94 92 94 53 0 94-41 94-94 0-51-41-92-94-92z">
          <text:p/>
        </draw:path>
        <draw:frame draw:style-name="gr20" draw:text-style-name="P8" draw:layer="layout" svg:width="0.246cm" svg:height="0.289cm" svg:x="1.365cm" svg:y="21.795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.425cm" svg:y1="23.007cm" svg:x2="7.177cm" svg:y2="23.007cm">
          <text:p/>
        </draw:line>
        <draw:path draw:style-name="gr1" draw:text-style-name="P1" draw:layer="layout" svg:width="0.211cm" svg:height="0.211cm" svg:x="1.142cm" svg:y="23.283cm" svg:viewBox="0 0 212 212" svg:d="M106 212c58 0 106-48 106-107 0-58-48-105-106-105s-106 47-106 105c0 59 48 107 106 107z">
          <text:p/>
        </draw:path>
        <draw:path draw:style-name="gr4" draw:text-style-name="P4" draw:layer="layout" svg:width="0.237cm" svg:height="0.237cm" svg:x="1.128cm" svg:y="23.269cm" svg:viewBox="0 0 238 238" svg:d="M118 238c-64 0-118-53-118-119 0-64 54-119 118-119 68 0 120 55 120 119 0 66-52 119-120 119zM118 27c-51 0-92 42-92 92 0 52 41 92 92 92 53 0 94-40 94-92 0-50-41-92-94-92z">
          <text:p/>
        </draw:path>
        <draw:frame draw:style-name="gr20" draw:text-style-name="P8" draw:layer="layout" svg:width="0.246cm" svg:height="0.289cm" svg:x="1.365cm" svg:y="22.289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.425cm" svg:y1="23.5cm" svg:x2="7.177cm" svg:y2="23.5cm">
          <text:p/>
        </draw:line>
        <draw:path draw:style-name="gr1" draw:text-style-name="P1" draw:layer="layout" svg:width="0.211cm" svg:height="0.211cm" svg:x="1.142cm" svg:y="23.777cm" svg:viewBox="0 0 212 212" svg:d="M106 212c58 0 106-47 106-107 0-58-48-105-106-105s-106 47-106 105c0 60 48 107 106 107z">
          <text:p/>
        </draw:path>
        <draw:path draw:style-name="gr4" draw:text-style-name="P4" draw:layer="layout" svg:width="0.237cm" svg:height="0.237cm" svg:x="1.128cm" svg:y="23.763cm" svg:viewBox="0 0 238 238" svg:d="M118 238c-64 0-118-54-118-120 0-64 54-118 118-118 68 0 120 54 120 118 0 66-52 120-120 120zM118 26c-51 0-92 41-92 92 0 52 41 94 92 94 53 0 94-42 94-94 0-51-41-92-94-92z">
          <text:p/>
        </draw:path>
        <draw:frame draw:style-name="gr20" draw:text-style-name="P8" draw:layer="layout" svg:width="0.246cm" svg:height="0.289cm" svg:x="1.365cm" svg:y="22.783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.425cm" svg:y1="23.994cm" svg:x2="7.177cm" svg:y2="23.994cm">
          <text:p/>
        </draw:line>
        <draw:path draw:style-name="gr1" draw:text-style-name="P1" draw:layer="layout" svg:width="0.211cm" svg:height="0.21cm" svg:x="1.142cm" svg:y="24.271cm" svg:viewBox="0 0 212 211" svg:d="M106 211c58 0 106-47 106-105 0-60-48-106-106-106s-106 46-106 106c0 58 48 105 106 105z">
          <text:p/>
        </draw:path>
        <draw:path draw:style-name="gr4" draw:text-style-name="P4" draw:layer="layout" svg:width="0.237cm" svg:height="0.236cm" svg:x="1.128cm" svg:y="24.257cm" svg:viewBox="0 0 238 237" svg:d="M118 237c-64 0-118-54-118-119 0-64 54-118 118-118 68 0 120 54 120 118 0 65-52 119-120 119zM118 25c-51 0-92 43-92 93 0 52 41 94 92 94 53 0 94-42 94-94 0-50-41-93-94-93z">
          <text:p/>
        </draw:path>
        <draw:frame draw:style-name="gr20" draw:text-style-name="P8" draw:layer="layout" svg:width="0.246cm" svg:height="0.289cm" svg:x="1.365cm" svg:y="23.277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.425cm" svg:y1="24.488cm" svg:x2="7.177cm" svg:y2="24.488cm">
          <text:p/>
        </draw:line>
        <draw:path draw:style-name="gr1" draw:text-style-name="P1" draw:layer="layout" svg:width="0.211cm" svg:height="0.21cm" svg:x="1.142cm" svg:y="24.765cm" svg:viewBox="0 0 212 211" svg:d="M106 211c58 0 106-48 106-105 0-58-48-106-106-106s-106 48-106 106c0 57 48 105 106 105z">
          <text:p/>
        </draw:path>
        <draw:path draw:style-name="gr4" draw:text-style-name="P4" draw:layer="layout" svg:width="0.237cm" svg:height="0.236cm" svg:x="1.128cm" svg:y="24.751cm" svg:viewBox="0 0 238 237" svg:d="M118 237c-64 0-118-52-118-119 0-64 54-118 118-118 68 0 120 54 120 118 0 67-52 119-120 119zM118 25c-51 0-92 43-92 93 0 52 41 95 92 95 53 0 94-43 94-95 0-50-41-93-94-93z">
          <text:p/>
        </draw:path>
        <draw:frame draw:style-name="gr20" draw:text-style-name="P8" draw:layer="layout" svg:width="0.246cm" svg:height="0.289cm" svg:x="1.365cm" svg:y="23.77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.425cm" svg:y1="24.983cm" svg:x2="7.177cm" svg:y2="24.983cm">
          <text:p/>
        </draw:line>
        <draw:path draw:style-name="gr1" draw:text-style-name="P1" draw:layer="layout" svg:width="0.211cm" svg:height="0.211cm" svg:x="1.142cm" svg:y="25.258cm" svg:viewBox="0 0 212 212" svg:d="M106 212c58 0 106-47 106-107 0-57-48-105-106-105s-106 48-106 105c0 60 48 107 106 107z">
          <text:p/>
        </draw:path>
        <draw:path draw:style-name="gr4" draw:text-style-name="P4" draw:layer="layout" svg:width="0.237cm" svg:height="0.235cm" svg:x="1.128cm" svg:y="25.246cm" svg:viewBox="0 0 238 236" svg:d="M118 236c-64 0-118-53-118-119 0-64 54-117 118-117 68 0 120 53 120 117 0 66-52 119-120 119zM118 25c-51 0-92 43-92 92 0 52 41 95 92 95 53 0 94-43 94-95 0-49-41-92-94-92z">
          <text:p/>
        </draw:path>
        <draw:frame draw:style-name="gr20" draw:text-style-name="P8" draw:layer="layout" svg:width="0.246cm" svg:height="0.289cm" svg:x="1.365cm" svg:y="24.264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.425cm" svg:y1="25.475cm" svg:x2="7.177cm" svg:y2="25.475cm">
          <text:p/>
        </draw:line>
        <draw:path draw:style-name="gr1" draw:text-style-name="P1" draw:layer="layout" svg:width="0.211cm" svg:height="0.21cm" svg:x="1.142cm" svg:y="25.752cm" svg:viewBox="0 0 212 211" svg:d="M106 211c58 0 106-47 106-105 0-60-48-106-106-106s-106 46-106 106c0 58 48 105 106 105z">
          <text:p/>
        </draw:path>
        <draw:path draw:style-name="gr4" draw:text-style-name="P4" draw:layer="layout" svg:width="0.237cm" svg:height="0.236cm" svg:x="1.128cm" svg:y="25.74cm" svg:viewBox="0 0 238 237" svg:d="M118 237c-64 0-118-54-118-118 0-67 54-119 118-119 68 0 120 52 120 119 0 64-52 118-120 118zM118 24c-51 0-92 42-92 95 0 50 41 92 92 92 53 0 94-42 94-92 0-53-41-95-94-95z">
          <text:p/>
        </draw:path>
        <draw:frame draw:style-name="gr20" draw:text-style-name="P8" draw:layer="layout" svg:width="0.246cm" svg:height="0.289cm" svg:x="1.365cm" svg:y="24.758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.425cm" svg:y1="25.969cm" svg:x2="7.177cm" svg:y2="25.969cm">
          <text:p/>
        </draw:line>
        <draw:path draw:style-name="gr1" draw:text-style-name="P1" draw:layer="layout" svg:width="0.211cm" svg:height="0.211cm" svg:x="1.142cm" svg:y="26.245cm" svg:viewBox="0 0 212 212" svg:d="M106 212c58 0 106-47 106-107 0-58-48-105-106-105s-106 47-106 105c0 60 48 107 106 107z">
          <text:p/>
        </draw:path>
        <draw:path draw:style-name="gr4" draw:text-style-name="P4" draw:layer="layout" svg:width="0.237cm" svg:height="0.236cm" svg:x="1.128cm" svg:y="26.234cm" svg:viewBox="0 0 238 237" svg:d="M118 237c-64 0-118-54-118-118 0-67 54-119 118-119 68 0 120 52 120 119 0 64-52 118-120 118zM118 25c-51 0-92 41-92 94 0 50 41 92 92 92 53 0 94-42 94-92 0-53-41-94-94-94z">
          <text:p/>
        </draw:path>
        <draw:frame draw:style-name="gr20" draw:text-style-name="P8" draw:layer="layout" svg:width="0.246cm" svg:height="0.289cm" svg:x="1.365cm" svg:y="25.252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.425cm" svg:y1="26.464cm" svg:x2="7.177cm" svg:y2="26.464cm">
          <text:p/>
        </draw:line>
        <draw:path draw:style-name="gr1" draw:text-style-name="P1" draw:layer="layout" svg:width="0.212cm" svg:height="0.211cm" svg:x="7.808cm" svg:y="6.338cm" svg:viewBox="0 0 213 212" svg:d="M107 212c58 0 106-47 106-104 0-59-48-108-106-108-59 0-107 49-107 108 0 57 48 104 107 104z">
          <text:p/>
        </draw:path>
        <draw:path draw:style-name="gr4" draw:text-style-name="P4" draw:layer="layout" svg:width="0.236cm" svg:height="0.235cm" svg:x="7.796cm" svg:y="6.326cm" svg:viewBox="0 0 237 236" svg:d="M119 236c-65 0-119-52-119-117 0-67 54-119 119-119 66 0 118 52 118 119 0 65-52 117-118 117zM119 26c-51 0-93 41-93 93s42 93 93 93c52 0 92-41 92-93s-40-93-92-93z">
          <text:p/>
        </draw:path>
        <draw:frame draw:style-name="gr20" draw:text-style-name="P8" draw:layer="layout" svg:width="0.246cm" svg:height="0.289cm" svg:x="1.365cm" svg:y="25.746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8.093cm" svg:y1="6.557cm" svg:x2="13.843cm" svg:y2="6.557cm">
          <text:p/>
        </draw:line>
        <draw:path draw:style-name="gr1" draw:text-style-name="P1" draw:layer="layout" svg:width="0.212cm" svg:height="0.211cm" svg:x="7.808cm" svg:y="6.832cm" svg:viewBox="0 0 213 212" svg:d="M107 212c58 0 106-48 106-106s-48-106-106-106c-59 0-107 48-107 106s48 106 107 106z">
          <text:p/>
        </draw:path>
        <draw:path draw:style-name="gr4" draw:text-style-name="P4" draw:layer="layout" svg:width="0.236cm" svg:height="0.236cm" svg:x="7.796cm" svg:y="6.82cm" svg:viewBox="0 0 237 237" svg:d="M119 237c-65 0-119-52-119-119 0-66 54-118 119-118 66 0 118 52 118 118 0 67-52 119-118 119zM119 26c-51 0-93 40-93 92 0 53 42 94 93 94 52 0 92-41 92-94 0-52-40-92-92-92z">
          <text:p/>
        </draw:path>
        <draw:frame draw:style-name="gr20" draw:text-style-name="P8" draw:layer="layout" svg:width="0.246cm" svg:height="0.289cm" svg:x="1.365cm" svg:y="26.24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8.093cm" svg:y1="7.051cm" svg:x2="13.843cm" svg:y2="7.051cm">
          <text:p/>
        </draw:line>
        <draw:path draw:style-name="gr1" draw:text-style-name="P1" draw:layer="layout" svg:width="0.212cm" svg:height="0.21cm" svg:x="7.808cm" svg:y="7.326cm" svg:viewBox="0 0 213 211" svg:d="M107 211c58 0 106-46 106-105 0-58-48-106-106-106-59 0-107 48-107 106 0 59 48 105 107 105z">
          <text:p/>
        </draw:path>
        <draw:path draw:style-name="gr4" draw:text-style-name="P4" draw:layer="layout" svg:width="0.236cm" svg:height="0.236cm" svg:x="7.796cm" svg:y="7.314cm" svg:viewBox="0 0 237 237" svg:d="M119 237c-65 0-119-54-119-119 0-66 54-118 119-118 66 0 118 52 118 118 0 65-52 119-118 119zM119 26c-51 0-93 42-93 92 0 53 42 93 93 93 52 0 92-40 92-93 0-50-40-92-92-92z">
          <text:p/>
        </draw:path>
        <draw:frame draw:style-name="gr20" draw:text-style-name="P8" draw:layer="layout" svg:width="0.246cm" svg:height="0.289cm" svg:x="8.033cm" svg:y="6.333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8.093cm" svg:y1="7.544cm" svg:x2="13.843cm" svg:y2="7.544cm">
          <text:p/>
        </draw:line>
        <draw:path draw:style-name="gr1" draw:text-style-name="P1" draw:layer="layout" svg:width="0.212cm" svg:height="0.209cm" svg:x="7.808cm" svg:y="7.821cm" svg:viewBox="0 0 213 210" svg:d="M107 210c58 0 106-47 106-104 0-58-48-106-106-106-59 0-107 48-107 106 0 57 48 104 107 104z">
          <text:p/>
        </draw:path>
        <draw:path draw:style-name="gr4" draw:text-style-name="P4" draw:layer="layout" svg:width="0.236cm" svg:height="0.237cm" svg:x="7.796cm" svg:y="7.807cm" svg:viewBox="0 0 237 238" svg:d="M119 238c-65 0-119-53-119-118s54-120 119-120c66 0 118 55 118 120s-52 118-118 118zM119 26c-51 0-93 43-93 94s42 92 93 92c52 0 92-41 92-92s-40-94-92-94z">
          <text:p/>
        </draw:path>
        <draw:frame draw:style-name="gr20" draw:text-style-name="P8" draw:layer="layout" svg:width="0.246cm" svg:height="0.289cm" svg:x="8.033cm" svg:y="6.827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8.093cm" svg:y1="8.038cm" svg:x2="13.843cm" svg:y2="8.038cm">
          <text:p/>
        </draw:line>
        <draw:path draw:style-name="gr1" draw:text-style-name="P1" draw:layer="layout" svg:width="0.212cm" svg:height="0.21cm" svg:x="7.808cm" svg:y="8.315cm" svg:viewBox="0 0 213 211" svg:d="M107 211c58 0 106-49 106-107s-48-104-106-104c-59 0-107 46-107 104s48 107 107 107z">
          <text:p/>
        </draw:path>
        <draw:path draw:style-name="gr4" draw:text-style-name="P4" draw:layer="layout" svg:width="0.236cm" svg:height="0.236cm" svg:x="7.796cm" svg:y="8.301cm" svg:viewBox="0 0 237 237" svg:d="M119 237c-65 0-119-52-119-118 0-64 54-119 119-119 66 0 118 55 118 119 0 66-52 118-118 118zM119 26c-51 0-93 43-93 93 0 52 42 93 93 93 52 0 92-41 92-93 0-50-40-93-92-93z">
          <text:p/>
        </draw:path>
        <draw:frame draw:style-name="gr20" draw:text-style-name="P8" draw:layer="layout" svg:width="0.246cm" svg:height="0.289cm" svg:x="8.033cm" svg:y="7.32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8.093cm" svg:y1="8.532cm" svg:x2="13.843cm" svg:y2="8.532cm">
          <text:p/>
        </draw:line>
        <draw:path draw:style-name="gr1" draw:text-style-name="P1" draw:layer="layout" svg:width="0.212cm" svg:height="0.21cm" svg:x="7.808cm" svg:y="8.809cm" svg:viewBox="0 0 213 211" svg:d="M107 211c58 0 106-48 106-107 0-58-48-104-106-104-59 0-107 46-107 104 0 59 48 107 107 107z">
          <text:p/>
        </draw:path>
        <draw:path draw:style-name="gr4" draw:text-style-name="P4" draw:layer="layout" svg:width="0.236cm" svg:height="0.236cm" svg:x="7.796cm" svg:y="8.795cm" svg:viewBox="0 0 237 237" svg:d="M119 237c-65 0-119-54-119-118 0-65 54-119 119-119 66 0 118 54 118 119 0 64-52 118-118 118zM119 25c-51 0-93 42-93 94 0 51 42 92 93 92 52 0 92-41 92-92 0-52-40-94-92-94z">
          <text:p/>
        </draw:path>
        <draw:frame draw:style-name="gr20" draw:text-style-name="P8" draw:layer="layout" svg:width="0.246cm" svg:height="0.289cm" svg:x="8.033cm" svg:y="7.814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8.093cm" svg:y1="9.025cm" svg:x2="13.843cm" svg:y2="9.025cm">
          <text:p/>
        </draw:line>
        <draw:path draw:style-name="gr1" draw:text-style-name="P1" draw:layer="layout" svg:width="0.212cm" svg:height="0.211cm" svg:x="7.808cm" svg:y="9.302cm" svg:viewBox="0 0 213 212" svg:d="M107 212c58 0 106-49 106-107s-48-105-106-105c-59 0-107 47-107 105s48 107 107 107z">
          <text:p/>
        </draw:path>
        <draw:path draw:style-name="gr4" draw:text-style-name="P4" draw:layer="layout" svg:width="0.236cm" svg:height="0.235cm" svg:x="7.796cm" svg:y="9.29cm" svg:viewBox="0 0 237 236" svg:d="M119 236c-65 0-119-54-119-120 0-64 54-116 119-116 66 0 118 52 118 116 0 66-52 120-118 120zM119 24c-51 0-93 41-93 92 0 52 42 93 93 93 52 0 92-41 92-93 0-51-40-92-92-92z">
          <text:p/>
        </draw:path>
        <draw:frame draw:style-name="gr20" draw:text-style-name="P8" draw:layer="layout" svg:width="0.246cm" svg:height="0.289cm" svg:x="8.033cm" svg:y="8.308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8.093cm" svg:y1="9.519cm" svg:x2="13.843cm" svg:y2="9.519cm">
          <text:p/>
        </draw:line>
        <draw:path draw:style-name="gr1" draw:text-style-name="P1" draw:layer="layout" svg:width="0.212cm" svg:height="0.211cm" svg:x="7.808cm" svg:y="9.796cm" svg:viewBox="0 0 213 212" svg:d="M107 212c58 0 106-48 106-108 0-58-48-104-106-104-59 0-107 46-107 104 0 60 48 108 107 108z">
          <text:p/>
        </draw:path>
        <draw:path draw:style-name="gr4" draw:text-style-name="P4" draw:layer="layout" svg:width="0.236cm" svg:height="0.235cm" svg:x="7.796cm" svg:y="9.784cm" svg:viewBox="0 0 237 236" svg:d="M119 236c-65 0-119-54-119-120 0-64 54-116 119-116 66 0 118 52 118 116 0 66-52 120-118 120zM119 24c-51 0-93 42-93 92 0 52 42 94 93 94 52 0 92-42 92-94 0-50-40-92-92-92z">
          <text:p/>
        </draw:path>
        <draw:frame draw:style-name="gr20" draw:text-style-name="P8" draw:layer="layout" svg:width="0.246cm" svg:height="0.289cm" svg:x="8.033cm" svg:y="8.802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8.093cm" svg:y1="10.013cm" svg:x2="13.843cm" svg:y2="10.013cm">
          <text:p/>
        </draw:line>
        <draw:path draw:style-name="gr1" draw:text-style-name="P1" draw:layer="layout" svg:width="0.212cm" svg:height="0.211cm" svg:x="7.808cm" svg:y="10.289cm" svg:viewBox="0 0 213 212" svg:d="M107 212c58 0 106-46 106-104 0-61-48-108-106-108-59 0-107 47-107 108 0 58 48 104 107 104z">
          <text:p/>
        </draw:path>
        <draw:path draw:style-name="gr4" draw:text-style-name="P4" draw:layer="layout" svg:width="0.236cm" svg:height="0.234cm" svg:x="7.796cm" svg:y="10.278cm" svg:viewBox="0 0 237 235" svg:d="M119 235c-65 0-119-52-119-119 0-64 54-116 119-116 66 0 118 52 118 116 0 67-52 119-118 119zM119 25c-51 0-93 41-93 91 0 53 42 95 93 95 52 0 92-42 92-95 0-50-40-91-92-91z">
          <text:p/>
        </draw:path>
        <draw:frame draw:style-name="gr20" draw:text-style-name="P8" draw:layer="layout" svg:width="0.246cm" svg:height="0.289cm" svg:x="8.033cm" svg:y="9.296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8.093cm" svg:y1="10.508cm" svg:x2="13.843cm" svg:y2="10.508cm">
          <text:p/>
        </draw:line>
        <draw:path draw:style-name="gr1" draw:text-style-name="P1" draw:layer="layout" svg:width="0.212cm" svg:height="0.211cm" svg:x="7.808cm" svg:y="10.783cm" svg:viewBox="0 0 213 212" svg:d="M107 212c58 0 106-47 106-105 0-59-48-107-106-107-59 0-107 48-107 107 0 58 48 105 107 105z">
          <text:p/>
        </draw:path>
        <draw:path draw:style-name="gr4" draw:text-style-name="P4" draw:layer="layout" svg:width="0.236cm" svg:height="0.235cm" svg:x="7.796cm" svg:y="10.771cm" svg:viewBox="0 0 237 236" svg:d="M119 236c-65 0-119-52-119-117 0-67 54-119 119-119 66 0 118 52 118 119 0 65-52 117-118 117zM119 26c-51 0-93 41-93 93s42 93 93 93c52 0 92-41 92-93s-40-93-92-93z">
          <text:p/>
        </draw:path>
        <draw:frame draw:style-name="gr20" draw:text-style-name="P8" draw:layer="layout" svg:width="0.246cm" svg:height="0.289cm" svg:x="8.033cm" svg:y="9.79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8.093cm" svg:y1="11.002cm" svg:x2="13.843cm" svg:y2="11.002cm">
          <text:p/>
        </draw:line>
        <draw:path draw:style-name="gr1" draw:text-style-name="P1" draw:layer="layout" svg:width="0.212cm" svg:height="0.211cm" svg:x="7.808cm" svg:y="11.277cm" svg:viewBox="0 0 213 212" svg:d="M107 212c58 0 106-48 106-106s-48-106-106-106c-59 0-107 48-107 106s48 106 107 106z">
          <text:p/>
        </draw:path>
        <draw:path draw:style-name="gr4" draw:text-style-name="P4" draw:layer="layout" svg:width="0.236cm" svg:height="0.236cm" svg:x="7.796cm" svg:y="11.265cm" svg:viewBox="0 0 237 237" svg:d="M119 237c-65 0-119-52-119-119 0-66 54-118 119-118 66 0 118 52 118 118 0 67-52 119-118 119zM119 26c-51 0-93 40-93 92s42 94 93 94c52 0 92-42 92-94s-40-92-92-92z">
          <text:p/>
        </draw:path>
        <draw:frame draw:style-name="gr20" draw:text-style-name="P8" draw:layer="layout" svg:width="0.246cm" svg:height="0.289cm" svg:x="8.033cm" svg:y="10.284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8.093cm" svg:y1="11.496cm" svg:x2="13.843cm" svg:y2="11.496cm">
          <text:p/>
        </draw:line>
        <draw:path draw:style-name="gr1" draw:text-style-name="P1" draw:layer="layout" svg:width="0.212cm" svg:height="0.21cm" svg:x="7.808cm" svg:y="11.771cm" svg:viewBox="0 0 213 211" svg:d="M107 211c58 0 106-46 106-104 0-59-48-107-106-107-59 0-107 48-107 107 0 58 48 104 107 104z">
          <text:p/>
        </draw:path>
        <draw:path draw:style-name="gr4" draw:text-style-name="P4" draw:layer="layout" svg:width="0.236cm" svg:height="0.236cm" svg:x="7.796cm" svg:y="11.759cm" svg:viewBox="0 0 237 237" svg:d="M119 237c-65 0-119-54-119-119 0-66 54-118 119-118 66 0 118 52 118 118 0 65-52 119-118 119zM119 26c-51 0-93 42-93 92 0 53 42 93 93 93 52 0 92-40 92-93 0-50-40-92-92-92z">
          <text:p/>
        </draw:path>
        <draw:frame draw:style-name="gr20" draw:text-style-name="P8" draw:layer="layout" svg:width="0.246cm" svg:height="0.289cm" svg:x="8.033cm" svg:y="10.778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8.093cm" svg:y1="11.989cm" svg:x2="13.843cm" svg:y2="11.989cm">
          <text:p/>
        </draw:line>
        <draw:path draw:style-name="gr1" draw:text-style-name="P1" draw:layer="layout" svg:width="0.212cm" svg:height="0.209cm" svg:x="7.808cm" svg:y="12.266cm" svg:viewBox="0 0 213 210" svg:d="M107 210c58 0 106-48 106-106 0-57-48-104-106-104-59 0-107 47-107 104 0 58 48 106 107 106z">
          <text:p/>
        </draw:path>
        <draw:path draw:style-name="gr4" draw:text-style-name="P4" draw:layer="layout" svg:width="0.236cm" svg:height="0.237cm" svg:x="7.796cm" svg:y="12.252cm" svg:viewBox="0 0 237 238" svg:d="M119 238c-65 0-119-53-119-119 0-64 54-119 119-119 66 0 118 55 118 119 0 66-52 119-118 119zM119 26c-51 0-93 43-93 93 0 52 42 93 93 93 52 0 92-41 92-93 0-50-40-93-92-93z">
          <text:p/>
        </draw:path>
        <draw:frame draw:style-name="gr20" draw:text-style-name="P8" draw:layer="layout" svg:width="0.246cm" svg:height="0.289cm" svg:x="8.033cm" svg:y="11.272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8.093cm" svg:y1="12.483cm" svg:x2="13.843cm" svg:y2="12.483cm">
          <text:p/>
        </draw:line>
        <draw:path draw:style-name="gr1" draw:text-style-name="P1" draw:layer="layout" svg:width="0.21cm" svg:height="0.211cm" svg:x="14.411cm" svg:y="6.338cm" svg:viewBox="0 0 211 212" svg:d="M104 212c60 0 107-47 107-104 0-59-47-108-107-108-58 0-104 49-104 108 0 57 46 104 104 104z">
          <text:p/>
        </draw:path>
        <draw:path draw:style-name="gr4" draw:text-style-name="P4" draw:layer="layout" svg:width="0.236cm" svg:height="0.235cm" svg:x="14.397cm" svg:y="6.326cm" svg:viewBox="0 0 237 236" svg:d="M119 236c-65 0-119-52-119-117 0-67 54-119 119-119 64 0 118 52 118 119 0 65-54 117-118 117zM119 26c-52 0-93 41-93 93s41 93 93 93c50 0 92-41 92-93s-42-93-92-93z">
          <text:p/>
        </draw:path>
        <draw:frame draw:style-name="gr20" draw:text-style-name="P8" draw:layer="layout" svg:width="0.246cm" svg:height="0.289cm" svg:x="8.033cm" svg:y="11.765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4.694cm" svg:y1="6.557cm" svg:x2="20.446cm" svg:y2="6.557cm">
          <text:p/>
        </draw:line>
        <draw:path draw:style-name="gr1" draw:text-style-name="P1" draw:layer="layout" svg:width="0.21cm" svg:height="0.211cm" svg:x="14.411cm" svg:y="6.832cm" svg:viewBox="0 0 211 212" svg:d="M104 212c60 0 107-48 107-106s-47-106-107-106c-58 0-104 48-104 106s46 106 104 106z">
          <text:p/>
        </draw:path>
        <draw:path draw:style-name="gr4" draw:text-style-name="P4" draw:layer="layout" svg:width="0.236cm" svg:height="0.236cm" svg:x="14.397cm" svg:y="6.82cm" svg:viewBox="0 0 237 237" svg:d="M119 237c-65 0-119-52-119-119 0-66 54-118 119-118 64 0 118 52 118 118 0 67-54 119-118 119zM119 26c-52 0-93 40-93 92 0 53 41 94 93 94 50 0 92-41 92-94 0-52-42-92-92-92z">
          <text:p/>
        </draw:path>
        <draw:frame draw:style-name="gr20" draw:text-style-name="P8" draw:layer="layout" svg:width="0.246cm" svg:height="0.289cm" svg:x="8.033cm" svg:y="12.259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4.694cm" svg:y1="7.051cm" svg:x2="20.446cm" svg:y2="7.051cm">
          <text:p/>
        </draw:line>
        <draw:path draw:style-name="gr1" draw:text-style-name="P1" draw:layer="layout" svg:width="0.21cm" svg:height="0.21cm" svg:x="14.411cm" svg:y="7.326cm" svg:viewBox="0 0 211 211" svg:d="M104 211c60 0 107-46 107-105 0-58-47-106-107-106-58 0-104 48-104 106 0 59 46 105 104 105z">
          <text:p/>
        </draw:path>
        <draw:path draw:style-name="gr4" draw:text-style-name="P4" draw:layer="layout" svg:width="0.236cm" svg:height="0.236cm" svg:x="14.397cm" svg:y="7.314cm" svg:viewBox="0 0 237 237" svg:d="M119 237c-65 0-119-54-119-119 0-66 54-118 119-118 64 0 118 52 118 118 0 65-54 119-118 119zM119 26c-52 0-93 42-93 92 0 53 41 93 93 93 50 0 92-40 92-93 0-50-42-92-92-92z">
          <text:p/>
        </draw:path>
        <draw:frame draw:style-name="gr20" draw:text-style-name="P8" draw:layer="layout" svg:width="0.246cm" svg:height="0.289cm" svg:x="14.633cm" svg:y="6.333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4.694cm" svg:y1="7.544cm" svg:x2="20.446cm" svg:y2="7.544cm">
          <text:p/>
        </draw:line>
        <draw:path draw:style-name="gr1" draw:text-style-name="P1" draw:layer="layout" svg:width="0.21cm" svg:height="0.209cm" svg:x="14.411cm" svg:y="7.821cm" svg:viewBox="0 0 211 210" svg:d="M104 210c60 0 107-47 107-104 0-58-47-106-107-106-58 0-104 48-104 106 0 57 46 104 104 104z">
          <text:p/>
        </draw:path>
        <draw:path draw:style-name="gr4" draw:text-style-name="P4" draw:layer="layout" svg:width="0.236cm" svg:height="0.237cm" svg:x="14.397cm" svg:y="7.807cm" svg:viewBox="0 0 237 238" svg:d="M119 238c-65 0-119-53-119-118s54-120 119-120c64 0 118 55 118 120s-54 118-118 118zM119 26c-52 0-93 43-93 94s41 92 93 92c50 0 92-41 92-92s-42-94-92-94z">
          <text:p/>
        </draw:path>
        <draw:frame draw:style-name="gr20" draw:text-style-name="P8" draw:layer="layout" svg:width="0.246cm" svg:height="0.289cm" svg:x="14.633cm" svg:y="6.827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4.694cm" svg:y1="8.038cm" svg:x2="20.446cm" svg:y2="8.038cm">
          <text:p/>
        </draw:line>
        <draw:path draw:style-name="gr1" draw:text-style-name="P1" draw:layer="layout" svg:width="0.21cm" svg:height="0.21cm" svg:x="14.411cm" svg:y="8.315cm" svg:viewBox="0 0 211 211" svg:d="M104 211c60 0 107-49 107-107s-47-104-107-104c-58 0-104 46-104 104s46 107 104 107z">
          <text:p/>
        </draw:path>
        <draw:path draw:style-name="gr4" draw:text-style-name="P4" draw:layer="layout" svg:width="0.236cm" svg:height="0.236cm" svg:x="14.397cm" svg:y="8.301cm" svg:viewBox="0 0 237 237" svg:d="M119 237c-65 0-119-52-119-118 0-64 54-119 119-119 64 0 118 55 118 119 0 66-54 118-118 118zM119 26c-52 0-93 43-93 93 0 52 41 93 93 93 50 0 92-41 92-93 0-50-42-93-92-93z">
          <text:p/>
        </draw:path>
        <draw:frame draw:style-name="gr20" draw:text-style-name="P8" draw:layer="layout" svg:width="0.246cm" svg:height="0.289cm" svg:x="14.633cm" svg:y="7.32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4.694cm" svg:y1="8.532cm" svg:x2="20.446cm" svg:y2="8.532cm">
          <text:p/>
        </draw:line>
        <draw:path draw:style-name="gr1" draw:text-style-name="P1" draw:layer="layout" svg:width="0.21cm" svg:height="0.21cm" svg:x="14.411cm" svg:y="8.809cm" svg:viewBox="0 0 211 211" svg:d="M104 211c60 0 107-48 107-107 0-58-47-104-107-104-58 0-104 46-104 104 0 59 46 107 104 107z">
          <text:p/>
        </draw:path>
        <draw:path draw:style-name="gr4" draw:text-style-name="P4" draw:layer="layout" svg:width="0.236cm" svg:height="0.236cm" svg:x="14.397cm" svg:y="8.795cm" svg:viewBox="0 0 237 237" svg:d="M119 237c-65 0-119-54-119-118 0-65 54-119 119-119 64 0 118 54 118 119 0 64-54 118-118 118zM119 25c-52 0-93 42-93 94 0 51 41 92 93 92 50 0 92-41 92-92 0-52-42-94-92-94z">
          <text:p/>
        </draw:path>
        <draw:frame draw:style-name="gr20" draw:text-style-name="P8" draw:layer="layout" svg:width="0.246cm" svg:height="0.289cm" svg:x="14.633cm" svg:y="7.814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4.694cm" svg:y1="9.025cm" svg:x2="20.446cm" svg:y2="9.025cm">
          <text:p/>
        </draw:line>
        <draw:path draw:style-name="gr1" draw:text-style-name="P1" draw:layer="layout" svg:width="0.21cm" svg:height="0.211cm" svg:x="14.411cm" svg:y="9.302cm" svg:viewBox="0 0 211 212" svg:d="M104 212c60 0 107-49 107-107s-47-105-107-105c-58 0-104 47-104 105s46 107 104 107z">
          <text:p/>
        </draw:path>
        <draw:path draw:style-name="gr4" draw:text-style-name="P4" draw:layer="layout" svg:width="0.236cm" svg:height="0.235cm" svg:x="14.397cm" svg:y="9.29cm" svg:viewBox="0 0 237 236" svg:d="M119 236c-65 0-119-54-119-120 0-64 54-116 119-116 64 0 118 52 118 116 0 66-54 120-118 120zM119 24c-52 0-93 41-93 92 0 52 41 93 93 93 50 0 92-41 92-93 0-51-42-92-92-92z">
          <text:p/>
        </draw:path>
        <draw:frame draw:style-name="gr20" draw:text-style-name="P8" draw:layer="layout" svg:width="0.246cm" svg:height="0.289cm" svg:x="14.633cm" svg:y="8.308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4.694cm" svg:y1="9.519cm" svg:x2="20.446cm" svg:y2="9.519cm">
          <text:p/>
        </draw:line>
        <draw:path draw:style-name="gr1" draw:text-style-name="P1" draw:layer="layout" svg:width="0.21cm" svg:height="0.211cm" svg:x="14.411cm" svg:y="9.796cm" svg:viewBox="0 0 211 212" svg:d="M104 212c60 0 107-48 107-108 0-58-47-104-107-104-58 0-104 46-104 104 0 60 46 108 104 108z">
          <text:p/>
        </draw:path>
        <draw:path draw:style-name="gr4" draw:text-style-name="P4" draw:layer="layout" svg:width="0.236cm" svg:height="0.235cm" svg:x="14.397cm" svg:y="9.784cm" svg:viewBox="0 0 237 236" svg:d="M119 236c-65 0-119-54-119-120 0-64 54-116 119-116 64 0 118 52 118 116 0 66-54 120-118 120zM119 24c-52 0-93 42-93 92 0 52 41 94 93 94 50 0 92-42 92-94 0-50-42-92-92-92z">
          <text:p/>
        </draw:path>
        <draw:frame draw:style-name="gr20" draw:text-style-name="P8" draw:layer="layout" svg:width="0.246cm" svg:height="0.289cm" svg:x="14.633cm" svg:y="8.802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4.694cm" svg:y1="10.013cm" svg:x2="20.446cm" svg:y2="10.013cm">
          <text:p/>
        </draw:line>
        <draw:path draw:style-name="gr1" draw:text-style-name="P1" draw:layer="layout" svg:width="0.21cm" svg:height="0.211cm" svg:x="14.411cm" svg:y="10.289cm" svg:viewBox="0 0 211 212" svg:d="M104 212c60 0 107-46 107-104 0-61-47-108-107-108-58 0-104 47-104 108 0 58 46 104 104 104z">
          <text:p/>
        </draw:path>
        <draw:path draw:style-name="gr4" draw:text-style-name="P4" draw:layer="layout" svg:width="0.236cm" svg:height="0.234cm" svg:x="14.397cm" svg:y="10.278cm" svg:viewBox="0 0 237 235" svg:d="M119 235c-65 0-119-52-119-119 0-64 54-116 119-116 64 0 118 52 118 116 0 67-54 119-118 119zM119 25c-52 0-93 41-93 91 0 53 41 95 93 95 50 0 92-42 92-95 0-50-42-91-92-91z">
          <text:p/>
        </draw:path>
        <draw:frame draw:style-name="gr20" draw:text-style-name="P8" draw:layer="layout" svg:width="0.246cm" svg:height="0.289cm" svg:x="14.633cm" svg:y="9.296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4.694cm" svg:y1="10.508cm" svg:x2="20.446cm" svg:y2="10.508cm">
          <text:p/>
        </draw:line>
        <draw:path draw:style-name="gr1" draw:text-style-name="P1" draw:layer="layout" svg:width="0.21cm" svg:height="0.211cm" svg:x="14.411cm" svg:y="12.327cm" svg:viewBox="0 0 211 212" svg:d="M104 212c60 0 107-48 107-108 0-58-47-104-107-104-58 0-104 46-104 104 0 60 46 108 104 108z">
          <text:p/>
        </draw:path>
        <draw:path draw:style-name="gr4" draw:text-style-name="P4" draw:layer="layout" svg:width="0.236cm" svg:height="0.235cm" svg:x="14.397cm" svg:y="12.315cm" svg:viewBox="0 0 237 236" svg:d="M119 236c-65 0-119-53-119-119 0-63 54-117 119-117 64 0 118 54 118 117 0 66-54 119-118 119zM119 25c-52 0-93 43-93 92 0 52 41 95 93 95 50 0 92-43 92-95 0-49-42-92-92-92z">
          <text:p/>
        </draw:path>
        <draw:frame draw:style-name="gr20" draw:text-style-name="P8" draw:layer="layout" svg:width="0.246cm" svg:height="0.289cm" svg:x="14.633cm" svg:y="9.79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4.694cm" svg:y1="12.544cm" svg:x2="20.446cm" svg:y2="12.544cm">
          <text:p/>
        </draw:line>
        <draw:path draw:style-name="gr1" draw:text-style-name="P1" draw:layer="layout" svg:width="0.21cm" svg:height="0.21cm" svg:x="14.411cm" svg:y="12.821cm" svg:viewBox="0 0 211 211" svg:d="M104 211c60 0 107-46 107-104 0-59-47-107-107-107-58 0-104 48-104 107 0 58 46 104 104 104z">
          <text:p/>
        </draw:path>
        <draw:path draw:style-name="gr4" draw:text-style-name="P4" draw:layer="layout" svg:width="0.236cm" svg:height="0.236cm" svg:x="14.397cm" svg:y="12.809cm" svg:viewBox="0 0 237 237" svg:d="M119 237c-65 0-119-54-119-120 0-65 54-117 119-117 64 0 118 52 118 117 0 66-54 120-118 120zM119 24c-52 0-93 43-93 93 0 52 41 94 93 94 50 0 92-42 92-94 0-50-42-93-92-93z">
          <text:p/>
        </draw:path>
        <draw:frame draw:style-name="gr20" draw:text-style-name="P8" draw:layer="layout" svg:width="0.246cm" svg:height="0.289cm" svg:x="14.633cm" svg:y="10.284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4.694cm" svg:y1="13.038cm" svg:x2="20.446cm" svg:y2="13.038cm">
          <text:p/>
        </draw:line>
        <draw:path draw:style-name="gr1" draw:text-style-name="P1" draw:layer="layout" svg:width="0.21cm" svg:height="0.211cm" svg:x="14.411cm" svg:y="13.314cm" svg:viewBox="0 0 211 212" svg:d="M104 212c60 0 107-47 107-106 0-58-47-106-107-106-58 0-104 48-104 106 0 59 46 106 104 106z">
          <text:p/>
        </draw:path>
        <draw:path draw:style-name="gr4" draw:text-style-name="P4" draw:layer="layout" svg:width="0.236cm" svg:height="0.236cm" svg:x="14.397cm" svg:y="13.303cm" svg:viewBox="0 0 237 237" svg:d="M119 237c-65 0-119-54-119-120 0-64 54-117 119-117 64 0 118 53 118 117 0 66-54 120-118 120zM119 25c-52 0-93 42-93 92 0 52 41 94 93 94 50 0 92-42 92-94 0-50-42-92-92-92z">
          <text:p/>
        </draw:path>
        <draw:frame draw:style-name="gr20" draw:text-style-name="P8" draw:layer="layout" svg:width="0.246cm" svg:height="0.289cm" svg:x="14.633cm" svg:y="12.319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4.694cm" svg:y1="13.533cm" svg:x2="20.446cm" svg:y2="13.533cm">
          <text:p/>
        </draw:line>
        <draw:path draw:style-name="gr1" draw:text-style-name="P1" draw:layer="layout" svg:width="0.21cm" svg:height="0.211cm" svg:x="14.411cm" svg:y="13.808cm" svg:viewBox="0 0 211 212" svg:d="M104 212c60 0 107-47 107-105 0-59-47-107-107-107-58 0-104 48-104 107 0 58 46 105 104 105z">
          <text:p/>
        </draw:path>
        <draw:path draw:style-name="gr4" draw:text-style-name="P4" draw:layer="layout" svg:width="0.236cm" svg:height="0.237cm" svg:x="14.397cm" svg:y="13.796cm" svg:viewBox="0 0 237 238" svg:d="M119 238c-65 0-119-54-119-119 0-66 54-119 119-119 64 0 118 53 118 119 0 65-54 119-118 119zM119 27c-52 0-93 41-93 92 0 52 41 93 93 93 50 0 92-41 92-93 0-51-42-92-92-92z">
          <text:p/>
        </draw:path>
        <draw:frame draw:style-name="gr20" draw:text-style-name="P8" draw:layer="layout" svg:width="0.246cm" svg:height="0.289cm" svg:x="14.633cm" svg:y="12.817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4.694cm" svg:y1="14.027cm" svg:x2="20.446cm" svg:y2="14.027cm">
          <text:p/>
        </draw:line>
        <draw:path draw:style-name="gr1" draw:text-style-name="P1" draw:layer="layout" svg:width="0.21cm" svg:height="0.211cm" svg:x="14.411cm" svg:y="14.302cm" svg:viewBox="0 0 211 212" svg:d="M104 212c60 0 107-47 107-105s-47-107-107-107c-58 0-104 49-104 107s46 105 104 105z">
          <text:p/>
        </draw:path>
        <draw:path draw:style-name="gr4" draw:text-style-name="P4" draw:layer="layout" svg:width="0.236cm" svg:height="0.236cm" svg:x="14.397cm" svg:y="14.29cm" svg:viewBox="0 0 237 237" svg:d="M119 237c-65 0-119-52-119-119 0-66 54-118 119-118 64 0 118 52 118 118 0 67-54 119-118 119zM119 26c-52 0-93 40-93 92 0 53 41 94 93 94 50 0 92-41 92-94 0-52-42-92-92-92z">
          <text:p/>
        </draw:path>
        <draw:frame draw:style-name="gr20" draw:text-style-name="P8" draw:layer="layout" svg:width="0.246cm" svg:height="0.289cm" svg:x="14.633cm" svg:y="13.311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4.694cm" svg:y1="14.521cm" svg:x2="20.446cm" svg:y2="14.521cm">
          <text:p/>
        </draw:line>
        <draw:path draw:style-name="gr1" draw:text-style-name="P1" draw:layer="layout" svg:width="0.21cm" svg:height="0.211cm" svg:x="14.411cm" svg:y="14.797cm" svg:viewBox="0 0 211 212" svg:d="M104 212c60 0 107-48 107-106s-47-106-107-106c-58 0-104 48-104 106s46 106 104 106z">
          <text:p/>
        </draw:path>
        <draw:path draw:style-name="gr4" draw:text-style-name="P4" draw:layer="layout" svg:width="0.236cm" svg:height="0.237cm" svg:x="14.397cm" svg:y="14.783cm" svg:viewBox="0 0 237 238" svg:d="M119 238c-65 0-119-53-119-119s54-119 119-119c64 0 118 53 118 119s-54 119-118 119zM119 26c-52 0-93 41-93 93s41 93 93 93c50 0 92-41 92-93s-42-93-92-93z">
          <text:p/>
        </draw:path>
        <draw:frame draw:style-name="gr20" draw:text-style-name="P8" draw:layer="layout" svg:width="0.246cm" svg:height="0.289cm" svg:x="14.633cm" svg:y="13.805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4.694cm" svg:y1="15.014cm" svg:x2="20.446cm" svg:y2="15.014cm">
          <text:p/>
        </draw:line>
        <draw:path draw:style-name="gr1" draw:text-style-name="P1" draw:layer="layout" svg:width="0.21cm" svg:height="0.211cm" svg:x="14.411cm" svg:y="15.291cm" svg:viewBox="0 0 211 212" svg:d="M104 212c60 0 107-48 107-107 0-58-47-105-107-105-58 0-104 47-104 105 0 59 46 107 104 107z">
          <text:p/>
        </draw:path>
        <draw:path draw:style-name="gr4" draw:text-style-name="P4" draw:layer="layout" svg:width="0.236cm" svg:height="0.237cm" svg:x="14.397cm" svg:y="15.277cm" svg:viewBox="0 0 237 238" svg:d="M119 238c-65 0-119-52-119-119 0-64 54-119 119-119 64 0 118 55 118 119 0 67-54 119-118 119zM119 26c-52 0-93 43-93 93 0 51 41 93 93 93 50 0 92-42 92-93 0-50-42-93-92-93z">
          <text:p/>
        </draw:path>
        <draw:frame draw:style-name="gr20" draw:text-style-name="P8" draw:layer="layout" svg:width="0.246cm" svg:height="0.289cm" svg:x="14.633cm" svg:y="14.298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4.694cm" svg:y1="15.508cm" svg:x2="20.446cm" svg:y2="15.508cm">
          <text:p/>
        </draw:line>
        <draw:path draw:style-name="gr1" draw:text-style-name="P1" draw:layer="layout" svg:width="0.21cm" svg:height="0.21cm" svg:x="14.411cm" svg:y="15.785cm" svg:viewBox="0 0 211 211" svg:d="M104 211c60 0 107-48 107-106 0-59-47-105-107-105-58 0-104 46-104 105 0 58 46 106 104 106z">
          <text:p/>
        </draw:path>
        <draw:path draw:style-name="gr4" draw:text-style-name="P4" draw:layer="layout" svg:width="0.236cm" svg:height="0.236cm" svg:x="14.397cm" svg:y="15.771cm" svg:viewBox="0 0 237 237" svg:d="M119 237c-65 0-119-52-119-117 0-66 54-120 119-120 64 0 118 54 118 120 0 65-54 117-118 117zM119 26c-52 0-93 43-93 94s41 92 93 92c50 0 92-41 92-92s-42-94-92-94z">
          <text:p/>
        </draw:path>
        <draw:frame draw:style-name="gr20" draw:text-style-name="P8" draw:layer="layout" svg:width="0.246cm" svg:height="0.289cm" svg:x="14.633cm" svg:y="14.792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4.694cm" svg:y1="16.002cm" svg:x2="20.446cm" svg:y2="16.002cm">
          <text:p/>
        </draw:line>
        <draw:path draw:style-name="gr1" draw:text-style-name="P1" draw:layer="layout" svg:width="0.21cm" svg:height="0.21cm" svg:x="14.411cm" svg:y="16.279cm" svg:viewBox="0 0 211 211" svg:d="M104 211c60 0 107-49 107-107s-47-104-107-104c-58 0-104 46-104 104s46 107 104 107z">
          <text:p/>
        </draw:path>
        <draw:path draw:style-name="gr4" draw:text-style-name="P4" draw:layer="layout" svg:width="0.236cm" svg:height="0.236cm" svg:x="14.397cm" svg:y="16.265cm" svg:viewBox="0 0 237 237" svg:d="M119 237c-65 0-119-53-119-119 0-64 54-118 119-118 64 0 118 54 118 118 0 66-54 119-118 119zM119 25c-52 0-93 43-93 93 0 52 41 93 93 93 50 0 92-41 92-93 0-50-42-93-92-93z">
          <text:p/>
        </draw:path>
        <draw:frame draw:style-name="gr20" draw:text-style-name="P8" draw:layer="layout" svg:width="0.246cm" svg:height="0.289cm" svg:x="14.633cm" svg:y="15.286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4.694cm" svg:y1="16.496cm" svg:x2="20.446cm" svg:y2="16.496cm">
          <text:p/>
        </draw:line>
        <draw:path draw:style-name="gr1" draw:text-style-name="P1" draw:layer="layout" svg:width="0.21cm" svg:height="0.211cm" svg:x="14.411cm" svg:y="18.317cm" svg:viewBox="0 0 211 212" svg:d="M104 212c60 0 107-47 107-105 0-59-47-107-107-107-58 0-104 48-104 107 0 58 46 105 104 105z">
          <text:p/>
        </draw:path>
        <draw:path draw:style-name="gr4" draw:text-style-name="P4" draw:layer="layout" svg:width="0.236cm" svg:height="0.236cm" svg:x="14.397cm" svg:y="18.305cm" svg:viewBox="0 0 237 237" svg:d="M119 237c-65 0-119-55-119-119 0-66 54-118 119-118 64 0 118 52 118 118 0 64-54 119-118 119zM119 26c-52 0-93 41-93 92 0 52 41 93 93 93 50 0 92-41 92-93 0-51-42-92-92-92z">
          <text:p/>
        </draw:path>
        <draw:frame draw:style-name="gr20" draw:text-style-name="P8" draw:layer="layout" svg:width="0.246cm" svg:height="0.289cm" svg:x="14.633cm" svg:y="15.777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4.694cm" svg:y1="18.536cm" svg:x2="20.446cm" svg:y2="18.536cm">
          <text:p/>
        </draw:line>
        <draw:path draw:style-name="gr1" draw:text-style-name="P1" draw:layer="layout" svg:width="0.21cm" svg:height="0.209cm" svg:x="14.411cm" svg:y="18.812cm" svg:viewBox="0 0 211 210" svg:d="M104 210c60 0 107-47 107-104 0-59-47-106-107-106-58 0-104 47-104 106 0 57 46 104 104 104z">
          <text:p/>
        </draw:path>
        <draw:path draw:style-name="gr4" draw:text-style-name="P4" draw:layer="layout" svg:width="0.236cm" svg:height="0.237cm" svg:x="14.397cm" svg:y="18.798cm" svg:viewBox="0 0 237 238" svg:d="M119 238c-65 0-119-55-119-119s54-119 119-119c64 0 118 55 118 119s-54 119-118 119zM119 26c-52 0-93 43-93 93 0 51 41 93 93 93 50 0 92-42 92-93 0-50-42-93-92-93z">
          <text:p/>
        </draw:path>
        <draw:frame draw:style-name="gr20" draw:text-style-name="P8" draw:layer="layout" svg:width="0.246cm" svg:height="0.289cm" svg:x="14.633cm" svg:y="16.27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4.694cm" svg:y1="19.029cm" svg:x2="20.446cm" svg:y2="19.029cm">
          <text:p/>
        </draw:line>
        <draw:path draw:style-name="gr1" draw:text-style-name="P1" draw:layer="layout" svg:width="0.21cm" svg:height="0.209cm" svg:x="14.411cm" svg:y="19.306cm" svg:viewBox="0 0 211 210" svg:d="M104 210c60 0 107-47 107-105 0-57-47-105-107-105-58 0-104 48-104 105 0 58 46 105 104 105z">
          <text:p/>
        </draw:path>
        <draw:path draw:style-name="gr4" draw:text-style-name="P4" draw:layer="layout" svg:width="0.236cm" svg:height="0.237cm" svg:x="14.397cm" svg:y="19.292cm" svg:viewBox="0 0 237 238" svg:d="M119 238c-65 0-119-53-119-120 0-63 54-118 119-118 64 0 118 55 118 118 0 67-54 120-118 120zM119 26c-52 0-93 43-93 92 0 52 41 94 93 94 50 0 92-42 92-94 0-49-42-92-92-92z">
          <text:p/>
        </draw:path>
        <draw:frame draw:style-name="gr20" draw:text-style-name="P8" draw:layer="layout" svg:width="0.246cm" svg:height="0.289cm" svg:x="14.633cm" svg:y="18.309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4.694cm" svg:y1="19.523cm" svg:x2="20.446cm" svg:y2="19.523cm">
          <text:p/>
        </draw:line>
        <draw:path draw:style-name="gr1" draw:text-style-name="P1" draw:layer="layout" svg:width="0.21cm" svg:height="0.21cm" svg:x="14.411cm" svg:y="19.8cm" svg:viewBox="0 0 211 211" svg:d="M104 211c60 0 107-48 107-106s-47-105-107-105c-58 0-104 47-104 105s46 106 104 106z">
          <text:p/>
        </draw:path>
        <draw:path draw:style-name="gr4" draw:text-style-name="P4" draw:layer="layout" svg:width="0.236cm" svg:height="0.236cm" svg:x="14.397cm" svg:y="19.786cm" svg:viewBox="0 0 237 237" svg:d="M119 237c-65 0-119-54-119-119 0-64 54-118 119-118 64 0 118 54 118 118 0 65-54 119-118 119zM119 26c-52 0-93 42-93 92 0 52 41 93 93 93 50 0 92-41 92-93 0-50-42-92-92-92z">
          <text:p/>
        </draw:path>
        <draw:frame draw:style-name="gr20" draw:text-style-name="P8" draw:layer="layout" svg:width="0.246cm" svg:height="0.289cm" svg:x="14.633cm" svg:y="18.803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4.694cm" svg:y1="20.016cm" svg:x2="20.446cm" svg:y2="20.016cm">
          <text:p/>
        </draw:line>
        <draw:path draw:style-name="gr1" draw:text-style-name="P1" draw:layer="layout" svg:width="0.21cm" svg:height="0.211cm" svg:x="14.411cm" svg:y="20.293cm" svg:viewBox="0 0 211 212" svg:d="M104 212c60 0 107-49 107-107s-47-105-107-105c-58 0-104 47-104 105s46 107 104 107z">
          <text:p/>
        </draw:path>
        <draw:path draw:style-name="gr4" draw:text-style-name="P4" draw:layer="layout" svg:width="0.236cm" svg:height="0.236cm" svg:x="14.397cm" svg:y="20.28cm" svg:viewBox="0 0 237 237" svg:d="M119 237c-65 0-119-53-119-120 0-63 54-117 119-117 64 0 118 54 118 117 0 67-54 120-118 120zM119 25c-52 0-93 41-93 92 0 53 41 94 93 94 50 0 92-41 92-94 0-51-42-92-92-92z">
          <text:p/>
        </draw:path>
        <draw:frame draw:style-name="gr20" draw:text-style-name="P8" draw:layer="layout" svg:width="0.246cm" svg:height="0.289cm" svg:x="14.633cm" svg:y="19.297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4.694cm" svg:y1="20.51cm" svg:x2="20.446cm" svg:y2="20.51cm">
          <text:p/>
        </draw:line>
        <draw:path draw:style-name="gr1" draw:text-style-name="P1" draw:layer="layout" svg:width="0.21cm" svg:height="0.211cm" svg:x="14.411cm" svg:y="20.787cm" svg:viewBox="0 0 211 212" svg:d="M104 212c60 0 107-47 107-106s-47-106-107-106c-58 0-104 47-104 106s46 106 104 106z">
          <text:p/>
        </draw:path>
        <draw:path draw:style-name="gr4" draw:text-style-name="P4" draw:layer="layout" svg:width="0.236cm" svg:height="0.235cm" svg:x="14.397cm" svg:y="20.775cm" svg:viewBox="0 0 237 236" svg:d="M119 236c-65 0-119-53-119-119 0-64 54-117 119-117 64 0 118 53 118 117 0 66-54 119-118 119zM119 25c-52 0-93 42-93 92 0 52 41 93 93 93 50 0 92-41 92-93 0-50-42-92-92-92z">
          <text:p/>
        </draw:path>
        <draw:frame draw:style-name="gr20" draw:text-style-name="P8" draw:layer="layout" svg:width="0.246cm" svg:height="0.289cm" svg:x="14.633cm" svg:y="19.795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4.694cm" svg:y1="21.004cm" svg:x2="20.446cm" svg:y2="21.004cm">
          <text:p/>
        </draw:line>
        <draw:path draw:style-name="gr1" draw:text-style-name="P1" draw:layer="layout" svg:width="0.21cm" svg:height="0.21cm" svg:x="14.411cm" svg:y="21.281cm" svg:viewBox="0 0 211 211" svg:d="M104 211c60 0 107-46 107-106 0-58-47-105-107-105-58 0-104 47-104 105 0 60 46 106 104 106z">
          <text:p/>
        </draw:path>
        <draw:path draw:style-name="gr4" draw:text-style-name="P4" draw:layer="layout" svg:width="0.236cm" svg:height="0.234cm" svg:x="14.397cm" svg:y="21.269cm" svg:viewBox="0 0 237 235" svg:d="M119 235c-65 0-119-52-119-119 0-64 54-116 119-116 64 0 118 52 118 116 0 67-54 119-118 119zM119 24c-52 0-93 42-93 92 0 53 41 95 93 95 50 0 92-42 92-95 0-50-42-92-92-92z">
          <text:p/>
        </draw:path>
        <draw:frame draw:style-name="gr20" draw:text-style-name="P8" draw:layer="layout" svg:width="0.246cm" svg:height="0.289cm" svg:x="14.633cm" svg:y="20.289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4.694cm" svg:y1="21.498cm" svg:x2="20.446cm" svg:y2="21.498cm">
          <text:p/>
        </draw:line>
        <draw:path draw:style-name="gr1" draw:text-style-name="P1" draw:layer="layout" svg:width="0.21cm" svg:height="0.211cm" svg:x="14.411cm" svg:y="23.281cm" svg:viewBox="0 0 211 212" svg:d="M104 212c60 0 107-47 107-105s-47-107-107-107c-58 0-104 49-104 107s46 105 104 105z">
          <text:p/>
        </draw:path>
        <draw:path draw:style-name="gr4" draw:text-style-name="P4" draw:layer="layout" svg:width="0.236cm" svg:height="0.237cm" svg:x="14.397cm" svg:y="23.269cm" svg:viewBox="0 0 237 238" svg:d="M119 238c-65 0-119-55-119-119 0-66 54-119 119-119 64 0 118 53 118 119 0 64-54 119-118 119zM119 26c-52 0-93 41-93 93 0 51 41 92 93 92 50 0 92-41 92-92 0-52-42-93-92-93z">
          <text:p/>
        </draw:path>
        <draw:frame draw:style-name="gr20" draw:text-style-name="P8" draw:layer="layout" svg:width="0.246cm" svg:height="0.289cm" svg:x="14.633cm" svg:y="20.782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4.694cm" svg:y1="23.5cm" svg:x2="20.446cm" svg:y2="23.5cm">
          <text:p/>
        </draw:line>
        <draw:path draw:style-name="gr1" draw:text-style-name="P1" draw:layer="layout" svg:width="0.21cm" svg:height="0.211cm" svg:x="14.411cm" svg:y="23.775cm" svg:viewBox="0 0 211 212" svg:d="M104 212c60 0 107-47 107-105 0-59-47-107-107-107-58 0-104 48-104 107 0 58 46 105 104 105z">
          <text:p/>
        </draw:path>
        <draw:path draw:style-name="gr4" draw:text-style-name="P4" draw:layer="layout" svg:width="0.236cm" svg:height="0.236cm" svg:x="14.397cm" svg:y="23.763cm" svg:viewBox="0 0 237 237" svg:d="M119 237c-65 0-119-54-119-118 0-67 54-119 119-119 64 0 118 52 118 119 0 64-54 118-118 118zM119 26c-52 0-93 40-93 93 0 50 41 92 93 92 50 0 92-42 92-92 0-53-42-93-92-93z">
          <text:p/>
        </draw:path>
        <draw:frame draw:style-name="gr20" draw:text-style-name="P8" draw:layer="layout" svg:width="0.246cm" svg:height="0.289cm" svg:x="14.633cm" svg:y="21.276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4.694cm" svg:y1="23.994cm" svg:x2="20.446cm" svg:y2="23.994cm">
          <text:p/>
        </draw:line>
        <draw:path draw:style-name="gr1" draw:text-style-name="P1" draw:layer="layout" svg:width="0.21cm" svg:height="0.211cm" svg:x="14.411cm" svg:y="24.27cm" svg:viewBox="0 0 211 212" svg:d="M104 212c60 0 107-49 107-107s-47-105-107-105c-58 0-104 47-104 105s46 107 104 107z">
          <text:p/>
        </draw:path>
        <draw:path draw:style-name="gr4" draw:text-style-name="P4" draw:layer="layout" svg:width="0.236cm" svg:height="0.236cm" svg:x="14.397cm" svg:y="24.257cm" svg:viewBox="0 0 237 237" svg:d="M119 237c-65 0-119-54-119-119 0-66 54-118 119-118 64 0 118 52 118 118 0 65-54 119-118 119zM119 25c-52 0-93 41-93 93s41 93 93 93c50 0 92-41 92-93s-42-93-92-93z">
          <text:p/>
        </draw:path>
        <draw:frame draw:style-name="gr20" draw:text-style-name="P8" draw:layer="layout" svg:width="0.246cm" svg:height="0.289cm" svg:x="14.633cm" svg:y="23.277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4.694cm" svg:y1="24.487cm" svg:x2="20.446cm" svg:y2="24.487cm">
          <text:p/>
        </draw:line>
        <draw:path draw:style-name="gr1" draw:text-style-name="P1" draw:layer="layout" svg:width="0.21cm" svg:height="0.211cm" svg:x="14.411cm" svg:y="24.764cm" svg:viewBox="0 0 211 212" svg:d="M104 212c60 0 107-48 107-107 0-58-47-105-107-105-58 0-104 47-104 105 0 59 46 107 104 107z">
          <text:p/>
        </draw:path>
        <draw:path draw:style-name="gr4" draw:text-style-name="P4" draw:layer="layout" svg:width="0.236cm" svg:height="0.237cm" svg:x="14.397cm" svg:y="24.75cm" svg:viewBox="0 0 237 238" svg:d="M119 238c-65 0-119-52-119-120 0-64 54-118 119-118 64 0 118 54 118 118 0 68-54 120-118 120zM119 26c-52 0-93 41-93 92 0 53 41 94 93 94 50 0 92-41 92-94 0-51-42-92-92-92z">
          <text:p/>
        </draw:path>
        <draw:frame draw:style-name="gr20" draw:text-style-name="P8" draw:layer="layout" svg:width="0.246cm" svg:height="0.289cm" svg:x="14.633cm" svg:y="23.77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4.694cm" svg:y1="24.981cm" svg:x2="20.446cm" svg:y2="24.981cm">
          <text:p/>
        </draw:line>
        <draw:path draw:style-name="gr1" draw:text-style-name="P1" draw:layer="layout" svg:width="0.21cm" svg:height="0.21cm" svg:x="14.411cm" svg:y="25.258cm" svg:viewBox="0 0 211 211" svg:d="M104 211c60 0 107-46 107-106 0-59-47-105-107-105-58 0-104 46-104 105 0 60 46 106 104 106z">
          <text:p/>
        </draw:path>
        <draw:path draw:style-name="gr4" draw:text-style-name="P4" draw:layer="layout" svg:width="0.236cm" svg:height="0.236cm" svg:x="14.397cm" svg:y="25.244cm" svg:viewBox="0 0 237 237" svg:d="M119 237c-65 0-119-52-119-119 0-64 54-118 119-118 64 0 118 54 118 118 0 67-54 119-118 119zM119 26c-52 0-93 42-93 92 0 53 41 94 93 94 50 0 92-41 92-94 0-50-42-92-92-92z">
          <text:p/>
        </draw:path>
        <draw:frame draw:style-name="gr20" draw:text-style-name="P8" draw:layer="layout" svg:width="0.246cm" svg:height="0.289cm" svg:x="14.633cm" svg:y="24.264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4.694cm" svg:y1="25.475cm" svg:x2="20.446cm" svg:y2="25.475cm">
          <text:p/>
        </draw:line>
        <draw:path draw:style-name="gr1" draw:text-style-name="P1" draw:layer="layout" svg:width="0.21cm" svg:height="0.21cm" svg:x="14.411cm" svg:y="25.752cm" svg:viewBox="0 0 211 211" svg:d="M104 211c60 0 107-49 107-105 0-60-47-106-107-106-58 0-104 46-104 106 0 56 46 105 104 105z">
          <text:p/>
        </draw:path>
        <draw:path draw:style-name="gr4" draw:text-style-name="P4" draw:layer="layout" svg:width="0.236cm" svg:height="0.236cm" svg:x="14.397cm" svg:y="25.738cm" svg:viewBox="0 0 237 237" svg:d="M119 237c-65 0-119-52-119-116 0-67 54-121 119-121 64 0 118 54 118 121 0 64-54 116-118 116zM119 25c-52 0-93 43-93 96 0 50 41 92 93 92 50 0 92-42 92-92 0-53-42-96-92-96z">
          <text:p/>
        </draw:path>
        <draw:frame draw:style-name="gr20" draw:text-style-name="P8" draw:layer="layout" svg:width="0.246cm" svg:height="0.289cm" svg:x="14.633cm" svg:y="24.758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4.694cm" svg:y1="25.969cm" svg:x2="20.446cm" svg:y2="25.969cm">
          <text:p/>
        </draw:line>
        <draw:path draw:style-name="gr1" draw:text-style-name="P1" draw:layer="layout" svg:width="0.21cm" svg:height="0.211cm" svg:x="14.411cm" svg:y="26.245cm" svg:viewBox="0 0 211 212" svg:d="M104 212c60 0 107-49 107-108 0-57-47-104-107-104-58 0-104 47-104 104 0 59 46 108 104 108z">
          <text:p/>
        </draw:path>
        <draw:path draw:style-name="gr4" draw:text-style-name="P4" draw:layer="layout" svg:width="0.236cm" svg:height="0.235cm" svg:x="14.397cm" svg:y="26.233cm" svg:viewBox="0 0 237 236" svg:d="M119 236c-65 0-119-53-119-119 0-64 54-117 119-117 64 0 118 53 118 117 0 66-54 119-118 119zM119 24c-52 0-93 43-93 93 0 51 41 95 93 95 50 0 92-44 92-95 0-50-42-93-92-93z">
          <text:p/>
        </draw:path>
        <draw:frame draw:style-name="gr20" draw:text-style-name="P8" draw:layer="layout" svg:width="0.246cm" svg:height="0.289cm" svg:x="14.633cm" svg:y="25.252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14.694cm" svg:y1="26.462cm" svg:x2="20.446cm" svg:y2="26.462cm">
          <text:p/>
        </draw:line>
        <draw:path draw:style-name="gr1" draw:text-style-name="P1" draw:layer="layout" svg:width="0.212cm" svg:height="0.211cm" svg:x="7.808cm" svg:y="14.296cm" svg:viewBox="0 0 213 212" svg:d="M107 212c58 0 106-47 106-105s-48-107-106-107c-59 0-107 49-107 107s48 105 107 105z">
          <text:p/>
        </draw:path>
        <draw:path draw:style-name="gr4" draw:text-style-name="P4" draw:layer="layout" svg:width="0.236cm" svg:height="0.237cm" svg:x="7.796cm" svg:y="14.284cm" svg:viewBox="0 0 237 238" svg:d="M119 238c-65 0-119-54-119-120s54-118 119-118c66 0 118 52 118 118s-52 120-118 120zM119 26c-51 0-93 41-93 92 0 52 42 93 93 93 52 0 92-41 92-93 0-51-40-92-92-92z">
          <text:p/>
        </draw:path>
        <draw:frame draw:style-name="gr20" draw:text-style-name="P8" draw:layer="layout" svg:width="0.246cm" svg:height="0.289cm" svg:x="14.633cm" svg:y="25.746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8.093cm" svg:y1="14.515cm" svg:x2="13.843cm" svg:y2="14.515cm">
          <text:p/>
        </draw:line>
        <draw:path draw:style-name="gr1" draw:text-style-name="P1" draw:layer="layout" svg:width="0.212cm" svg:height="0.212cm" svg:x="7.808cm" svg:y="14.79cm" svg:viewBox="0 0 213 213" svg:d="M107 213c58 0 106-48 106-106 0-59-48-107-106-107-59 0-107 48-107 107 0 58 48 106 107 106z">
          <text:p/>
        </draw:path>
        <draw:path draw:style-name="gr4" draw:text-style-name="P4" draw:layer="layout" svg:width="0.236cm" svg:height="0.236cm" svg:x="7.796cm" svg:y="14.778cm" svg:viewBox="0 0 237 237" svg:d="M119 237c-65 0-119-52-119-119 0-66 54-118 119-118 66 0 118 52 118 118 0 67-52 119-118 119zM119 26c-51 0-93 40-93 92 0 53 42 93 93 93 52 0 92-40 92-93 0-52-40-92-92-92z">
          <text:p/>
        </draw:path>
        <draw:frame draw:style-name="gr20" draw:text-style-name="P8" draw:layer="layout" svg:width="0.246cm" svg:height="0.289cm" svg:x="14.633cm" svg:y="26.24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8.093cm" svg:y1="15.009cm" svg:x2="13.843cm" svg:y2="15.009cm">
          <text:p/>
        </draw:line>
        <draw:path draw:style-name="gr1" draw:text-style-name="P1" draw:layer="layout" svg:width="0.212cm" svg:height="0.211cm" svg:x="7.808cm" svg:y="15.285cm" svg:viewBox="0 0 213 212" svg:d="M107 212c58 0 106-48 106-107 0-58-48-105-106-105-59 0-107 47-107 105 0 59 48 107 107 107z">
          <text:p/>
        </draw:path>
        <draw:path draw:style-name="gr4" draw:text-style-name="P4" draw:layer="layout" svg:width="0.236cm" svg:height="0.237cm" svg:x="7.796cm" svg:y="15.271cm" svg:viewBox="0 0 237 238" svg:d="M119 238c-65 0-119-53-119-119s54-119 119-119c66 0 118 53 118 119s-52 119-118 119zM119 26c-51 0-93 43-93 93 0 52 42 93 93 93 52 0 92-41 92-93 0-50-40-93-92-93z">
          <text:p/>
        </draw:path>
        <draw:frame draw:style-name="gr20" draw:text-style-name="P8" draw:layer="layout" svg:width="0.246cm" svg:height="0.289cm" svg:x="8.033cm" svg:y="14.291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8.093cm" svg:y1="15.502cm" svg:x2="13.843cm" svg:y2="15.502cm">
          <text:p/>
        </draw:line>
        <draw:path draw:style-name="gr1" draw:text-style-name="P1" draw:layer="layout" svg:width="0.212cm" svg:height="0.211cm" svg:x="7.808cm" svg:y="15.779cm" svg:viewBox="0 0 213 212" svg:d="M107 212c58 0 106-47 106-107 0-58-48-105-106-105-59 0-107 47-107 105 0 60 48 107 107 107z">
          <text:p/>
        </draw:path>
        <draw:path draw:style-name="gr4" draw:text-style-name="P4" draw:layer="layout" svg:width="0.236cm" svg:height="0.237cm" svg:x="7.796cm" svg:y="15.765cm" svg:viewBox="0 0 237 238" svg:d="M119 238c-65 0-119-53-119-119 0-64 54-119 119-119 66 0 118 55 118 119 0 66-52 119-118 119zM119 26c-51 0-93 43-93 93 0 52 42 93 93 93 52 0 92-41 92-93 0-50-40-93-92-93z">
          <text:p/>
        </draw:path>
        <draw:frame draw:style-name="gr20" draw:text-style-name="P8" draw:layer="layout" svg:width="0.246cm" svg:height="0.289cm" svg:x="8.033cm" svg:y="14.785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8.093cm" svg:y1="15.996cm" svg:x2="13.843cm" svg:y2="15.996cm">
          <text:p/>
        </draw:line>
        <draw:path draw:style-name="gr1" draw:text-style-name="P1" draw:layer="layout" svg:width="0.212cm" svg:height="0.21cm" svg:x="7.808cm" svg:y="16.273cm" svg:viewBox="0 0 213 211" svg:d="M107 211c58 0 106-48 106-106s-48-105-106-105c-59 0-107 47-107 105s48 106 107 106z">
          <text:p/>
        </draw:path>
        <draw:path draw:style-name="gr4" draw:text-style-name="P4" draw:layer="layout" svg:width="0.236cm" svg:height="0.236cm" svg:x="7.796cm" svg:y="16.259cm" svg:viewBox="0 0 237 237" svg:d="M119 237c-65 0-119-52-119-117 0-66 54-120 119-120 66 0 118 54 118 120 0 65-52 117-118 117zM119 26c-51 0-93 43-93 94s42 92 93 92c52 0 92-41 92-92s-40-94-92-94z">
          <text:p/>
        </draw:path>
        <draw:frame draw:style-name="gr20" draw:text-style-name="P8" draw:layer="layout" svg:width="0.246cm" svg:height="0.289cm" svg:x="8.033cm" svg:y="15.279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8.093cm" svg:y1="16.49cm" svg:x2="13.843cm" svg:y2="16.49cm">
          <text:p/>
        </draw:line>
        <draw:path draw:style-name="gr1" draw:text-style-name="P1" draw:layer="layout" svg:width="0.212cm" svg:height="0.211cm" svg:x="7.808cm" svg:y="16.766cm" svg:viewBox="0 0 213 212" svg:d="M107 212c58 0 106-47 106-107 0-58-48-105-106-105-59 0-107 47-107 105 0 60 48 107 107 107z">
          <text:p/>
        </draw:path>
        <draw:path draw:style-name="gr4" draw:text-style-name="P4" draw:layer="layout" svg:width="0.236cm" svg:height="0.235cm" svg:x="7.796cm" svg:y="16.754cm" svg:viewBox="0 0 237 236" svg:d="M119 236c-65 0-119-53-119-118 0-64 54-118 119-118 66 0 118 54 118 118 0 65-52 118-118 118zM119 24c-51 0-93 44-93 94 0 51 42 92 93 92 52 0 92-41 92-92 0-50-40-94-92-94z">
          <text:p/>
        </draw:path>
        <draw:frame draw:style-name="gr20" draw:text-style-name="P8" draw:layer="layout" svg:width="0.246cm" svg:height="0.289cm" svg:x="8.033cm" svg:y="15.773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8.093cm" svg:y1="16.985cm" svg:x2="13.843cm" svg:y2="16.985cm">
          <text:p/>
        </draw:line>
        <draw:path draw:style-name="gr1" draw:text-style-name="P1" draw:layer="layout" svg:width="0.212cm" svg:height="0.211cm" svg:x="7.808cm" svg:y="17.26cm" svg:viewBox="0 0 213 212" svg:d="M107 212c58 0 106-49 106-107 0-59-48-105-106-105-59 0-107 46-107 105 0 58 48 107 107 107z">
          <text:p/>
        </draw:path>
        <draw:path draw:style-name="gr4" draw:text-style-name="P4" draw:layer="layout" svg:width="0.236cm" svg:height="0.235cm" svg:x="7.796cm" svg:y="17.248cm" svg:viewBox="0 0 237 236" svg:d="M119 236c-65 0-119-53-119-119 0-64 54-117 119-117 66 0 118 53 118 117 0 66-52 119-118 119zM119 24c-51 0-93 44-93 93 0 52 42 95 93 95 52 0 92-43 92-95 0-49-40-93-92-93z">
          <text:p/>
        </draw:path>
        <draw:frame draw:style-name="gr20" draw:text-style-name="P8" draw:layer="layout" svg:width="0.246cm" svg:height="0.289cm" svg:x="8.033cm" svg:y="16.267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8.093cm" svg:y1="17.477cm" svg:x2="13.843cm" svg:y2="17.477cm">
          <text:p/>
        </draw:line>
        <draw:path draw:style-name="gr1" draw:text-style-name="P1" draw:layer="layout" svg:width="0.212cm" svg:height="0.21cm" svg:x="7.808cm" svg:y="17.754cm" svg:viewBox="0 0 213 211" svg:d="M107 211c58 0 106-47 106-107 0-58-48-104-106-104-59 0-107 46-107 104 0 60 48 107 107 107z">
          <text:p/>
        </draw:path>
        <draw:path draw:style-name="gr4" draw:text-style-name="P4" draw:layer="layout" svg:width="0.236cm" svg:height="0.236cm" svg:x="7.796cm" svg:y="17.742cm" svg:viewBox="0 0 237 237" svg:d="M119 237c-65 0-119-54-119-120 0-65 54-117 119-117 66 0 118 52 118 117 0 66-52 120-118 120zM119 24c-51 0-93 42-93 93 0 52 42 94 93 94 52 0 92-42 92-94 0-51-40-93-92-93z">
          <text:p/>
        </draw:path>
        <draw:frame draw:style-name="gr20" draw:text-style-name="P8" draw:layer="layout" svg:width="0.246cm" svg:height="0.289cm" svg:x="8.033cm" svg:y="16.761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8.093cm" svg:y1="17.972cm" svg:x2="13.843cm" svg:y2="17.972cm">
          <text:p/>
        </draw:line>
        <draw:path draw:style-name="gr1" draw:text-style-name="P1" draw:layer="layout" svg:width="0.212cm" svg:height="0.211cm" svg:x="7.808cm" svg:y="18.247cm" svg:viewBox="0 0 213 212" svg:d="M107 212c58 0 106-46 106-105 0-58-48-107-106-107-59 0-107 49-107 107 0 59 48 105 107 105z">
          <text:p/>
        </draw:path>
        <draw:path draw:style-name="gr4" draw:text-style-name="P4" draw:layer="layout" svg:width="0.236cm" svg:height="0.236cm" svg:x="7.796cm" svg:y="18.236cm" svg:viewBox="0 0 237 237" svg:d="M119 237c-65 0-119-54-119-119 0-66 54-118 119-118 66 0 118 52 118 118 0 65-52 119-118 119zM119 25c-51 0-93 42-93 93 0 52 42 93 93 93 52 0 92-41 92-93 0-51-40-93-92-93z">
          <text:p/>
        </draw:path>
        <draw:frame draw:style-name="gr20" draw:text-style-name="P8" draw:layer="layout" svg:width="0.246cm" svg:height="0.289cm" svg:x="8.033cm" svg:y="17.255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8.093cm" svg:y1="18.466cm" svg:x2="13.843cm" svg:y2="18.466cm">
          <text:p/>
        </draw:line>
        <draw:path draw:style-name="gr1" draw:text-style-name="P1" draw:layer="layout" svg:width="0.212cm" svg:height="0.211cm" svg:x="7.808cm" svg:y="18.741cm" svg:viewBox="0 0 213 212" svg:d="M107 212c58 0 106-47 106-105 0-59-48-107-106-107-59 0-107 48-107 107 0 58 48 105 107 105z">
          <text:p/>
        </draw:path>
        <draw:path draw:style-name="gr4" draw:text-style-name="P4" draw:layer="layout" svg:width="0.236cm" svg:height="0.237cm" svg:x="7.796cm" svg:y="18.729cm" svg:viewBox="0 0 237 238" svg:d="M119 238c-65 0-119-53-119-119s54-119 119-119c66 0 118 53 118 119s-52 119-118 119zM119 26c-51 0-93 42-93 93 0 52 42 93 93 93 52 0 92-41 92-93 0-51-40-93-92-93z">
          <text:p/>
        </draw:path>
        <draw:frame draw:style-name="gr20" draw:text-style-name="P8" draw:layer="layout" svg:width="0.246cm" svg:height="0.289cm" svg:x="8.033cm" svg:y="17.749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8.093cm" svg:y1="18.96cm" svg:x2="13.843cm" svg:y2="18.96cm">
          <text:p/>
        </draw:line>
        <draw:path draw:style-name="gr1" draw:text-style-name="P1" draw:layer="layout" svg:width="0.212cm" svg:height="0.212cm" svg:x="7.808cm" svg:y="19.235cm" svg:viewBox="0 0 213 213" svg:d="M107 213c58 0 106-48 106-106 0-59-48-107-106-107-59 0-107 48-107 107 0 58 48 106 107 106z">
          <text:p/>
        </draw:path>
        <draw:path draw:style-name="gr4" draw:text-style-name="P4" draw:layer="layout" svg:width="0.236cm" svg:height="0.236cm" svg:x="7.796cm" svg:y="19.223cm" svg:viewBox="0 0 237 237" svg:d="M119 237c-65 0-119-52-119-119 0-66 54-118 119-118 66 0 118 52 118 118 0 67-52 119-118 119zM119 26c-51 0-93 40-93 92 0 53 42 93 93 93 52 0 92-40 92-93 0-52-40-92-92-92z">
          <text:p/>
        </draw:path>
        <draw:frame draw:style-name="gr20" draw:text-style-name="P8" draw:layer="layout" svg:width="0.246cm" svg:height="0.289cm" svg:x="8.033cm" svg:y="18.242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8.093cm" svg:y1="19.454cm" svg:x2="13.843cm" svg:y2="19.454cm">
          <text:p/>
        </draw:line>
        <draw:path draw:style-name="gr1" draw:text-style-name="P1" draw:layer="layout" svg:width="0.212cm" svg:height="0.211cm" svg:x="7.808cm" svg:y="19.73cm" svg:viewBox="0 0 213 212" svg:d="M107 212c58 0 106-48 106-107 0-58-48-105-106-105-59 0-107 47-107 105 0 59 48 107 107 107z">
          <text:p/>
        </draw:path>
        <draw:path draw:style-name="gr4" draw:text-style-name="P4" draw:layer="layout" svg:width="0.236cm" svg:height="0.237cm" svg:x="7.796cm" svg:y="19.716cm" svg:viewBox="0 0 237 238" svg:d="M119 238c-65 0-119-53-119-119s54-119 119-119c66 0 118 53 118 119s-52 119-118 119zM119 26c-51 0-93 43-93 93 0 52 42 92 93 92 52 0 92-40 92-92 0-50-40-93-92-93z">
          <text:p/>
        </draw:path>
        <draw:frame draw:style-name="gr20" draw:text-style-name="P8" draw:layer="layout" svg:width="0.246cm" svg:height="0.289cm" svg:x="8.033cm" svg:y="18.736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8.093cm" svg:y1="19.947cm" svg:x2="13.843cm" svg:y2="19.947cm">
          <text:p/>
        </draw:line>
        <draw:path draw:style-name="gr1" draw:text-style-name="P1" draw:layer="layout" svg:width="0.212cm" svg:height="0.211cm" svg:x="7.808cm" svg:y="20.224cm" svg:viewBox="0 0 213 212" svg:d="M107 212c58 0 106-47 106-107 0-58-48-105-106-105-59 0-107 47-107 105 0 60 48 107 107 107z">
          <text:p/>
        </draw:path>
        <draw:path draw:style-name="gr4" draw:text-style-name="P4" draw:layer="layout" svg:width="0.236cm" svg:height="0.237cm" svg:x="7.796cm" svg:y="20.21cm" svg:viewBox="0 0 237 238" svg:d="M119 238c-65 0-119-54-119-119 0-64 54-119 119-119 66 0 118 55 118 119 0 65-52 119-118 119zM119 26c-51 0-93 43-93 93 0 51 42 93 93 93 52 0 92-42 92-93 0-50-40-93-92-93z">
          <text:p/>
        </draw:path>
        <draw:frame draw:style-name="gr20" draw:text-style-name="P8" draw:layer="layout" svg:width="0.246cm" svg:height="0.289cm" svg:x="8.033cm" svg:y="19.23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8.093cm" svg:y1="20.441cm" svg:x2="13.843cm" svg:y2="20.441cm">
          <text:p/>
        </draw:line>
        <draw:path draw:style-name="gr1" draw:text-style-name="P1" draw:layer="layout" svg:width="0.212cm" svg:height="0.211cm" svg:x="7.808cm" svg:y="22.29cm" svg:viewBox="0 0 213 212" svg:d="M107 212c58 0 106-48 106-106 0-59-48-106-106-106-59 0-107 47-107 106 0 58 48 106 107 106z">
          <text:p/>
        </draw:path>
        <draw:path draw:style-name="gr4" draw:text-style-name="P4" draw:layer="layout" svg:width="0.236cm" svg:height="0.237cm" svg:x="7.796cm" svg:y="22.276cm" svg:viewBox="0 0 237 238" svg:d="M119 238c-65 0-119-54-119-118 0-66 54-120 119-120 66 0 118 54 118 120 0 64-52 118-118 118zM119 27c-51 0-93 41-93 93s42 92 93 92c52 0 92-40 92-92s-40-93-92-93z">
          <text:p/>
        </draw:path>
        <draw:frame draw:style-name="gr20" draw:text-style-name="P8" draw:layer="layout" svg:width="0.246cm" svg:height="0.289cm" svg:x="8.033cm" svg:y="19.724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8.093cm" svg:y1="22.507cm" svg:x2="13.843cm" svg:y2="22.507cm">
          <text:p/>
        </draw:line>
        <draw:path draw:style-name="gr1" draw:text-style-name="P1" draw:layer="layout" svg:width="0.212cm" svg:height="0.209cm" svg:x="7.808cm" svg:y="22.784cm" svg:viewBox="0 0 213 210" svg:d="M107 210c58 0 106-47 106-104 0-59-48-106-106-106-59 0-107 47-107 106 0 57 48 104 107 104z">
          <text:p/>
        </draw:path>
        <draw:path draw:style-name="gr4" draw:text-style-name="P4" draw:layer="layout" svg:width="0.236cm" svg:height="0.237cm" svg:x="7.796cm" svg:y="22.77cm" svg:viewBox="0 0 237 238" svg:d="M119 238c-65 0-119-53-119-118 0-64 54-120 119-120 66 0 118 56 118 120 0 65-52 118-118 118zM119 27c-51 0-93 43-93 93 0 51 42 92 93 92 52 0 92-41 92-92 0-50-40-93-92-93z">
          <text:p/>
        </draw:path>
        <draw:frame draw:style-name="gr20" draw:text-style-name="P8" draw:layer="layout" svg:width="0.246cm" svg:height="0.289cm" svg:x="8.033cm" svg:y="20.218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8.093cm" svg:y1="23.001cm" svg:x2="13.843cm" svg:y2="23.001cm">
          <text:p/>
        </draw:line>
        <draw:path draw:style-name="gr1" draw:text-style-name="P1" draw:layer="layout" svg:width="0.212cm" svg:height="0.21cm" svg:x="7.808cm" svg:y="23.278cm" svg:viewBox="0 0 213 211" svg:d="M107 211c58 0 106-48 106-107 0-57-48-104-106-104-59 0-107 47-107 104 0 59 48 107 107 107z">
          <text:p/>
        </draw:path>
        <draw:path draw:style-name="gr4" draw:text-style-name="P4" draw:layer="layout" svg:width="0.236cm" svg:height="0.236cm" svg:x="7.796cm" svg:y="23.264cm" svg:viewBox="0 0 237 237" svg:d="M119 237c-65 0-119-53-119-117 0-66 54-120 119-120 66 0 118 54 118 120 0 64-52 117-118 117zM119 26c-51 0-93 43-93 94 0 50 42 91 93 91 52 0 92-41 92-91 0-51-40-94-92-94z">
          <text:p/>
        </draw:path>
        <draw:frame draw:style-name="gr20" draw:text-style-name="P8" draw:layer="layout" svg:width="0.246cm" svg:height="0.289cm" svg:x="8.033cm" svg:y="22.285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8.093cm" svg:y1="23.495cm" svg:x2="13.843cm" svg:y2="23.495cm">
          <text:p/>
        </draw:line>
        <draw:path draw:style-name="gr1" draw:text-style-name="P1" draw:layer="layout" svg:width="0.212cm" svg:height="0.21cm" svg:x="7.808cm" svg:y="23.772cm" svg:viewBox="0 0 213 211" svg:d="M107 211c58 0 106-48 106-106 0-59-48-105-106-105-59 0-107 46-107 105 0 58 48 106 107 106z">
          <text:p/>
        </draw:path>
        <draw:path draw:style-name="gr4" draw:text-style-name="P4" draw:layer="layout" svg:width="0.236cm" svg:height="0.236cm" svg:x="7.796cm" svg:y="23.758cm" svg:viewBox="0 0 237 237" svg:d="M119 237c-65 0-119-54-119-119 0-64 54-118 119-118 66 0 118 54 118 118 0 65-52 119-118 119zM119 25c-51 0-93 43-93 93 0 51 42 93 93 93 52 0 92-42 92-93 0-50-40-93-92-93z">
          <text:p/>
        </draw:path>
        <draw:frame draw:style-name="gr20" draw:text-style-name="P8" draw:layer="layout" svg:width="0.246cm" svg:height="0.289cm" svg:x="8.033cm" svg:y="22.776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8.093cm" svg:y1="23.988cm" svg:x2="13.843cm" svg:y2="23.988cm">
          <text:p/>
        </draw:line>
        <draw:path draw:style-name="gr1" draw:text-style-name="P1" draw:layer="layout" svg:width="0.212cm" svg:height="0.211cm" svg:x="7.808cm" svg:y="24.265cm" svg:viewBox="0 0 213 212" svg:d="M107 212c58 0 106-48 106-107s-48-105-106-105c-59 0-107 46-107 105s48 107 107 107z">
          <text:p/>
        </draw:path>
        <draw:path draw:style-name="gr4" draw:text-style-name="P4" draw:layer="layout" svg:width="0.236cm" svg:height="0.235cm" svg:x="7.796cm" svg:y="24.253cm" svg:viewBox="0 0 237 236" svg:d="M119 236c-65 0-119-53-119-119 0-64 54-117 119-117 66 0 118 53 118 117 0 66-52 119-118 119zM119 24c-51 0-93 41-93 93s42 93 93 93c52 0 92-41 92-93s-40-93-92-93z">
          <text:p/>
        </draw:path>
        <draw:frame draw:style-name="gr20" draw:text-style-name="P8" draw:layer="layout" svg:width="0.246cm" svg:height="0.289cm" svg:x="8.033cm" svg:y="23.27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8.093cm" svg:y1="24.482cm" svg:x2="13.843cm" svg:y2="24.482cm">
          <text:p/>
        </draw:line>
        <draw:path draw:style-name="gr1" draw:text-style-name="P1" draw:layer="layout" svg:width="0.212cm" svg:height="0.21cm" svg:x="7.808cm" svg:y="24.759cm" svg:viewBox="0 0 213 211" svg:d="M107 211c58 0 106-46 106-105 0-58-48-106-106-106-59 0-107 48-107 106 0 59 48 105 107 105z">
          <text:p/>
        </draw:path>
        <draw:path draw:style-name="gr4" draw:text-style-name="P4" draw:layer="layout" svg:width="0.236cm" svg:height="0.236cm" svg:x="7.796cm" svg:y="24.747cm" svg:viewBox="0 0 237 237" svg:d="M119 237c-65 0-119-54-119-121 0-64 54-116 119-116 66 0 118 52 118 116 0 67-52 121-118 121zM119 24c-51 0-93 42-93 92 0 53 42 95 93 95 52 0 92-42 92-95 0-50-40-92-92-92z">
          <text:p/>
        </draw:path>
        <draw:frame draw:style-name="gr20" draw:text-style-name="P8" draw:layer="layout" svg:width="0.246cm" svg:height="0.289cm" svg:x="8.033cm" svg:y="23.763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8.093cm" svg:y1="24.976cm" svg:x2="13.843cm" svg:y2="24.976cm">
          <text:p/>
        </draw:line>
        <draw:path draw:style-name="gr1" draw:text-style-name="P1" draw:layer="layout" svg:width="0.212cm" svg:height="0.211cm" svg:x="7.808cm" svg:y="25.252cm" svg:viewBox="0 0 213 212" svg:d="M107 212c58 0 106-46 106-106 0-59-48-106-106-106-59 0-107 47-107 106 0 60 48 106 107 106z">
          <text:p/>
        </draw:path>
        <draw:path draw:style-name="gr4" draw:text-style-name="P4" draw:layer="layout" svg:width="0.236cm" svg:height="0.234cm" svg:x="7.796cm" svg:y="25.241cm" svg:viewBox="0 0 237 235" svg:d="M119 235c-65 0-119-52-119-119 0-64 54-116 119-116 66 0 118 52 118 116 0 67-52 119-118 119zM119 25c-51 0-93 41-93 91 0 53 42 95 93 95 52 0 92-42 92-95 0-50-40-91-92-91z">
          <text:p/>
        </draw:path>
        <draw:frame draw:style-name="gr20" draw:text-style-name="P8" draw:layer="layout" svg:width="0.246cm" svg:height="0.289cm" svg:x="8.033cm" svg:y="24.257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8.093cm" svg:y1="25.471cm" svg:x2="13.843cm" svg:y2="25.471cm">
          <text:p/>
        </draw:line>
        <draw:path draw:style-name="gr1" draw:text-style-name="P1" draw:layer="layout" svg:width="0.212cm" svg:height="0.211cm" svg:x="7.808cm" svg:y="25.746cm" svg:viewBox="0 0 213 212" svg:d="M107 212c58 0 106-48 106-105 0-59-48-107-106-107-59 0-107 48-107 107 0 57 48 105 107 105z">
          <text:p/>
        </draw:path>
        <draw:path draw:style-name="gr4" draw:text-style-name="P4" draw:layer="layout" svg:width="0.236cm" svg:height="0.235cm" svg:x="7.796cm" svg:y="25.734cm" svg:viewBox="0 0 237 236" svg:d="M119 236c-65 0-119-52-119-118s54-118 119-118c66 0 118 52 118 118s-52 118-118 118zM119 26c-51 0-93 41-93 92 0 53 42 94 93 94 52 0 92-41 92-94 0-51-40-92-92-92z">
          <text:p/>
        </draw:path>
        <draw:frame draw:style-name="gr20" draw:text-style-name="P8" draw:layer="layout" svg:width="0.246cm" svg:height="0.289cm" svg:x="8.033cm" svg:y="24.755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8.093cm" svg:y1="25.965cm" svg:x2="13.843cm" svg:y2="25.965cm">
          <text:p/>
        </draw:line>
        <draw:path draw:style-name="gr1" draw:text-style-name="P1" draw:layer="layout" svg:width="0.212cm" svg:height="0.211cm" svg:x="7.808cm" svg:y="26.24cm" svg:viewBox="0 0 213 212" svg:d="M107 212c58 0 106-47 106-106 0-58-48-106-106-106-59 0-107 48-107 106 0 59 48 106 107 106z">
          <text:p/>
        </draw:path>
        <draw:path draw:style-name="gr4" draw:text-style-name="P4" draw:layer="layout" svg:width="0.236cm" svg:height="0.236cm" svg:x="7.796cm" svg:y="26.228cm" svg:viewBox="0 0 237 237" svg:d="M119 237c-65 0-119-52-119-118 0-67 54-119 119-119 66 0 118 52 118 119 0 66-52 118-118 118zM119 26c-51 0-93 40-93 93 0 52 42 93 93 93 52 0 92-41 92-93 0-53-40-93-92-93z">
          <text:p/>
        </draw:path>
        <draw:frame draw:style-name="gr20" draw:text-style-name="P8" draw:layer="layout" svg:width="0.246cm" svg:height="0.289cm" svg:x="8.033cm" svg:y="25.249cm">
          <draw:text-box>
            <text:p text:style-name="P7"><text:span text:style-name="T1"><text:s/></text:span></text:p>
          </draw:text-box>
        </draw:frame>
        <draw:line draw:style-name="gr136" draw:text-style-name="P5" draw:layer="layout" svg:x1="8.093cm" svg:y1="26.464cm" svg:x2="13.843cm" svg:y2="26.464cm">
          <text:p/>
        </draw:line>
        <draw:path draw:style-name="gr4" draw:text-style-name="P4" draw:layer="layout" svg:width="5.833cm" svg:height="0.971cm" svg:x="1.406cm" svg:y="5.03cm" svg:viewBox="0 0 5834 972" svg:d="M5834 754v-534l-220-220h-3717-1897l57 49h245l248 305c-9 28-14 58-17 92-20 6-34 21-34 41s14 37 34 42c3 33 8 64 17 93l-248 303h-245l-57 47h1897 3717zM447 925l57-72h5009c-78 40-155 61-213 72zM655 391v193l-65 84c-19-38-33-84-37-141 18-4 30-20 30-40 0-18-12-33-30-39 4-57 18-103 37-141zM522 142h196c-34 17-78 49-116 101zM602 729c38 52 82 84 116 103h-196zM557 645c5 15 11 27 19 41l-190 239h-58zM386 49l190 238c-8 14-14 29-19 43l-229-281zM5279 49c58 9 142 29 228 72h-5003l-57-72zM5785 362c-95-188-257-273-387-313h196l191 191zM5785 552c-55 136-144 223-237 281v-1h-4779c-11-3-94-31-153-118l87-112v-228l-87-114c59-87 142-115 153-118h4776c95 57 185 145 240 286zM5785 732l-191 193h-185c128-41 284-127 376-309z">
          <text:p/>
        </draw:path>
        <draw:path draw:style-name="gr4" draw:text-style-name="P4" draw:layer="layout" svg:width="0.668cm" svg:height="1.311cm" svg:x="1.093cm" svg:y="4.86cm" svg:viewBox="0 0 669 1312" svg:d="M200 72l416 359v449l-416 362-147-139v-892zM199 0l-36 34-145 137-18 17v23 892 23l18 15 145 139 36 32 35-30 417-362 18-16v-24-449-24l-18-15-417-360z">
          <text:p/>
        </draw:path>
        <draw:path draw:style-name="gr4" draw:text-style-name="P4" draw:layer="layout" svg:width="5.822cm" svg:height="0.973cm" svg:x="1.417cm" svg:y="10.947cm" svg:viewBox="0 0 5823 974" svg:d="M5823 754v-532l-220-222h-3717-1886l57 49h1722l248 305c-9 28-15 58-17 94-20 4-35 19-35 39 0 22 15 37 35 42 2 33 8 65 17 93l-249 303h-1721l-57 49h1886 3717zM1925 925l56-72h3521c-78 40-155 61-213 72zM2133 391v194l-68 83c-18-37-30-84-35-141 17-4 31-20 31-40 0-18-14-33-31-39 5-57 17-103 35-141zM1998 142h196c-32 18-78 49-115 104zM2079 729c37 52 83 84 115 103h-196zM2035 645c4 15 10 29 18 41l-191 239h-57zM2052 290c-7 12-13 26-17 40l-230-281h57zM5268 49c58 9 142 29 228 73h-3515l-56-73zM5774 362c-95-188-257-274-387-313h196l191 194zM5774 552c-53 136-144 225-237 281v-1h-3291c-11-3-93-31-155-118l89-112v-228l-89-112c62-89 144-117 155-120h3288c95 57 185 148 240 286zM5774 734l-191 191h-185c128-41 284-127 376-309z">
          <text:p/>
        </draw:path>
        <draw:path draw:style-name="gr4" draw:text-style-name="P4" draw:layer="layout" svg:width="5.822cm" svg:height="0.972cm" svg:x="1.417cm" svg:y="19.01cm" svg:viewBox="0 0 5823 973" svg:d="M5823 752v-531l-220-221h-3717-1886l57 49h1722l248 302c-9 29-15 60-17 95-20 3-35 20-35 41 0 20 15 35 35 40 2 35 8 66 17 93l-249 306h-1721l-57 47h1886 3717zM1925 926l56-75h3521c-78 42-155 63-213 75zM2133 389v194l-68 83c-18-38-30-84-35-139 17-6 31-22 31-40 0-20-14-35-31-41 5-55 17-103 35-141zM1998 143h196c-32 18-78 49-115 101zM2079 729c37 52 83 82 115 101h-196zM2035 643c4 15 10 29 18 41l-191 242h-57zM2052 288c-7 12-13 26-17 40l-230-279h57zM5268 49c58 10 142 30 228 72h-3515l-56-72zM5774 360c-95-185-257-271-387-311h196l191 192zM5774 550c-53 136-144 225-237 281v-1h-3291c-11-3-93-31-155-118l89-113v-227l-89-111c62-89 144-115 155-118h3288c95 56 185 145 240 283zM5774 732l-191 194h-185c128-44 284-130 376-310z">
          <text:p/>
        </draw:path>
        <draw:path draw:style-name="gr4" draw:text-style-name="P4" draw:layer="layout" svg:width="5.821cm" svg:height="0.971cm" svg:x="8.085cm" svg:y="5.03cm" svg:viewBox="0 0 5822 972" svg:d="M5822 754v-534l-219-220h-3718-1885l57 49h1721l248 305c-8 28-14 58-17 92-20 6-35 21-35 41s15 37 35 42c3 33 9 64 17 93l-248 303h-1721l-57 47h1885 3718zM1923 925l57-72h3522c-78 40-154 61-214 72zM2131 391v193l-65 84c-19-38-31-84-37-141 18-4 30-20 30-40 0-18-12-33-30-39 6-57 18-103 37-141zM1998 142h196c-34 17-78 49-116 101zM2078 729c38 52 82 84 116 103h-196zM2033 645c7 15 13 27 19 41l-190 239h-58zM2052 287c-6 14-12 29-19 43l-229-281h58zM5268 49c58 9 142 29 228 72h-3516l-57-72zM5773 362c-95-188-255-273-387-313h196l191 191zM5773 552c-54 136-144 223-237 281v-1h-3290c-11-3-93-31-154-118l88-112v-228l-88-114c61-87 143-115 154-118h3287c95 57 185 145 240 286zM5773 732l-191 193h-184c129-41 283-127 375-309z">
          <text:p/>
        </draw:path>
        <draw:path draw:style-name="gr4" draw:text-style-name="P4" draw:layer="layout" svg:width="5.821cm" svg:height="0.971cm" svg:x="14.686cm" svg:y="5.03cm" svg:viewBox="0 0 5822 972" svg:d="M5822 754v-534l-221-220h-3717-1884l57 49h1718l250 305c-9 28-16 58-19 92-18 6-32 21-32 41s14 37 34 42c1 33 8 64 17 93l-250 303h-1718l-57 47h1884 3717zM1922 925l57-72h3522c-78 40-156 61-214 72zM2130 391v193l-67 84c-17-38-31-84-35-141 18-4 29-20 29-40 0-18-11-33-29-39 4-57 18-103 35-141zM1997 142h196c-34 17-78 49-116 101zM2077 729c38 52 82 84 116 103h-196zM2032 645c5 15 11 27 17 41l-188 239h-58zM2049 287c-6 14-12 29-17 43l-229-281h56zM5266 49c59 9 142 29 227 72h-3514l-57-72zM5775 362c-98-188-260-273-390-313h196l194 191zM5775 552c-56 136-147 223-240 281v-1h-3291c-11-3-94-31-155-118l90-112v-228l-90-114c61-87 144-115 155-118h3288c95 57 187 145 243 286zM5775 732l-194 193h-184c127-41 283-127 378-309z">
          <text:p/>
        </draw:path>
        <draw:path draw:style-name="gr4" draw:text-style-name="P4" draw:layer="layout" svg:width="5.821cm" svg:height="0.971cm" svg:x="14.686cm" svg:y="11.019cm" svg:viewBox="0 0 5822 972" svg:d="M5822 752v-531l-221-221h-3717-1884l57 49h1718l250 304c-9 27-16 59-19 93-18 5-32 20-32 41 0 20 14 37 34 40 1 35 8 66 17 95l-250 301h-1718l-57 49h1884 3717zM1922 923l57-72h3522c-78 42-156 63-214 72zM2130 391v193l-67 84c-17-38-31-84-35-141 18-6 29-20 29-40 0-18-11-35-29-40 4-56 18-102 35-140zM1997 142h196c-34 19-78 50-116 102zM2077 729c38 52 82 84 116 101h-196zM2032 645c5 15 11 27 17 40l-188 238h-58zM2049 290c-6 12-12 24-17 40l-229-281h56zM5266 49c59 9 142 27 227 72h-3514l-57-72zM5775 362c-98-187-260-275-390-313h196l194 192zM5775 550c-56 138-147 225-240 283v-3h-3291c-11-3-94-29-155-118l90-112v-226l-90-113c61-87 144-116 155-119h3288c95 59 187 146 243 286zM5775 732l-194 191h-184c127-41 283-127 378-307z">
          <text:p/>
        </draw:path>
        <draw:path draw:style-name="gr4" draw:text-style-name="P4" draw:layer="layout" svg:width="5.821cm" svg:height="0.972cm" svg:x="14.686cm" svg:y="17.009cm" svg:viewBox="0 0 5822 973" svg:d="M5822 750v-531l-221-219h-3717-1884l57 49h1718l250 301c-9 28-16 60-19 94-18 4-32 21-32 41s14 37 34 41c1 34 8 66 17 94l-250 303h-1718l-57 50h1884 3717zM1922 923l57-72h3522c-78 40-156 61-214 72zM2130 389v194l-67 83c-17-39-31-84-35-141 18-6 29-20 29-40 0-18-11-35-29-40 4-55 18-102 35-139zM1997 141h196c-34 18-78 50-116 102zM2077 727c38 52 82 84 116 102h-196zM2032 644c5 14 11 26 17 40l-188 239h-58zM2049 288c-6 12-12 26-17 40l-229-279h56zM5266 49c59 9 142 29 227 72h-3514l-57-72zM5775 360c-98-185-260-271-390-311h196l194 191zM5775 548c-56 138-147 225-240 283v-2h-3291c-11-4-94-30-155-117l90-112v-228l-90-112c61-87 144-116 155-119h3288c95 58 187 147 243 284zM5775 730l-194 193h-184c127-42 283-127 378-308z">
          <text:p/>
        </draw:path>
        <draw:path draw:style-name="gr4" draw:text-style-name="P4" draw:layer="layout" svg:width="5.821cm" svg:height="0.973cm" svg:x="14.686cm" svg:y="21.973cm" svg:viewBox="0 0 5822 974" svg:d="M5822 751v-531l-221-220h-3717-1884l57 49h1718l250 303c-9 27-16 58-19 93-18 5-32 20-32 40 0 21 14 38 34 41 1 34 8 66 17 95l-250 304h-1718l-57 49h1884 3717zM1922 925l57-73h3522c-78 41-156 62-214 73zM2130 390v193l-67 84c-17-38-31-86-35-141 18-6 29-21 29-41 0-19-11-34-29-40 4-55 18-101 35-139zM1997 142h196c-34 18-78 49-116 101zM2077 728c38 52 82 83 116 103h-196zM2032 644c5 14 11 28 17 40l-188 241h-58zM2049 287c-6 14-12 26-17 40l-229-278h56zM5266 49c59 9 142 29 227 73h-3514l-57-73zM5775 361c-98-187-260-272-390-312h196l194 191zM5775 549c-56 136-147 225-240 283v-1h-3291c-11-3-94-31-155-120l90-111v-227l-90-113c61-87 144-115 155-118h3288c95 57 187 145 243 283zM5775 731l-194 194h-184c127-41 283-130 378-310z">
          <text:p/>
        </draw:path>
        <draw:path draw:style-name="gr4" draw:text-style-name="P4" draw:layer="layout" svg:width="5.821cm" svg:height="0.973cm" svg:x="8.085cm" svg:y="12.988cm" svg:viewBox="0 0 5822 974" svg:d="M5822 754v-531l-219-223h-3718-1885l57 49h1721l248 304c-8 29-14 60-17 95-20 3-35 20-35 40 0 21 15 36 35 41 3 33 9 66 17 93l-248 303h-1721l-57 49h1885 3718zM1923 925l57-72h3522c-78 40-154 61-214 72zM2131 391v193l-65 84c-19-38-31-84-37-141 18-4 30-21 30-39 0-19-12-34-30-40 6-57 18-103 37-141zM1998 145h196c-34 18-78 49-116 101zM2078 729c38 52 82 84 116 103h-196zM2033 645c7 14 13 29 19 40l-190 240h-58zM2052 290c-6 12-12 26-19 40l-229-281h58zM5268 49c58 9 142 29 228 72h-3516l-57-72zM5773 362c-95-185-255-273-387-313h196l191 194zM5773 552c-54 136-144 225-237 280h-3290c-11-3-93-31-154-118l88-112v-228l-88-111c61-89 143-115 154-118h3287c95 55 185 145 240 283zM5773 734l-191 191h-184c129-41 283-127 375-309z">
          <text:p/>
        </draw:path>
        <draw:path draw:style-name="gr4" draw:text-style-name="P4" draw:layer="layout" svg:width="5.821cm" svg:height="0.972cm" svg:x="8.085cm" svg:y="20.981cm" svg:viewBox="0 0 5822 973" svg:d="M5822 750v-531l-219-219h-3718-1885l57 49h1721l248 302c-8 27-14 59-17 93-20 5-35 21-35 41s15 37 35 42c3 33 9 64 17 93l-248 304h-1721l-57 49h1885 3718zM1923 924l57-73h3522c-78 41-154 62-214 73zM2131 389v194l-65 83c-19-38-31-84-37-141 18-6 30-20 30-40 0-18-12-35-30-39 6-57 18-103 37-141zM1998 141h196c-34 18-78 51-116 103zM2078 727c38 52 82 84 116 103h-196zM2033 643c7 15 13 27 19 41l-190 240h-58zM2052 288c-6 12-12 26-19 40l-229-279h58zM5268 49c58 8 142 28 228 72h-3516l-57-72zM5773 360c-95-185-255-271-387-311h196l191 192zM5773 548c-54 138-144 225-237 283v-1h-3290c-11-5-93-31-154-118l88-112v-228l-88-113c61-86 143-115 154-118h3287c95 58 185 147 240 285zM5773 730l-191 194h-184c129-40 283-128 375-310z">
          <text:p/>
        </draw:path>
        <draw:path draw:style-name="gr4" draw:text-style-name="P4" draw:layer="layout" svg:width="0.668cm" svg:height="1.31cm" svg:x="1.093cm" svg:y="10.778cm" svg:viewBox="0 0 669 1311" svg:d="M200 71l416 362v448l-416 360-147-138v-893zM199 0l-36 33-145 137-18 17v23 893 23l18 14 145 139 36 32 35-30 417-360 18-17v-23-448-25l-18-15-417-362z">
          <text:p/>
        </draw:path>
        <draw:path draw:style-name="gr4" draw:text-style-name="P4" draw:layer="layout" svg:width="0.668cm" svg:height="1.31cm" svg:x="1.093cm" svg:y="18.842cm" svg:viewBox="0 0 669 1311" svg:d="M200 71l416 362v446l-416 360-147-138v-890zM199 0l-36 32-145 141-18 15v23 890 23l18 17 145 138 36 32 35-32 417-360 18-15v-25-446-25l-18-15-417-362z">
          <text:p/>
        </draw:path>
        <draw:path draw:style-name="gr4" draw:text-style-name="P4" draw:layer="layout" svg:width="0.669cm" svg:height="1.311cm" svg:x="7.761cm" svg:y="4.86cm" svg:viewBox="0 0 670 1312" svg:d="M199 72l417 359v449l-417 362-147-139v-892zM199 0l-35 34-147 137-17 17v23 892 23l17 15 147 139 35 32 35-30 417-362 19-16v-24-449-24l-19-15-417-360z">
          <text:p/>
        </draw:path>
        <draw:path draw:style-name="gr4" draw:text-style-name="P4" draw:layer="layout" svg:width="0.669cm" svg:height="1.311cm" svg:x="14.362cm" svg:y="4.86cm" svg:viewBox="0 0 670 1312" svg:d="M200 72l415 359v449l-415 362-146-139v-892zM199 0l-35 34-147 137-17 17v23 892 23l17 15 147 139 35 32 35-30 416-362 20-16v-24-449-24l-20-15-416-360z">
          <text:p/>
        </draw:path>
        <draw:path draw:style-name="gr4" draw:text-style-name="P4" draw:layer="layout" svg:width="0.669cm" svg:height="1.311cm" svg:x="14.362cm" svg:y="10.849cm" svg:viewBox="0 0 670 1312" svg:d="M200 72l415 362v447l-415 359-146-137v-894zM199 0l-35 33-147 138-17 15v23 894 22l17 16 147 139 35 32 35-32 416-360 20-15v-24-447-25l-20-15-416-362z">
          <text:p/>
        </draw:path>
        <draw:path draw:style-name="gr4" draw:text-style-name="P4" draw:layer="layout" svg:width="0.669cm" svg:height="1.312cm" svg:x="14.362cm" svg:y="16.839cm" svg:viewBox="0 0 670 1313" svg:d="M200 72l415 360v449l-415 360-146-138v-893zM199 0l-35 34-147 138-17 15v23 893 23l17 15 147 138 35 34 35-33 416-359 20-15v-25-449-25l-20-15-416-361z">
          <text:p/>
        </draw:path>
        <draw:path draw:style-name="gr4" draw:text-style-name="P4" draw:layer="layout" svg:width="0.669cm" svg:height="1.31cm" svg:x="14.362cm" svg:y="21.804cm" svg:viewBox="0 0 670 1311" svg:d="M200 71l415 361v447l-415 362-146-140v-891zM199 0l-35 33-147 137-17 17v23 891 25l17 14 147 139 35 32 35-30 416-362 20-16v-24-447-26l-20-14-416-361z">
          <text:p/>
        </draw:path>
        <draw:path draw:style-name="gr4" draw:text-style-name="P4" draw:layer="layout" svg:width="0.669cm" svg:height="1.311cm" svg:x="7.761cm" svg:y="12.818cm" svg:viewBox="0 0 670 1312" svg:d="M199 72l417 361v447l-417 362-147-139v-892zM199 0l-35 34-147 137-17 16v24 892 23l17 15 147 139 35 32 35-30 417-362 19-17v-23-447-26l-19-15-417-360z">
          <text:p/>
        </draw:path>
        <draw:path draw:style-name="gr4" draw:text-style-name="P4" draw:layer="layout" svg:width="0.669cm" svg:height="1.312cm" svg:x="7.761cm" svg:y="20.811cm" svg:viewBox="0 0 670 1313" svg:d="M199 71l417 361v449l-417 360-147-138v-893zM199 0l-35 34-147 138-17 15v23 893 23l17 15 147 138 35 34 35-32 417-360 19-15v-25-449-25l-19-15-417-361z">
          <text:p/>
        </draw:path>
        <draw:frame draw:style-name="gr20" draw:text-style-name="P8" draw:layer="layout" svg:width="0.246cm" svg:height="0.289cm" svg:x="8.033cm" svg:y="25.743cm">
          <draw:text-box>
            <text:p text:style-name="P7"><text:span text:style-name="T1"><text:s/></text:span></text:p>
          </draw:text-box>
        </draw:frame>
        <draw:frame draw:style-name="gr20" draw:text-style-name="P8" draw:layer="layout" svg:width="0.246cm" svg:height="0.289cm" svg:x="8.033cm" svg:y="26.236cm">
          <draw:text-box>
            <text:p text:style-name="P7"><text:span text:style-name="T1"><text:s/></text:span></text:p>
          </draw:text-box>
        </draw:frame>
        <draw:frame draw:style-name="gr18" draw:text-style-name="P9" draw:layer="layout" svg:width="10.556cm" svg:height="0.23cm" svg:x="6.156cm" svg:y="27.326cm">
          <draw:text-box>
            <text:p text:style-name="P7"><text:span text:style-name="T2">TM &amp; © 2014 Wizards of the Coast LLC. Permission is granted to photocopy this document for personal use.</text:span></text:p>
          </draw:text-box>
        </draw:frame>
        <draw:frame draw:style-name="gr137" draw:text-style-name="P8" draw:layer="layout" svg:width="1.822cm" svg:height="0.289cm" svg:x="2.473cm" svg:y="3.267cm">
          <draw:text-box>
            <text:p text:style-name="P7"><text:span text:style-name="T1">SPELLCASTING</text:span></text:p>
          </draw:text-box>
        </draw:frame>
        <draw:frame draw:style-name="gr138" draw:text-style-name="P8" draw:layer="layout" svg:width="0.789cm" svg:height="0.289cm" svg:x="2.473cm" svg:y="3.514cm">
          <draw:text-box>
            <text:p text:style-name="P7"><text:span text:style-name="T1">CLASS</text:span></text:p>
          </draw:text-box>
        </draw:frame>
        <draw:frame draw:style-name="gr139" draw:text-style-name="P10" draw:layer="layout" svg:width="1.598cm" svg:height="0.239cm" draw:transform="rotate (1.5707963267949) translate (0.547cm 16.161cm)">
          <draw:text-box>
            <text:p text:style-name="P7"><text:span text:style-name="T3">SPELLS KNOWN</text:span></text:p>
          </draw:text-box>
        </draw:frame>
        <draw:frame draw:style-name="gr140" draw:text-style-name="P11" draw:layer="layout" svg:width="1.615cm" svg:height="0.268cm" svg:x="3.697cm" svg:y="12.251cm">
          <draw:text-box>
            <text:p text:style-name="P7"><text:span text:style-name="T26">SPELL NAME</text:span></text:p>
          </draw:text-box>
        </draw:frame>
        <draw:frame draw:style-name="gr141" draw:text-style-name="P28" draw:layer="layout" svg:width="0.158cm" svg:height="0.187cm" draw:transform="rotate (1.60919357033877) translate (0.925cm 12.484cm)">
          <draw:text-box>
            <text:p text:style-name="P7"><text:span text:style-name="T27">P</text:span></text:p>
          </draw:text-box>
        </draw:frame>
        <draw:frame draw:style-name="gr141" draw:text-style-name="P28" draw:layer="layout" svg:width="0.158cm" svg:height="0.187cm" draw:transform="rotate (1.11352006277238) translate (0.937cm 12.339cm)">
          <draw:text-box>
            <text:p text:style-name="P7"><text:span text:style-name="T27">R</text:span></text:p>
          </draw:text-box>
        </draw:frame>
        <draw:frame draw:style-name="gr141" draw:text-style-name="P28" draw:layer="layout" svg:width="0.158cm" svg:height="0.187cm" draw:transform="rotate (0.713839664065681) translate (1.007cm 12.218cm)">
          <draw:text-box>
            <text:p text:style-name="P7"><text:span text:style-name="T27">E</text:span></text:p>
          </draw:text-box>
        </draw:frame>
        <draw:frame draw:style-name="gr141" draw:text-style-name="P28" draw:layer="layout" svg:width="0.158cm" svg:height="0.187cm" draw:transform="rotate (0.32637657012294) translate (1.114cm 12.144cm)">
          <draw:text-box>
            <text:p text:style-name="P7"><text:span text:style-name="T27">P</text:span></text:p>
          </draw:text-box>
        </draw:frame>
        <draw:frame draw:style-name="gr141" draw:text-style-name="P28" draw:layer="layout" svg:width="0.158cm" svg:height="0.187cm" draw:transform="rotate (-0.155334303427496) translate (1.251cm 12.11cm)">
          <draw:text-box>
            <text:p text:style-name="P7"><text:span text:style-name="T27">A</text:span></text:p>
          </draw:text-box>
        </draw:frame>
        <draw:frame draw:style-name="gr141" draw:text-style-name="P28" draw:layer="layout" svg:width="0.158cm" svg:height="0.187cm" draw:transform="rotate (-0.555014702134197) translate (1.383cm 12.145cm)">
          <draw:text-box>
            <text:p text:style-name="P7"><text:span text:style-name="T27">R</text:span></text:p>
          </draw:text-box>
        </draw:frame>
        <draw:frame draw:style-name="gr141" draw:text-style-name="P28" draw:layer="layout" svg:width="0.158cm" svg:height="0.187cm" draw:transform="rotate (-0.954695100840899) translate (1.492cm 12.227cm)">
          <draw:text-box>
            <text:p text:style-name="P7"><text:span text:style-name="T27">E</text:span></text:p>
          </draw:text-box>
        </draw:frame>
        <draw:frame draw:style-name="gr141" draw:text-style-name="P28" draw:layer="layout" svg:width="0.158cm" svg:height="0.187cm" draw:transform="rotate (-1.53065375399903) translate (1.565cm 12.366cm)">
          <draw:text-box>
            <text:p text:style-name="P7"><text:span text:style-name="T27">D</text:span></text:p>
          </draw:text-box>
        </draw:frame>
        <draw:frame draw:style-name="gr142" draw:text-style-name="P10" draw:layer="layout" svg:width="0.607cm" svg:height="0.239cm" svg:x="1.108cm" svg:y="10.347cm">
          <draw:text-box>
            <text:p text:style-name="P7"><text:span text:style-name="T3">SPELL</text:span></text:p>
          </draw:text-box>
        </draw:frame>
        <draw:frame draw:style-name="gr143" draw:text-style-name="P10" draw:layer="layout" svg:width="0.624cm" svg:height="0.239cm" svg:x="1.104cm" svg:y="10.542cm">
          <draw:text-box>
            <text:p text:style-name="P7"><text:span text:style-name="T3">LEVEL</text:span></text:p>
          </draw:text-box>
        </draw:frame>
        <draw:frame draw:style-name="gr144" draw:text-style-name="P10" draw:layer="layout" svg:width="1.831cm" svg:height="0.239cm" svg:x="4.505cm" svg:y="10.707cm">
          <draw:text-box>
            <text:p text:style-name="P7"><text:span text:style-name="T3">SLOTS EXPENDED</text:span></text:p>
          </draw:text-box>
        </draw:frame>
        <draw:frame draw:style-name="gr145" draw:text-style-name="P10" draw:layer="layout" svg:width="1.382cm" svg:height="0.239cm" svg:x="1.792cm" svg:y="10.707cm">
          <draw:text-box>
            <text:p text:style-name="P7"><text:span text:style-name="T3">SLOTS TOTAL</text:span></text:p>
          </draw:text-box>
        </draw:frame>
        <draw:frame draw:style-name="gr146" draw:text-style-name="P24" draw:layer="layout" svg:width="0.422cm" svg:height="0.497cm" svg:x="1.323cm" svg:y="11.182cm">
          <draw:text-box>
            <text:p text:style-name="P7"><text:span text:style-name="T28">1</text:span></text:p>
          </draw:text-box>
        </draw:frame>
        <draw:frame draw:style-name="gr146" draw:text-style-name="P24" draw:layer="layout" svg:width="0.422cm" svg:height="0.497cm" svg:x="1.323cm" svg:y="5.262cm">
          <draw:text-box>
            <text:p text:style-name="P7"><text:span text:style-name="T28">0</text:span></text:p>
          </draw:text-box>
        </draw:frame>
        <draw:frame draw:style-name="gr146" draw:text-style-name="P24" draw:layer="layout" svg:width="0.422cm" svg:height="0.497cm" svg:x="1.323cm" svg:y="19.243cm">
          <draw:text-box>
            <text:p text:style-name="P7"><text:span text:style-name="T28">2</text:span></text:p>
          </draw:text-box>
        </draw:frame>
        <draw:frame draw:style-name="gr146" draw:text-style-name="P24" draw:layer="layout" svg:width="0.422cm" svg:height="0.497cm" svg:x="7.99cm" svg:y="5.262cm">
          <draw:text-box>
            <text:p text:style-name="P7"><text:span text:style-name="T28">3</text:span></text:p>
          </draw:text-box>
        </draw:frame>
        <draw:frame draw:style-name="gr146" draw:text-style-name="P24" draw:layer="layout" svg:width="0.422cm" svg:height="0.497cm" svg:x="14.591cm" svg:y="5.262cm">
          <draw:text-box>
            <text:p text:style-name="P7"><text:span text:style-name="T28">6</text:span></text:p>
          </draw:text-box>
        </draw:frame>
        <draw:frame draw:style-name="gr146" draw:text-style-name="P24" draw:layer="layout" svg:width="0.422cm" svg:height="0.497cm" svg:x="14.591cm" svg:y="11.252cm">
          <draw:text-box>
            <text:p text:style-name="P7"><text:span text:style-name="T28">7</text:span></text:p>
          </draw:text-box>
        </draw:frame>
        <draw:frame draw:style-name="gr146" draw:text-style-name="P24" draw:layer="layout" svg:width="0.422cm" svg:height="0.497cm" svg:x="14.591cm" svg:y="17.242cm">
          <draw:text-box>
            <text:p text:style-name="P7"><text:span text:style-name="T28">8</text:span></text:p>
          </draw:text-box>
        </draw:frame>
        <draw:frame draw:style-name="gr146" draw:text-style-name="P24" draw:layer="layout" svg:width="0.422cm" svg:height="0.497cm" svg:x="14.591cm" svg:y="22.206cm">
          <draw:text-box>
            <text:p text:style-name="P7"><text:span text:style-name="T28">9</text:span></text:p>
          </draw:text-box>
        </draw:frame>
        <draw:frame draw:style-name="gr146" draw:text-style-name="P24" draw:layer="layout" svg:width="0.422cm" svg:height="0.497cm" svg:x="7.99cm" svg:y="13.221cm">
          <draw:text-box>
            <text:p text:style-name="P7"><text:span text:style-name="T28">4</text:span></text:p>
          </draw:text-box>
        </draw:frame>
        <draw:frame draw:style-name="gr146" draw:text-style-name="P24" draw:layer="layout" svg:width="0.422cm" svg:height="0.497cm" svg:x="7.99cm" svg:y="21.215cm">
          <draw:text-box>
            <text:p text:style-name="P7"><text:span text:style-name="T28">5</text:span></text:p>
          </draw:text-box>
        </draw:frame>
        <draw:frame draw:style-name="gr137" draw:text-style-name="P8" draw:layer="layout" svg:width="1.822cm" svg:height="0.289cm" svg:x="10.333cm" svg:y="3.048cm">
          <draw:text-box>
            <text:p text:style-name="P7"><text:span text:style-name="T1">SPELLCASTING</text:span></text:p>
          </draw:text-box>
        </draw:frame>
        <draw:frame draw:style-name="gr147" draw:text-style-name="P8" draw:layer="layout" svg:width="0.916cm" svg:height="0.289cm" svg:x="10.739cm" svg:y="3.274cm">
          <draw:text-box>
            <text:p text:style-name="P7"><text:span text:style-name="T1">ABILITY</text:span></text:p>
          </draw:text-box>
        </draw:frame>
        <draw:frame draw:style-name="gr148" draw:text-style-name="P8" draw:layer="layout" svg:width="1.899cm" svg:height="0.289cm" svg:x="13.942cm" svg:y="3.048cm">
          <draw:text-box>
            <text:p text:style-name="P7"><text:span text:style-name="T1">SPELL SAVE DC</text:span></text:p>
          </draw:text-box>
        </draw:frame>
        <draw:frame draw:style-name="gr149" draw:text-style-name="P8" draw:layer="layout" svg:width="1.78cm" svg:height="0.289cm" svg:x="17.607cm" svg:y="3.048cm">
          <draw:text-box>
            <text:p text:style-name="P7"><text:span text:style-name="T1">SPELL ATTACK</text:span></text:p>
          </draw:text-box>
        </draw:frame>
        <draw:path draw:style-name="gr4" draw:text-style-name="P4" draw:layer="layout" svg:width="0.124cm" svg:height="0.125cm" svg:x="8.096cm" svg:y="1.33cm" svg:viewBox="0 0 125 126" svg:d="M67 44c11 0 11 16 0 16h-14v-16zM78 70c24-4 18-41-11-41h-29v64h15v-20h6l16 20h18v-3zM62 114c31 0 48-24 48-53 0-27-17-49-48-49-29 0-48 22-48 49 0 29 19 53 48 53zM125 61c0 35-23 65-63 65s-62-30-62-65c0-34 22-61 62-61s63 27 63 61z">
          <text:p/>
        </draw:path>
        <draw:path draw:style-name="gr4" draw:text-style-name="P4" draw:layer="layout" svg:width="1.72cm" svg:height="0.656cm" svg:x="6.425cm" svg:y="0.799cm" svg:viewBox="0 0 1721 657" svg:d="M1562 75c-44-23-89-34-152-37h-126c-98 0-144-1-177-9-31-6-57-23-57-24l-8-5 2 9c0 3 6 69 85 127 16 11 26 23 26 64v26c17-11 37-20 57-29-6 6-15 15-23 26 14-9 31-17 60-23 38-6 67-3 80 0v-11h71c90 0 142 58 142 161 0 99-52 157-142 157h-28c25 22 40 52 40 86 0 23-9 46-23 64 87-1 142-16 202-56 26-17 49-37 66-60 41-52 64-121 64-194 0-116-60-220-159-272zM1188 509c4-6 4-12 1-20l-20-53 51 29c4 3 9 7 14 9l30-2c23-1 44 2 65 9v-156c-10 5-21 8-25 13l-12 10-14-9c-9-8-23-12-37-12-23 0-46 11-61 27-9 11-17 22-25 33v122c14 11 25 9 33 0zM571 500l-20 27 6-76c6-61 45-106 71-130-5 0-11 1-17 3l-69 14 49-49c18-17 41-29 61-40 3-3 6-3 8-5-25-74-74-132-143-169-44-23-88-34-151-37h-124c-98 0-144-1-179-9-29-6-55-23-55-24l-8-5v9c2 3 8 69 87 127 16 11 26 23 26 64v355c0 38-7 49-24 60-20 10-60 35-60 35l-12 7h321c91 0 147-15 208-56 10-5 16-11 25-19-5-27-5-55 0-82zM1329 223v-17c-10 3-28 9-34 14 10 0 25 0 34 3zM355 507h-70v-318h70c91 0 143 58 143 161 0 99-52 157-143 157z">
          <text:p/>
        </draw:path>
        <draw:path draw:style-name="gr4" draw:text-style-name="P4" draw:layer="layout" svg:width="0.838cm" svg:height="0.812cm" svg:x="7.004cm" svg:y="0.739cm" svg:viewBox="0 0 839 813" svg:d="M685 574c9 1 27 13 27 30 0 11-4 20-15 26-3 2-8 5-14 5 3-9 5-20 3-31 0-20-1-30-1-30zM669 337c-92 6-171 84-211 139 8 4 14 7 23 12 8 8 20 18 34 29 10-23 35-74 73-119 34-38 94-43 126-18 20-19 88-35 125-26-21-23-70-55-121-55-44 0-69 21-75 10-7-12 29-30 29-30-50 3-87 63-102 55-9-5 14-34 14-34-48 28-86 86-94 121 43-53 126-92 179-84zM458 638c-18-17-46-40-67-55-23 38-72 90-123 90-93 0-139-130-35-240-6-1-12-1-14-1-9 0-18 1-24 6l-40 27 9-50c2-3 2-6 3-9-23 12-48 29-57 38l-40 45 5-62c1-6 1-10 3-15 1-9 4-23 3-26-2-2-2-3-3-3-20 14-72 61-78 131 0 0 9-14 18-17 6-3 12 0 6 17-3 6-52 144 46 239 0 0-11-28-3-37 3-5 6-5 12 3 5 6 9 11 14 17 9 9 17 18 30 26 29 20 69 37 115 37 124 0 188-86 225-157-2-1-3-4-5-4zM812 653c0-60-59-105-123-99 19 3 45 23 45 50 0 46-59 61-91 55 34-24 29-93-10-116 12 38-28 75-68 43-23-20-75-63-98-80-23-20-50-9-61-17-12-9-3-36-20-46-15-8-29-5-44-10-14-4-26-15-25-32-6 11-6 31 5 43 12 14 29 21 38 38 9 18-7 44 37 78 20 15 53 43 75 61 35 32 15 70 20 104 6 40 38 63 59 69-18-17-26-60 0-86 2 34 26 86 80 101 60 16 121-18 133-41-21 11-64 0-81-17 67 9 129-38 129-98zM360 366c0 0-7-29-38-40 6 20 15 40 38 40zM27 361c29-30 89-47 96-64 3-15-30-41-41-46 44-3 66 5 66 5-11-15-14-41-8-61 23 56 107 64 127 111-3-20-23-43-45-55-10-30-3-87 13-102-5 81 110 127 133 185-14-51-67-81-92-112-9-20-3-53 6-66-3 54 55 97 86 127 38 36 49 66 44 92 8 3 19 11 17 23 11-1 23-15 26-23 6 40-17 81-44 95 0 0 6-20-5-35-12-14-46-14-58-14 0 0 15-20 9-31-6-12-72-7-102 5 9-1 33 0 41 5-3 6-15 35-8 44 8 8 20-6 20-6 0 0-11 32-3 42 6 6 23 2 23 2-11 24-49 41-75 41 9-3 26-20 28-31-8 5-25 7-32 5 7-3 26-27 19-53-7-37-58-41-84-23 8-24 34-47 52-55-10-5-24-8-38-11 17-12 58-24 78-23-32-7-90 2-118 34 9 0 31 5 40 6-37 8-88 41-104 57 5-20 11-39 5-51-6-18-29-26-72-17zM94 173c-6-70 29-107 44-122 34-34 77-54 143-51 102 5 151 77 151 152 0 37-18 85-44 121-2-2-2-3-5-5-4-5-11-11-17-15-17-17-35-34-49-52 28-51 13-124-47-124-34 0-63 32-61 73-9 20-14 49-13 75-16-9-30-21-38-38l-21-52-20 54c-4 12-4 27-3 41-7-11-16-31-20-57z">
          <text:p/>
        </draw:path>
        <draw:frame draw:style-name="gr150" draw:text-style-name="P8" draw:layer="layout" svg:width="0.883cm" svg:height="0.289cm" svg:x="17.956cm" svg:y="3.274cm">
          <draw:text-box>
            <text:p text:style-name="P7"><text:span text:style-name="T1">BONUS</text:span></text:p>
          </draw:text-box>
        </draw:frame>
        <draw:frame draw:style-name="gr151" draw:text-style-name="P8" draw:layer="layout" svg:width="1.395cm" svg:height="0.289cm" svg:x="3.951cm" svg:y="5.377cm">
          <draw:text-box>
            <text:p text:style-name="P7"><text:span text:style-name="T29">CANTRIPS</text:span></text:p>
          </draw:text-box>
        </draw:frame>
        <draw:frame draw:style-name="gr152" draw:text-style-name="P14" draw:layer="layout" svg:width="2.148cm" svg:height="0.496cm" svg:x="4.283cm" svg:y="2.469cm">
          <draw:text-box>
            <text:p text:style-name="P7"><text:span text:style-name="T11">Barbaria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Sans" svg:font-family="NimbusSan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04T14:10:51.202517447</dc:date>
    <meta:editing-duration>PT51M37S</meta:editing-duration>
    <meta:editing-cycles>16</meta:editing-cycles>
    <meta:generator>LibreOffice/24.2.7.2$Linux_X86_64 LibreOffice_project/420$Build-2</meta:generator>
    <meta:print-date>2026-02-04T14:10:36.158202882</meta:print-date>
    <meta:printed-by>PDF files</meta:printed-by>
    <meta:document-statistic meta:object-count="1069"/>
  </office:meta>
</office:document-meta>
</file>